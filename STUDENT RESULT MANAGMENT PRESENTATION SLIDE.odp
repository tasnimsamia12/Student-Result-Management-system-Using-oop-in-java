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eg" manifest:media-type="image/jpeg"/>
  <manifest:file-entry manifest:full-path="media/image14.png" manifest:media-type="image/png"/>
  <manifest:file-entry manifest:full-path="media/image15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draw:fill="solid" draw:fill-color="#79b79d" draw:opacity="27.843%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2069in" style:font-size-asian="0.42069in" style:font-size-complex="0.42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0.5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 Bold" style:font-family-asian="Codec Pro Bold" style:font-family-complex="Codec Pro Bold" fo:font-size="0.44736in" style:font-size-asian="0.44736in" style:font-size-complex="0.44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0.6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2069in" style:font-size-asian="0.42069in" style:font-size-complex="0.42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0.58889in" fo:text-align="left" style:tab-stop-distance="1in" fo:margin-left="0.71519in" fo:margin-right="0in" fo:text-indent="-0.35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2069in" style:font-size-asian="0.42069in" style:font-size-complex="0.42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0.58889in" fo:text-align="left" style:tab-stop-distance="1in" fo:margin-left="0.71519in" fo:margin-right="0in" fo:text-indent="-0.35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2069in" style:font-size-asian="0.42069in" style:font-size-complex="0.42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0.58889in" fo:text-align="left" style:tab-stop-distance="1in" fo:margin-left="0.71519in" fo:margin-right="0in" fo:text-indent="-0.35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 Bold" style:font-family-asian="Codec Pro Bold" style:font-family-complex="Codec Pro Bold" fo:font-size="0.42069in" style:font-size-asian="0.42069in" style:font-size-complex="0.42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0.5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2069in" style:font-size-asian="0.42069in" style:font-size-complex="0.42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0.58889in" fo:text-align="left" style:tab-stop-distance="1in" fo:margin-left="0.71519in" fo:margin-right="0in" fo:text-indent="-0.35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2069in" style:font-size-asian="0.42069in" style:font-size-complex="0.42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0.58889in" fo:text-align="left" style:tab-stop-distance="1in" fo:margin-left="0.71519in" fo:margin-right="0in" fo:text-indent="-0.35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 Bold" style:font-family-asian="Codec Pro Bold" style:font-family-complex="Codec Pro Bold" fo:font-size="0.42069in" style:font-size-asian="0.42069in" style:font-size-complex="0.42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0.5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 Bold" style:font-family-asian="Codec Pro Bold" style:font-family-complex="Codec Pro Bold" fo:font-size="0.42069in" style:font-size-asian="0.42069in" style:font-size-complex="0.42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2069in" style:font-size-asian="0.42069in" style:font-size-complex="0.42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0.5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2069in" style:font-size-asian="0.42069in" style:font-size-complex="0.42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0.5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1.00931in" style:font-size-asian="1.00931in" style:font-size-complex="1.00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1.00931in" style:font-size-asian="1.00931in" style:font-size-complex="1.00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1.0902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0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solid" draw:fill-color="#79b79d" draw:opacity="27.843%" draw:stroke="non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5">
      <style:graphic-properties draw:fill="bitmap" draw:fill-image-name="a604" style:repeat="stretch" draw:stroke="none"/>
    </style:style>
    <style:style style:family="drawing-page" style:name="a606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99208in" style:font-size-asian="0.99208in" style:font-size-complex="0.99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99208in" style:font-size-asian="0.99208in" style:font-size-complex="0.99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.0715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0.79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6653in" style:font-size-asian="0.56653in" style:font-size-complex="0.56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0.79306in" fo:text-align="left" style:tab-stop-distance="1in" fo:margin-left="0.96325in" fo:margin-right="0in" fo:text-indent="-0.4816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6653in" style:font-size-asian="0.56653in" style:font-size-complex="0.56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0.79306in" fo:text-align="left" style:tab-stop-distance="1in" fo:margin-left="0.96325in" fo:margin-right="0in" fo:text-indent="-0.4816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6653in" style:font-size-asian="0.56653in" style:font-size-complex="0.56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0.79306in" fo:text-align="left" style:tab-stop-distance="1in" fo:margin-left="0.96325in" fo:margin-right="0in" fo:text-indent="-0.4816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6653in" style:font-size-asian="0.56653in" style:font-size-complex="0.56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0.79306in" fo:text-align="left" style:tab-stop-distance="1in" fo:margin-left="0.96325in" fo:margin-right="0in" fo:text-indent="-0.4816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6653in" style:font-size-asian="0.56653in" style:font-size-complex="0.56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0.79306in" fo:text-align="left" style:tab-stop-distance="1in" fo:margin-left="0.96325in" fo:margin-right="0in" fo:text-indent="-0.4816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6653in" style:font-size-asian="0.56653in" style:font-size-complex="0.56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0.79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0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3">
      <style:graphic-properties draw:fill="bitmap" draw:fill-image-name="a632" style:repeat="stretch" draw:stroke="none"/>
    </style:style>
    <style:style style:family="graphic" style:name="a634">
      <style:graphic-properties draw:fill="solid" draw:fill-color="#d5e4dd" draw:opacity="100%" draw:stroke="non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0.4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64653in" style:font-size-asian="0.64653in" style:font-size-complex="0.64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.144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62722in" style:font-size-asian="0.62722in" style:font-size-complex="0.62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.1104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51431in" style:font-size-asian="0.51431in" style:font-size-complex="0.5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0.9104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57417in" style:font-size-asian="0.57417in" style:font-size-complex="0.57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1.0159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78972in" style:font-size-asian="0.78972in" style:font-size-complex="0.78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2">
      <style:paragraph-properties fo:line-height="0.7347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4514in" style:font-size-asian="0.44514in" style:font-size-complex="0.4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0.6229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6778in" style:font-size-asian="0.46778in" style:font-size-complex="0.46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0.6548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7292in" style:font-size-asian="0.47292in" style:font-size-complex="0.4729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0.661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3264in" style:font-size-asian="0.43264in" style:font-size-complex="0.43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0.60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solid" draw:fill-color="#d5e4dd" draw:opacity="100%" draw:stroke="non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0.4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solid" draw:fill-color="#d5e4dd" draw:opacity="100%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0.4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solid" draw:fill-color="#d5e4dd" draw:opacity="100%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draw:fill="bitmap" draw:fill-image-name="a360" style:repeat="stretch" draw:stroke="none"/>
    </style:style>
    <style:style style:family="graphic" style:name="a363">
      <style:graphic-properties draw:fill="bitmap" draw:fill-image-name="a362" style:repeat="stretch" draw:stroke="none"/>
    </style:style>
    <style:style style:family="graphic" style:name="a365">
      <style:graphic-properties draw:fill="bitmap" draw:fill-image-name="a364" style:repeat="stretch" draw:stroke="none"/>
    </style:style>
    <style:style style:family="paragraph" style:name="a990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draw:fill="bitmap" draw:fill-image-name="a366" style:repeat="stretch" draw:stroke="non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draw:fill="bitmap" draw:fill-image-name="a368" style:repeat="stretch" draw:stroke="non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0.4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82">
      <style:graphic-properties draw:fill="solid" draw:fill-color="#d5e4dd" draw:opacity="100%" draw:stroke="non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0.4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61097in" style:font-size-asian="0.61097in" style:font-size-complex="0.61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.081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51319in" style:font-size-asian="0.51319in" style:font-size-complex="0.51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0.7187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48139in" style:font-size-asian="0.48139in" style:font-size-complex="0.48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0.9145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 Bold" style:font-family-asian="Arimo Bold" style:font-family-complex="Arimo Bold" fo:font-size="0.46639in" style:font-size-asian="0.46639in" style:font-size-complex="0.46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0.6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48139in" style:font-size-asian="0.48139in" style:font-size-complex="0.48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0.9145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48139in" style:font-size-asian="0.48139in" style:font-size-complex="0.48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69278in" style:font-size-asian="0.69278in" style:font-size-complex="0.69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.2263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94">
      <style:graphic-properties draw:fill="bitmap" draw:fill-image-name="a693" style:repeat="stretch" draw:stroke="none"/>
    </style:style>
    <style:style style:family="graphic" style:name="a696">
      <style:graphic-properties draw:fill="bitmap" draw:fill-image-name="a695" style:repeat="stretch" draw:stroke="non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1.03347in" style:font-size-asian="1.03347in" style:font-size-complex="1.03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0.961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0">
      <style:paragraph-properties fo:line-height="0.9145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48139in" style:font-size-asian="0.48139in" style:font-size-complex="0.48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0.9145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48139in" style:font-size-asian="0.48139in" style:font-size-complex="0.48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0.9145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48139in" style:font-size-asian="0.48139in" style:font-size-complex="0.48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.1326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48389in" style:font-size-asian="0.48389in" style:font-size-complex="0.48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0.9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48389in" style:font-size-asian="0.48389in" style:font-size-complex="0.48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0.9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48389in" style:font-size-asian="0.48389in" style:font-size-complex="0.48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0.9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48389in" style:font-size-asian="0.48389in" style:font-size-complex="0.48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0.9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48389in" style:font-size-asian="0.48389in" style:font-size-complex="0.48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.138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55347in" style:font-size-asian="0.55347in" style:font-size-complex="0.55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0">
      <style:graphic-properties draw:fill="bitmap" draw:fill-image-name="a1299" style:repeat="stretch" draw:stroke="none"/>
    </style:style>
    <style:style style:family="graphic" style:name="a1301">
      <style:graphic-properties draw:fill="solid" draw:fill-color="#79b79d" draw:opacity="27.843%" draw:stroke="non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5">
      <style:graphic-properties draw:fill="solid" draw:fill-color="#79b79d" draw:opacity="27.843%" draw:stroke="non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0">
      <style:graphic-properties draw:fill="bitmap" draw:fill-image-name="a1309" style:repeat="stretch" draw:stroke="none"/>
    </style:style>
    <style:style style:family="graphic" style:name="a1311">
      <style:graphic-properties draw:fill="solid" draw:fill-color="#c5e8d9" draw:opacity="100%" draw:stroke="none"/>
    </style:style>
    <style:style style:family="graphic" style:name="a1313">
      <style:graphic-properties draw:fill="bitmap" draw:fill-image-name="a1312" style:repeat="stretch" draw:stroke="none"/>
    </style:style>
    <style:style style:family="drawing-page" style:name="a1314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bitmap" draw:fill-image-name="a1315" style:repeat="stretch" draw:stroke="none"/>
    </style:style>
    <style:style style:family="graphic" style:name="a1318">
      <style:graphic-properties draw:fill="bitmap" draw:fill-image-name="a1317" style:repeat="stretch" draw:stroke="non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2736in" style:font-size-asian="0.52736in" style:font-size-complex="0.52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0.73819in" fo:text-align="left" style:tab-stop-distance="1in" fo:margin-left="0.89667in" fo:margin-right="0in" fo:text-indent="-0.448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2736in" style:font-size-asian="0.52736in" style:font-size-complex="0.52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0.73819in" fo:text-align="left" style:tab-stop-distance="1in" fo:margin-left="0.89667in" fo:margin-right="0in" fo:text-indent="-0.448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2736in" style:font-size-asian="0.52736in" style:font-size-complex="0.52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0.738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1.03167in" style:font-size-asian="1.03167in" style:font-size-complex="1.03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9">
      <style:paragraph-properties fo:line-height="1.1138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14">
      <style:graphic-properties draw:fill="solid" draw:fill-color="#79b79d" draw:opacity="27.843%" draw:stroke="none"/>
    </style:style>
    <style:style style:family="graphic" style:name="a1015">
      <style:graphic-properties draw:fill="solid" draw:fill-color="#79b79d" draw:opacity="27.843%" draw:stroke="none"/>
    </style:style>
    <style:style style:family="graphic" style:name="a1016">
      <style:graphic-properties draw:fill="solid" draw:fill-color="#79b79d" draw:opacity="27.843%" draw:stroke="none"/>
    </style:style>
    <style:style style:family="graphic" style:name="a1017">
      <style:graphic-properties draw:fill="solid" draw:fill-color="#79b79d" draw:opacity="27.843%" draw:stroke="none"/>
    </style:style>
    <style:style style:family="paragraph" style:name="a800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draw:fill="solid" draw:fill-color="#79b79d" draw:opacity="27.843%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>
      <style:graphic-properties draw:fill="solid" draw:fill-color="#79b79d" draw:opacity="27.843%" draw:stroke="none"/>
    </style:style>
    <style:style style:family="paragraph" style:name="a802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1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1.64556in" style:font-size-asian="1.64556in" style:font-size-complex="1.64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1.6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36">
      <style:graphic-properties draw:fill="bitmap" draw:fill-image-name="a1335" style:repeat="stretch" draw:stroke="none"/>
    </style:style>
    <style:style style:family="graphic" style:name="a1338">
      <style:graphic-properties draw:fill="bitmap" draw:fill-image-name="a1337" style:repeat="stretch" draw:stroke="none"/>
    </style:style>
    <style:style style:family="graphic" style:name="a1020">
      <style:graphic-properties draw:fill="solid" draw:fill-color="#79b79d" draw:opacity="27.843%" draw:stroke="none"/>
    </style:style>
    <style:style style:family="graphic" style:name="a1021">
      <style:graphic-properties draw:fill="solid" draw:fill-color="#79b79d" draw:opacity="27.843%" draw:stroke="non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 Bold" style:font-family-asian="Codec Pro Bold" style:font-family-complex="Codec Pro Bold" fo:font-size="0.53097in" style:font-size-asian="0.53097in" style:font-size-complex="0.53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0.7430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 Bold" style:font-family-asian="Codec Pro Bold" style:font-family-complex="Codec Pro Bol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 Bold" style:font-family-asian="Codec Pro Bold" style:font-family-complex="Codec Pro Bol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0.987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draw:fill="bitmap" draw:fill-image-name="a1339" style:repeat="stretch" draw:stroke="none"/>
    </style:style>
    <style:style style:family="graphic" style:name="a500">
      <style:graphic-properties draw:fill="solid" draw:fill-color="#79b79d" draw:opacity="27.843%" draw:stroke="none"/>
    </style:style>
    <style:style style:family="graphic" style:name="a1342">
      <style:graphic-properties draw:fill="bitmap" draw:fill-image-name="a1341" style:repeat="stretch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1.64556in" style:font-size-asian="1.64556in" style:font-size-complex="1.64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.6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04">
      <style:graphic-properties draw:fill="solid" draw:fill-color="#79b79d" draw:opacity="27.843%" draw:stroke="none"/>
    </style:style>
    <style:style style:family="graphic" style:name="a1346">
      <style:graphic-properties draw:fill="solid" draw:fill-color="#79b79d" draw:opacity="27.843%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08">
      <style:graphic-properties draw:fill="solid" draw:fill-color="#79b79d" draw:opacity="27.843%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solid" draw:fill-color="#79b79d" draw:opacity="27.843%" draw:stroke="non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4">
      <style:graphic-properties draw:fill="solid" draw:fill-color="#79b79d" draw:opacity="27.843%" draw:stroke="none"/>
    </style:style>
    <style:style style:family="graphic" style:name="a513">
      <style:graphic-properties draw:fill="bitmap" draw:fill-image-name="a512" style:repeat="stretch" draw:stroke="non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draw:fill="solid" draw:fill-color="#d5e4dd" draw:opacity="100%" draw:stroke="none"/>
    </style:style>
    <style:style style:family="paragraph" style:name="a1356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0.4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draw:fill="solid" draw:fill-color="#79b79d" draw:opacity="27.843%" draw:stroke="none"/>
    </style:style>
    <style:style style:family="graphic" style:name="a51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d5e4dd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1.03653in" style:font-size-asian="1.03653in" style:font-size-complex="1.03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1.03653in" style:font-size-asian="1.03653in" style:font-size-complex="1.03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.11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7125in" style:font-size-asian="0.57125in" style:font-size-complex="0.57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0.8in" fo:text-align="left" style:tab-stop-distance="1in" fo:margin-left="0.97134in" fo:margin-right="0in" fo:text-indent="-0.485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7125in" style:font-size-asian="0.57125in" style:font-size-complex="0.57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0.8in" fo:text-align="left" style:tab-stop-distance="1in" fo:margin-left="0.97134in" fo:margin-right="0in" fo:text-indent="-0.485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7125in" style:font-size-asian="0.57125in" style:font-size-complex="0.57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0.8in" fo:text-align="left" style:tab-stop-distance="1in" fo:margin-left="0.97134in" fo:margin-right="0in" fo:text-indent="-0.485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7125in" style:font-size-asian="0.57125in" style:font-size-complex="0.57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0.8in" fo:text-align="left" style:tab-stop-distance="1in" fo:margin-left="0.97134in" fo:margin-right="0in" fo:text-indent="-0.485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7125in" style:font-size-asian="0.57125in" style:font-size-complex="0.57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0.8in" fo:text-align="left" style:tab-stop-distance="1in" fo:margin-left="0.97134in" fo:margin-right="0in" fo:text-indent="-0.485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7125in" style:font-size-asian="0.57125in" style:font-size-complex="0.57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0.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7125in" style:font-size-asian="0.57125in" style:font-size-complex="0.57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0.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3">
      <style:graphic-properties draw:fill="solid" draw:fill-color="#79b79d" draw:opacity="27.843%" draw:stroke="non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solid" draw:fill-color="#79b79d" draw:opacity="27.843%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32542in" style:font-size-asian="0.32542in" style:font-size-complex="0.32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0.4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7">
      <style:graphic-properties draw:fill="solid" draw:fill-color="#79b79d" draw:opacity="27.843%" draw:stroke="none"/>
    </style:style>
    <style:style style:family="paragraph" style:name="a860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draw:fill="solid" draw:fill-color="#79b79d" draw:opacity="27.843%" draw:stroke="non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draw:fill="solid" draw:fill-color="#79b79d" draw:opacity="27.843%" draw:stroke="non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solid" draw:fill-color="#ffffff" draw:opacity="100%" draw:stroke="non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0.4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8175in" style:font-size-asian="0.8175in" style:font-size-complex="0.8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8175in" style:font-size-asian="0.8175in" style:font-size-complex="0.8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0.8826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8175in" style:font-size-asian="0.8175in" style:font-size-complex="0.8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draw:fill="solid" draw:fill-color="#79b79d" draw:opacity="27.843%" draw:stroke="none"/>
    </style:style>
    <style:style style:family="graphic" style:name="a1081">
      <style:graphic-properties draw:fill="solid" draw:fill-color="#79b79d" draw:opacity="27.843%" draw:stroke="none"/>
    </style:style>
    <style:style style:family="drawing-page" style:name="a1082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 Bold" style:font-family-asian="Codec Pro Bold" style:font-family-complex="Codec Pro Bold" fo:font-size="0.67208in" style:font-size-asian="0.67208in" style:font-size-complex="0.67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0.9409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1014in" style:font-size-asian="0.21014in" style:font-size-complex="0.21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0.8826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8175in" style:font-size-asian="0.8175in" style:font-size-complex="0.8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0.8826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 Bold" style:font-family-asian="Codec Pro Bold" style:font-family-complex="Codec Pro Bold" fo:font-size="0.50861in" style:font-size-asian="0.50861in" style:font-size-complex="0.50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0.711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 Bold" style:font-family-asian="Codec Pro Bold" style:font-family-complex="Codec Pro Bold" fo:font-size="0.50861in" style:font-size-asian="0.50861in" style:font-size-complex="0.50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0.711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861in" style:font-size-asian="0.50861in" style:font-size-complex="0.50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0.71181in" fo:text-align="left" style:tab-stop-distance="1in" fo:margin-left="0.86471in" fo:margin-right="0in" fo:text-indent="-0.432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 Bold" style:font-family-asian="Codec Pro Bold" style:font-family-complex="Codec Pro Bold" fo:font-size="0.50861in" style:font-size-asian="0.50861in" style:font-size-complex="0.50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0.711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861in" style:font-size-asian="0.50861in" style:font-size-complex="0.50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0.71181in" fo:text-align="left" style:tab-stop-distance="1in" fo:margin-left="0.86471in" fo:margin-right="0in" fo:text-indent="-0.432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861in" style:font-size-asian="0.50861in" style:font-size-complex="0.50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0.71181in" fo:text-align="left" style:tab-stop-distance="1in" fo:margin-left="0.86471in" fo:margin-right="0in" fo:text-indent="-0.432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861in" style:font-size-asian="0.50861in" style:font-size-complex="0.50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0.278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0.71181in" fo:text-align="left" style:tab-stop-distance="1in" fo:margin-left="0.86471in" fo:margin-right="0in" fo:text-indent="-0.432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861in" style:font-size-asian="0.50861in" style:font-size-complex="0.50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0.711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861in" style:font-size-asian="0.50861in" style:font-size-complex="0.50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0.711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9">
      <style:graphic-properties draw:fill="bitmap" draw:fill-image-name="a588" style:repeat="stretch" draw:stroke="none"/>
    </style:style>
    <style:style style:family="graphic" style:name="a591">
      <style:graphic-properties draw:fill="bitmap" draw:fill-image-name="a590" style:repeat="stretch" draw:stroke="none"/>
    </style:style>
    <style:style style:family="graphic" style:name="a592">
      <style:graphic-properties draw:fill="solid" draw:fill-color="#79b79d" draw:opacity="27.843%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6">
      <style:graphic-properties draw:fill="solid" draw:fill-color="#79b79d" draw:opacity="27.843%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7375in" style:font-size-asian="0.27375in" style:font-size-complex="0.27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0.3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 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8">
      <style:graphic-properties draw:fill="solid" draw:fill-color="#79b79d" draw:opacity="27.843%" draw:stroke="none"/>
    </style:style>
    <style:style style:family="graphic" style:name="a1219">
      <style:graphic-properties draw:fill="solid" draw:fill-color="#79b79d" draw:opacity="27.843%" draw:stroke="none"/>
    </style:style>
    <style:style style:family="graphic" style:name="a1220">
      <style:graphic-properties draw:fill="solid" draw:fill-color="#79b79d" draw:opacity="27.843%" draw:stroke="none"/>
    </style:style>
    <style:style style:family="graphic" style:name="a1221">
      <style:graphic-properties draw:fill="solid" draw:fill-color="#79b79d" draw:opacity="27.843%" draw:stroke="none"/>
    </style:style>
    <style:style style:family="graphic" style:name="a1222">
      <style:graphic-properties draw:fill="solid" draw:fill-color="#ffffff" draw:opacity="100%" draw:stroke="solid" svg:stroke-width="0.02778in" svg:stroke-color="#4f81bd" svg:stroke-opacity="100%" svg:stroke-linecap="butt"/>
    </style:style>
    <style:style style:family="graphic" style:name="a1223">
      <style:graphic-properties draw:fill="solid" draw:fill-color="#79b79d" draw:opacity="27.843%" draw:stroke="none"/>
    </style:style>
    <style:style style:family="graphic" style:name="a1224">
      <style:graphic-properties draw:fill="solid" draw:fill-color="#79b79d" draw:opacity="27.843%" draw:stroke="none"/>
    </style:style>
    <style:style style:family="graphic" style:name="a1225">
      <style:graphic-properties draw:fill="solid" draw:fill-color="#79b79d" draw:opacity="27.843%" draw:stroke="none"/>
    </style:style>
    <style:style style:family="graphic" style:name="a1226">
      <style:graphic-properties draw:fill="solid" draw:fill-color="#79b79d" draw:opacity="27.843%" draw:stroke="none"/>
    </style:style>
    <style:style style:family="drawing-page" style:name="a1227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9">
      <style:graphic-properties draw:fill="bitmap" draw:fill-image-name="a1228" style:repeat="stretch" draw:stroke="non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60486in" style:font-size-asian="0.60486in" style:font-size-complex="0.60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0.8465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60486in" style:font-size-asian="0.60486in" style:font-size-complex="0.60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0.84653in" fo:text-align="left" style:tab-stop-distance="1in" fo:margin-left="1.02842in" fo:margin-right="0in" fo:text-indent="-0.5142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60486in" style:font-size-asian="0.60486in" style:font-size-complex="0.60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0.84653in" fo:text-align="left" style:tab-stop-distance="1in" fo:margin-left="1.02842in" fo:margin-right="0in" fo:text-indent="-0.5142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60486in" style:font-size-asian="0.60486in" style:font-size-complex="0.60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0.84653in" fo:text-align="left" style:tab-stop-distance="1in" fo:margin-left="1.02842in" fo:margin-right="0in" fo:text-indent="-0.5142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draw:fill="bitmap" draw:fill-image-name="a1230" style:repeat="stretch" draw:stroke="non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67444in" style:font-size-asian="0.67444in" style:font-size-complex="0.67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0.6270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0.70764in" fo:text-align="left" style:tab-stop-distance="1in" fo:margin-left="0.85902in" fo:margin-right="0in" fo:text-indent="-0.4295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0.70764in" fo:text-align="left" style:tab-stop-distance="1in" fo:margin-left="0.85902in" fo:margin-right="0in" fo:text-indent="-0.4295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60486in" style:font-size-asian="0.60486in" style:font-size-complex="0.60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0.8465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4194in" style:font-size-asian="0.44194in" style:font-size-complex="0.44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0.6187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4194in" style:font-size-asian="0.44194in" style:font-size-complex="0.44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0.61875in" fo:text-align="justify" fo:text-align-last="start" style:tab-stop-distance="1in" fo:margin-left="0.7515in" fo:margin-right="0in" fo:text-indent="-0.375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0.5145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0.70764in" fo:text-align="left" style:tab-stop-distance="1in" fo:margin-left="0.85902in" fo:margin-right="0in" fo:text-indent="-0.4295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>
      <style:graphic-properties draw:fill="solid" draw:fill-color="#79b79d" draw:opacity="27.843%" draw:stroke="non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0.70764in" fo:text-align="left" style:tab-stop-distance="1in" fo:margin-left="0.85902in" fo:margin-right="0in" fo:text-indent="-0.4295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8">
      <style:paragraph-properties fo:line-height="0.70764in" fo:text-align="left" style:tab-stop-distance="1in" fo:margin-left="0.85902in" fo:margin-right="0in" fo:text-indent="-0.4295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bitmap" draw:fill-image-name="a407" style:repeat="stretch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4194in" style:font-size-asian="0.44194in" style:font-size-complex="0.44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0.61875in" fo:text-align="justify" fo:text-align-last="start" style:tab-stop-distance="1in" fo:margin-left="0.7515in" fo:margin-right="0in" fo:text-indent="-0.375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4194in" style:font-size-asian="0.44194in" style:font-size-complex="0.44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0.61875in" fo:text-align="justify" fo:text-align-last="start" style:tab-stop-distance="1in" fo:margin-left="0.7515in" fo:margin-right="0in" fo:text-indent="-0.375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4194in" style:font-size-asian="0.44194in" style:font-size-complex="0.44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0.6187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4194in" style:font-size-asian="0.44194in" style:font-size-complex="0.44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0.61875in" fo:text-align="justify" fo:text-align-last="start" style:tab-stop-distance="1in" fo:margin-left="0.7515in" fo:margin-right="0in" fo:text-indent="-0.375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0.7076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bitmap" draw:fill-image-name="a409" style:repeat="stretch" draw:stroke="none"/>
    </style:style>
    <style:style style:family="graphic" style:name="a1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1.08569in" style:font-size-asian="1.08569in" style:font-size-complex="1.08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.0097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draw:fill="bitmap" draw:fill-image-name="a1253" style:repeat="stretch" draw:stroke="none"/>
    </style:style>
    <style:style style:family="graphic" style:name="a4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43597in" style:font-size-asian="0.43597in" style:font-size-complex="0.43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6">
      <style:graphic-properties draw:fill="bitmap" draw:fill-image-name="a1255" style:repeat="stretch" draw:stroke="none"/>
    </style:style>
    <style:style style:family="paragraph" style:name="a415">
      <style:paragraph-properties fo:line-height="0.82847in" fo:text-align="left" style:tab-stop-distance="1in" fo:margin-left="0.74126in" fo:margin-right="0in" fo:text-indent="-0.3706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9208in" style:font-size-asian="0.49208in" style:font-size-complex="0.49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0.68889in" fo:text-align="left" style:tab-stop-distance="1in" fo:margin-left="0.8367in" fo:margin-right="0in" fo:text-indent="-0.418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43597in" style:font-size-asian="0.43597in" style:font-size-complex="0.43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0.82847in" fo:text-align="left" style:tab-stop-distance="1in" fo:margin-left="0.74126in" fo:margin-right="0in" fo:text-indent="-0.3706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4194in" style:font-size-asian="0.44194in" style:font-size-complex="0.44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0.61875in" fo:text-align="justify" fo:text-align-last="start" style:tab-stop-distance="1in" fo:margin-left="0.7515in" fo:margin-right="0in" fo:text-indent="-0.375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4194in" style:font-size-asian="0.44194in" style:font-size-complex="0.44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0.61875in" fo:text-align="justify" fo:text-align-last="start" style:tab-stop-distance="1in" fo:margin-left="0.7515in" fo:margin-right="0in" fo:text-indent="-0.375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4194in" style:font-size-asian="0.44194in" style:font-size-complex="0.44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0.6187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9208in" style:font-size-asian="0.49208in" style:font-size-complex="0.49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0.68889in" fo:text-align="left" style:tab-stop-distance="1in" fo:margin-left="0.8367in" fo:margin-right="0in" fo:text-indent="-0.418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43597in" style:font-size-asian="0.43597in" style:font-size-complex="0.43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0.82847in" fo:text-align="left" style:tab-stop-distance="1in" fo:margin-left="0.74126in" fo:margin-right="0in" fo:text-indent="-0.3706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9208in" style:font-size-asian="0.49208in" style:font-size-complex="0.49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0.68889in" fo:text-align="left" style:tab-stop-distance="1in" fo:margin-left="0.8367in" fo:margin-right="0in" fo:text-indent="-0.418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43597in" style:font-size-asian="0.43597in" style:font-size-complex="0.43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0.82847in" fo:text-align="left" style:tab-stop-distance="1in" fo:margin-left="0.74126in" fo:margin-right="0in" fo:text-indent="-0.3706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9208in" style:font-size-asian="0.49208in" style:font-size-complex="0.49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0.68889in" fo:text-align="left" style:tab-stop-distance="1in" fo:margin-left="0.8367in" fo:margin-right="0in" fo:text-indent="-0.418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43597in" style:font-size-asian="0.43597in" style:font-size-complex="0.43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0.82847in" fo:text-align="left" style:tab-stop-distance="1in" fo:margin-left="0.74126in" fo:margin-right="0in" fo:text-indent="-0.3706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49208in" style:font-size-asian="0.49208in" style:font-size-complex="0.49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43597in" style:font-size-asian="0.43597in" style:font-size-complex="0.43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1">
      <style:graphic-properties draw:fill="solid" draw:fill-color="#79b79d" draw:opacity="27.843%" draw:stroke="non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5">
      <style:graphic-properties draw:fill="solid" draw:fill-color="#79b79d" draw:opacity="27.843%" draw:stroke="non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0.2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9">
      <style:graphic-properties draw:fill="solid" draw:fill-color="#d5e4dd" draw:opacity="100%" draw:stroke="none"/>
    </style:style>
    <style:style style:family="paragraph" style:name="a1270">
      <style:paragraph-properties fo:line-height="0.6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0">
      <style:paragraph-properties fo:line-height="0.82847in" fo:text-align="left" style:tab-stop-distance="1in" fo:margin-left="0.74126in" fo:margin-right="0in" fo:text-indent="-0.3706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74722in" style:font-size-asian="0.74722in" style:font-size-complex="0.7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3">
      <style:paragraph-properties fo:line-height="0.6951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43597in" style:font-size-asian="0.43597in" style:font-size-complex="0.43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3">
      <style:paragraph-properties fo:line-height="1.0256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 Bold" style:font-family-asian="Fraunces Bold" style:font-family-complex="Fraunces Bold" fo:font-size="0.88875in" style:font-size-asian="0.88875in" style:font-size-complex="0.88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46653in" style:font-size-asian="0.46653in" style:font-size-complex="0.46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0.9597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0.88611in" fo:text-align="left" style:tab-stop-distance="1in" fo:margin-left="0.7932in" fo:margin-right="0in" fo:text-indent="-0.39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222in" style:font-size-asian="0.50222in" style:font-size-complex="0.50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46653in" style:font-size-asian="0.46653in" style:font-size-complex="0.46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0.88611in" fo:text-align="left" style:tab-stop-distance="1in" fo:margin-left="0.7932in" fo:margin-right="0in" fo:text-indent="-0.39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0.4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draw:fill="solid" draw:fill-color="#d5e4dd" draw:opacity="100%" draw:stroke="non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0.4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0.70347in" fo:text-align="left" style:tab-stop-distance="1in" fo:margin-left="0.85401in" fo:margin-right="0in" fo:text-indent="-0.4270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222in" style:font-size-asian="0.50222in" style:font-size-complex="0.50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46653in" style:font-size-asian="0.46653in" style:font-size-complex="0.46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0.70347in" fo:text-align="left" style:tab-stop-distance="1in" fo:margin-left="0.85401in" fo:margin-right="0in" fo:text-indent="-0.4270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0.88611in" fo:text-align="left" style:tab-stop-distance="1in" fo:margin-left="0.7932in" fo:margin-right="0in" fo:text-indent="-0.39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222in" style:font-size-asian="0.50222in" style:font-size-complex="0.50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46653in" style:font-size-asian="0.46653in" style:font-size-complex="0.46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0.70347in" fo:text-align="left" style:tab-stop-distance="1in" fo:margin-left="0.85401in" fo:margin-right="0in" fo:text-indent="-0.4270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0.88611in" fo:text-align="left" style:tab-stop-distance="1in" fo:margin-left="0.7932in" fo:margin-right="0in" fo:text-indent="-0.39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222in" style:font-size-asian="0.50222in" style:font-size-complex="0.50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46653in" style:font-size-asian="0.46653in" style:font-size-complex="0.46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0.70347in" fo:text-align="left" style:tab-stop-distance="1in" fo:margin-left="0.85401in" fo:margin-right="0in" fo:text-indent="-0.4270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0.88611in" fo:text-align="left" style:tab-stop-distance="1in" fo:margin-left="0.7932in" fo:margin-right="0in" fo:text-indent="-0.39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0.2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222in" style:font-size-asian="0.50222in" style:font-size-complex="0.50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46653in" style:font-size-asian="0.46653in" style:font-size-complex="0.46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0.70347in" fo:text-align="left" style:tab-stop-distance="1in" fo:margin-left="0.85401in" fo:margin-right="0in" fo:text-indent="-0.4270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0.88611in" fo:text-align="left" style:tab-stop-distance="1in" fo:margin-left="0.7932in" fo:margin-right="0in" fo:text-indent="-0.39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dec Pro" style:font-family-asian="Codec Pro" style:font-family-complex="Codec Pro" fo:font-size="0.50222in" style:font-size-asian="0.50222in" style:font-size-complex="0.50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46653in" style:font-size-asian="0.46653in" style:font-size-complex="0.46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0.7034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0.886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unces" style:font-family-asian="Fraunces" style:font-family-complex="Fraunces" fo:font-size="0.46653in" style:font-size-asian="0.46653in" style:font-size-complex="0.46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0.886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draw:fill="bitmap" draw:fill-image-name="a1297" style:repeat="stretch" draw:stroke="non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8">
      <style:graphic-properties draw:fill="solid" draw:fill-color="#79b79d" draw:opacity="27.843%" draw:stroke="none"/>
    </style:style>
    <text:list-style style:name="a484">
      <text:list-level-style-bullet text:level="1" text:bullet-char="•">
        <style:list-level-properties text:space-before="0in" text:min-label-width="0.3576in"/>
        <style:text-properties fo:font-family="Arial" fo:font-size="100%"/>
      </text:list-level-style-bullet>
      <text:list-level-style-bullet text:level="2" text:bullet-char="•">
        <style:list-level-properties text:space-before="0.3576in" text:min-label-width="0.3576in"/>
        <style:text-properties fo:font-family="Arial" fo:font-size="100%"/>
      </text:list-level-style-bullet>
      <text:list-level-style-bullet text:level="3" text:bullet-char="•">
        <style:list-level-properties text:space-before="0.8576in" text:min-label-width="0.3576in"/>
        <style:text-properties fo:font-family="Arial" fo:font-size="100%"/>
      </text:list-level-style-bullet>
      <text:list-level-style-bullet text:level="4" text:bullet-char="•">
        <style:list-level-properties text:space-before="1.3576in" text:min-label-width="0.3576in"/>
        <style:text-properties fo:font-family="Arial" fo:font-size="100%"/>
      </text:list-level-style-bullet>
      <text:list-level-style-bullet text:level="5" text:bullet-char="•">
        <style:list-level-properties text:space-before="1.8576in" text:min-label-width="0.3576in"/>
        <style:text-properties fo:font-family="Arial" fo:font-size="100%"/>
      </text:list-level-style-bullet>
      <text:list-level-style-bullet text:level="6" text:bullet-char="•">
        <style:list-level-properties text:space-before="2.3576in" text:min-label-width="0.3576in"/>
        <style:text-properties fo:font-family="Arial" fo:font-size="100%"/>
      </text:list-level-style-bullet>
      <text:list-level-style-bullet text:level="7" text:bullet-char="•">
        <style:list-level-properties text:space-before="2.8576in" text:min-label-width="0.3576in"/>
        <style:text-properties fo:font-family="Arial" fo:font-size="100%"/>
      </text:list-level-style-bullet>
      <text:list-level-style-bullet text:level="8" text:bullet-char="•">
        <style:list-level-properties text:space-before="3.3576in" text:min-label-width="0.3576in"/>
        <style:text-properties fo:font-family="Arial" fo:font-size="100%"/>
      </text:list-level-style-bullet>
      <text:list-level-style-bullet text:level="9" text:bullet-char="•">
        <style:list-level-properties text:space-before="3.8576in" text:min-label-width="0.3576in"/>
        <style:text-properties fo:font-family="Arial" fo:font-size="100%"/>
      </text:list-level-style-bullet>
    </text:list-style>
    <text:list-style style:name="a704">
      <text:list-level-style-bullet text:level="1" text:bullet-char="•">
        <style:list-level-properties text:space-before="0.01421in" text:min-label-width="0.51421in"/>
        <style:text-properties fo:font-family="Arial" fo:font-size="100%"/>
      </text:list-level-style-bullet>
      <text:list-level-style-bullet text:level="2" text:bullet-char="•">
        <style:list-level-properties text:space-before="0.51421in" text:min-label-width="0.51421in"/>
        <style:text-properties fo:font-family="Arial" fo:font-size="100%"/>
      </text:list-level-style-bullet>
      <text:list-level-style-bullet text:level="3" text:bullet-char="•">
        <style:list-level-properties text:space-before="1.01421in" text:min-label-width="0.51421in"/>
        <style:text-properties fo:font-family="Arial" fo:font-size="100%"/>
      </text:list-level-style-bullet>
      <text:list-level-style-bullet text:level="4" text:bullet-char="•">
        <style:list-level-properties text:space-before="1.51421in" text:min-label-width="0.51421in"/>
        <style:text-properties fo:font-family="Arial" fo:font-size="100%"/>
      </text:list-level-style-bullet>
      <text:list-level-style-bullet text:level="5" text:bullet-char="•">
        <style:list-level-properties text:space-before="2.01421in" text:min-label-width="0.51421in"/>
        <style:text-properties fo:font-family="Arial" fo:font-size="100%"/>
      </text:list-level-style-bullet>
      <text:list-level-style-bullet text:level="6" text:bullet-char="•">
        <style:list-level-properties text:space-before="2.51421in" text:min-label-width="0.51421in"/>
        <style:text-properties fo:font-family="Arial" fo:font-size="100%"/>
      </text:list-level-style-bullet>
      <text:list-level-style-bullet text:level="7" text:bullet-char="•">
        <style:list-level-properties text:space-before="3.01421in" text:min-label-width="0.51421in"/>
        <style:text-properties fo:font-family="Arial" fo:font-size="100%"/>
      </text:list-level-style-bullet>
      <text:list-level-style-bullet text:level="8" text:bullet-char="•">
        <style:list-level-properties text:space-before="3.51421in" text:min-label-width="0.51421in"/>
        <style:text-properties fo:font-family="Arial" fo:font-size="100%"/>
      </text:list-level-style-bullet>
      <text:list-level-style-bullet text:level="9" text:bullet-char="•">
        <style:list-level-properties text:space-before="4.01421in" text:min-label-width="0.51421in"/>
        <style:text-properties fo:font-family="Arial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48163in"/>
        <style:text-properties fo:font-family="Arial" fo:font-size="100%"/>
      </text:list-level-style-bullet>
      <text:list-level-style-bullet text:level="2" text:bullet-char="•">
        <style:list-level-properties text:space-before="0.48163in" text:min-label-width="0.48163in"/>
        <style:text-properties fo:font-family="Arial" fo:font-size="100%"/>
      </text:list-level-style-bullet>
      <text:list-level-style-bullet text:level="3" text:bullet-char="•">
        <style:list-level-properties text:space-before="0.98163in" text:min-label-width="0.48163in"/>
        <style:text-properties fo:font-family="Arial" fo:font-size="100%"/>
      </text:list-level-style-bullet>
      <text:list-level-style-bullet text:level="4" text:bullet-char="•">
        <style:list-level-properties text:space-before="1.48163in" text:min-label-width="0.48163in"/>
        <style:text-properties fo:font-family="Arial" fo:font-size="100%"/>
      </text:list-level-style-bullet>
      <text:list-level-style-bullet text:level="5" text:bullet-char="•">
        <style:list-level-properties text:space-before="1.98163in" text:min-label-width="0.48163in"/>
        <style:text-properties fo:font-family="Arial" fo:font-size="100%"/>
      </text:list-level-style-bullet>
      <text:list-level-style-bullet text:level="6" text:bullet-char="•">
        <style:list-level-properties text:space-before="2.48163in" text:min-label-width="0.48163in"/>
        <style:text-properties fo:font-family="Arial" fo:font-size="100%"/>
      </text:list-level-style-bullet>
      <text:list-level-style-bullet text:level="7" text:bullet-char="•">
        <style:list-level-properties text:space-before="2.98163in" text:min-label-width="0.48163in"/>
        <style:text-properties fo:font-family="Arial" fo:font-size="100%"/>
      </text:list-level-style-bullet>
      <text:list-level-style-bullet text:level="8" text:bullet-char="•">
        <style:list-level-properties text:space-before="3.48163in" text:min-label-width="0.48163in"/>
        <style:text-properties fo:font-family="Arial" fo:font-size="100%"/>
      </text:list-level-style-bullet>
      <text:list-level-style-bullet text:level="9" text:bullet-char="•">
        <style:list-level-properties text:space-before="3.98163in" text:min-label-width="0.48163in"/>
        <style:text-properties fo:font-family="Arial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576in"/>
        <style:text-properties fo:font-family="Arial" fo:font-size="100%"/>
      </text:list-level-style-bullet>
      <text:list-level-style-bullet text:level="2" text:bullet-char="•">
        <style:list-level-properties text:space-before="0.3576in" text:min-label-width="0.3576in"/>
        <style:text-properties fo:font-family="Arial" fo:font-size="100%"/>
      </text:list-level-style-bullet>
      <text:list-level-style-bullet text:level="3" text:bullet-char="•">
        <style:list-level-properties text:space-before="0.8576in" text:min-label-width="0.3576in"/>
        <style:text-properties fo:font-family="Arial" fo:font-size="100%"/>
      </text:list-level-style-bullet>
      <text:list-level-style-bullet text:level="4" text:bullet-char="•">
        <style:list-level-properties text:space-before="1.3576in" text:min-label-width="0.3576in"/>
        <style:text-properties fo:font-family="Arial" fo:font-size="100%"/>
      </text:list-level-style-bullet>
      <text:list-level-style-bullet text:level="5" text:bullet-char="•">
        <style:list-level-properties text:space-before="1.8576in" text:min-label-width="0.3576in"/>
        <style:text-properties fo:font-family="Arial" fo:font-size="100%"/>
      </text:list-level-style-bullet>
      <text:list-level-style-bullet text:level="6" text:bullet-char="•">
        <style:list-level-properties text:space-before="2.3576in" text:min-label-width="0.3576in"/>
        <style:text-properties fo:font-family="Arial" fo:font-size="100%"/>
      </text:list-level-style-bullet>
      <text:list-level-style-bullet text:level="7" text:bullet-char="•">
        <style:list-level-properties text:space-before="2.8576in" text:min-label-width="0.3576in"/>
        <style:text-properties fo:font-family="Arial" fo:font-size="100%"/>
      </text:list-level-style-bullet>
      <text:list-level-style-bullet text:level="8" text:bullet-char="•">
        <style:list-level-properties text:space-before="3.3576in" text:min-label-width="0.3576in"/>
        <style:text-properties fo:font-family="Arial" fo:font-size="100%"/>
      </text:list-level-style-bullet>
      <text:list-level-style-bullet text:level="9" text:bullet-char="•">
        <style:list-level-properties text:space-before="3.8576in" text:min-label-width="0.3576in"/>
        <style:text-properties fo:font-family="Arial" fo:font-size="100%"/>
      </text:list-level-style-bullet>
    </text:list-style>
    <text:list-style style:name="a707">
      <text:list-level-style-bullet text:level="1" text:bullet-char="•">
        <style:list-level-properties text:space-before="0.01421in" text:min-label-width="0.51421in"/>
        <style:text-properties fo:font-family="Arial" fo:font-size="100%"/>
      </text:list-level-style-bullet>
      <text:list-level-style-bullet text:level="2" text:bullet-char="•">
        <style:list-level-properties text:space-before="0.51421in" text:min-label-width="0.51421in"/>
        <style:text-properties fo:font-family="Arial" fo:font-size="100%"/>
      </text:list-level-style-bullet>
      <text:list-level-style-bullet text:level="3" text:bullet-char="•">
        <style:list-level-properties text:space-before="1.01421in" text:min-label-width="0.51421in"/>
        <style:text-properties fo:font-family="Arial" fo:font-size="100%"/>
      </text:list-level-style-bullet>
      <text:list-level-style-bullet text:level="4" text:bullet-char="•">
        <style:list-level-properties text:space-before="1.51421in" text:min-label-width="0.51421in"/>
        <style:text-properties fo:font-family="Arial" fo:font-size="100%"/>
      </text:list-level-style-bullet>
      <text:list-level-style-bullet text:level="5" text:bullet-char="•">
        <style:list-level-properties text:space-before="2.01421in" text:min-label-width="0.51421in"/>
        <style:text-properties fo:font-family="Arial" fo:font-size="100%"/>
      </text:list-level-style-bullet>
      <text:list-level-style-bullet text:level="6" text:bullet-char="•">
        <style:list-level-properties text:space-before="2.51421in" text:min-label-width="0.51421in"/>
        <style:text-properties fo:font-family="Arial" fo:font-size="100%"/>
      </text:list-level-style-bullet>
      <text:list-level-style-bullet text:level="7" text:bullet-char="•">
        <style:list-level-properties text:space-before="3.01421in" text:min-label-width="0.51421in"/>
        <style:text-properties fo:font-family="Arial" fo:font-size="100%"/>
      </text:list-level-style-bullet>
      <text:list-level-style-bullet text:level="8" text:bullet-char="•">
        <style:list-level-properties text:space-before="3.51421in" text:min-label-width="0.51421in"/>
        <style:text-properties fo:font-family="Arial" fo:font-size="100%"/>
      </text:list-level-style-bullet>
      <text:list-level-style-bullet text:level="9" text:bullet-char="•">
        <style:list-level-properties text:space-before="4.01421in" text:min-label-width="0.51421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48163in"/>
        <style:text-properties fo:font-family="Arial" fo:font-size="100%"/>
      </text:list-level-style-bullet>
      <text:list-level-style-bullet text:level="2" text:bullet-char="•">
        <style:list-level-properties text:space-before="0.48163in" text:min-label-width="0.48163in"/>
        <style:text-properties fo:font-family="Arial" fo:font-size="100%"/>
      </text:list-level-style-bullet>
      <text:list-level-style-bullet text:level="3" text:bullet-char="•">
        <style:list-level-properties text:space-before="0.98163in" text:min-label-width="0.48163in"/>
        <style:text-properties fo:font-family="Arial" fo:font-size="100%"/>
      </text:list-level-style-bullet>
      <text:list-level-style-bullet text:level="4" text:bullet-char="•">
        <style:list-level-properties text:space-before="1.48163in" text:min-label-width="0.48163in"/>
        <style:text-properties fo:font-family="Arial" fo:font-size="100%"/>
      </text:list-level-style-bullet>
      <text:list-level-style-bullet text:level="5" text:bullet-char="•">
        <style:list-level-properties text:space-before="1.98163in" text:min-label-width="0.48163in"/>
        <style:text-properties fo:font-family="Arial" fo:font-size="100%"/>
      </text:list-level-style-bullet>
      <text:list-level-style-bullet text:level="6" text:bullet-char="•">
        <style:list-level-properties text:space-before="2.48163in" text:min-label-width="0.48163in"/>
        <style:text-properties fo:font-family="Arial" fo:font-size="100%"/>
      </text:list-level-style-bullet>
      <text:list-level-style-bullet text:level="7" text:bullet-char="•">
        <style:list-level-properties text:space-before="2.98163in" text:min-label-width="0.48163in"/>
        <style:text-properties fo:font-family="Arial" fo:font-size="100%"/>
      </text:list-level-style-bullet>
      <text:list-level-style-bullet text:level="8" text:bullet-char="•">
        <style:list-level-properties text:space-before="3.48163in" text:min-label-width="0.48163in"/>
        <style:text-properties fo:font-family="Arial" fo:font-size="100%"/>
      </text:list-level-style-bullet>
      <text:list-level-style-bullet text:level="9" text:bullet-char="•">
        <style:list-level-properties text:space-before="3.98163in" text:min-label-width="0.48163in"/>
        <style:text-properties fo:font-family="Arial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42951in"/>
        <style:text-properties fo:font-family="Arial" fo:font-size="100%"/>
      </text:list-level-style-bullet>
      <text:list-level-style-bullet text:level="2" text:bullet-char="•">
        <style:list-level-properties text:space-before="0.42951in" text:min-label-width="0.42951in"/>
        <style:text-properties fo:font-family="Arial" fo:font-size="100%"/>
      </text:list-level-style-bullet>
      <text:list-level-style-bullet text:level="3" text:bullet-char="•">
        <style:list-level-properties text:space-before="0.92951in" text:min-label-width="0.42951in"/>
        <style:text-properties fo:font-family="Arial" fo:font-size="100%"/>
      </text:list-level-style-bullet>
      <text:list-level-style-bullet text:level="4" text:bullet-char="•">
        <style:list-level-properties text:space-before="1.42951in" text:min-label-width="0.42951in"/>
        <style:text-properties fo:font-family="Arial" fo:font-size="100%"/>
      </text:list-level-style-bullet>
      <text:list-level-style-bullet text:level="5" text:bullet-char="•">
        <style:list-level-properties text:space-before="1.92951in" text:min-label-width="0.42951in"/>
        <style:text-properties fo:font-family="Arial" fo:font-size="100%"/>
      </text:list-level-style-bullet>
      <text:list-level-style-bullet text:level="6" text:bullet-char="•">
        <style:list-level-properties text:space-before="2.42951in" text:min-label-width="0.42951in"/>
        <style:text-properties fo:font-family="Arial" fo:font-size="100%"/>
      </text:list-level-style-bullet>
      <text:list-level-style-bullet text:level="7" text:bullet-char="•">
        <style:list-level-properties text:space-before="2.92951in" text:min-label-width="0.42951in"/>
        <style:text-properties fo:font-family="Arial" fo:font-size="100%"/>
      </text:list-level-style-bullet>
      <text:list-level-style-bullet text:level="8" text:bullet-char="•">
        <style:list-level-properties text:space-before="3.42951in" text:min-label-width="0.42951in"/>
        <style:text-properties fo:font-family="Arial" fo:font-size="100%"/>
      </text:list-level-style-bullet>
      <text:list-level-style-bullet text:level="9" text:bullet-char="•">
        <style:list-level-properties text:space-before="3.92951in" text:min-label-width="0.42951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48163in"/>
        <style:text-properties fo:font-family="Arial" fo:font-size="100%"/>
      </text:list-level-style-bullet>
      <text:list-level-style-bullet text:level="2" text:bullet-char="•">
        <style:list-level-properties text:space-before="0.48163in" text:min-label-width="0.48163in"/>
        <style:text-properties fo:font-family="Arial" fo:font-size="100%"/>
      </text:list-level-style-bullet>
      <text:list-level-style-bullet text:level="3" text:bullet-char="•">
        <style:list-level-properties text:space-before="0.98163in" text:min-label-width="0.48163in"/>
        <style:text-properties fo:font-family="Arial" fo:font-size="100%"/>
      </text:list-level-style-bullet>
      <text:list-level-style-bullet text:level="4" text:bullet-char="•">
        <style:list-level-properties text:space-before="1.48163in" text:min-label-width="0.48163in"/>
        <style:text-properties fo:font-family="Arial" fo:font-size="100%"/>
      </text:list-level-style-bullet>
      <text:list-level-style-bullet text:level="5" text:bullet-char="•">
        <style:list-level-properties text:space-before="1.98163in" text:min-label-width="0.48163in"/>
        <style:text-properties fo:font-family="Arial" fo:font-size="100%"/>
      </text:list-level-style-bullet>
      <text:list-level-style-bullet text:level="6" text:bullet-char="•">
        <style:list-level-properties text:space-before="2.48163in" text:min-label-width="0.48163in"/>
        <style:text-properties fo:font-family="Arial" fo:font-size="100%"/>
      </text:list-level-style-bullet>
      <text:list-level-style-bullet text:level="7" text:bullet-char="•">
        <style:list-level-properties text:space-before="2.98163in" text:min-label-width="0.48163in"/>
        <style:text-properties fo:font-family="Arial" fo:font-size="100%"/>
      </text:list-level-style-bullet>
      <text:list-level-style-bullet text:level="8" text:bullet-char="•">
        <style:list-level-properties text:space-before="3.48163in" text:min-label-width="0.48163in"/>
        <style:text-properties fo:font-family="Arial" fo:font-size="100%"/>
      </text:list-level-style-bullet>
      <text:list-level-style-bullet text:level="9" text:bullet-char="•">
        <style:list-level-properties text:space-before="3.98163in" text:min-label-width="0.48163in"/>
        <style:text-properties fo:font-family="Arial" fo:font-size="100%"/>
      </text:list-level-style-bullet>
    </text:list-style>
    <text:list-style style:name="a1281">
      <text:list-level-style-bullet text:level="1" text:bullet-char="•">
        <style:list-level-properties text:space-before="0in" text:min-label-width="0.42701in"/>
        <style:text-properties fo:font-family="Arial" fo:font-size="100%"/>
      </text:list-level-style-bullet>
      <text:list-level-style-bullet text:level="2" text:bullet-char="•">
        <style:list-level-properties text:space-before="0.427in" text:min-label-width="0.42701in"/>
        <style:text-properties fo:font-family="Arial" fo:font-size="100%"/>
      </text:list-level-style-bullet>
      <text:list-level-style-bullet text:level="3" text:bullet-char="•">
        <style:list-level-properties text:space-before="0.927in" text:min-label-width="0.42701in"/>
        <style:text-properties fo:font-family="Arial" fo:font-size="100%"/>
      </text:list-level-style-bullet>
      <text:list-level-style-bullet text:level="4" text:bullet-char="•">
        <style:list-level-properties text:space-before="1.427in" text:min-label-width="0.42701in"/>
        <style:text-properties fo:font-family="Arial" fo:font-size="100%"/>
      </text:list-level-style-bullet>
      <text:list-level-style-bullet text:level="5" text:bullet-char="•">
        <style:list-level-properties text:space-before="1.927in" text:min-label-width="0.42701in"/>
        <style:text-properties fo:font-family="Arial" fo:font-size="100%"/>
      </text:list-level-style-bullet>
      <text:list-level-style-bullet text:level="6" text:bullet-char="•">
        <style:list-level-properties text:space-before="2.427in" text:min-label-width="0.42701in"/>
        <style:text-properties fo:font-family="Arial" fo:font-size="100%"/>
      </text:list-level-style-bullet>
      <text:list-level-style-bullet text:level="7" text:bullet-char="•">
        <style:list-level-properties text:space-before="2.927in" text:min-label-width="0.42701in"/>
        <style:text-properties fo:font-family="Arial" fo:font-size="100%"/>
      </text:list-level-style-bullet>
      <text:list-level-style-bullet text:level="8" text:bullet-char="•">
        <style:list-level-properties text:space-before="3.427in" text:min-label-width="0.42701in"/>
        <style:text-properties fo:font-family="Arial" fo:font-size="100%"/>
      </text:list-level-style-bullet>
      <text:list-level-style-bullet text:level="9" text:bullet-char="•">
        <style:list-level-properties text:space-before="3.927in" text:min-label-width="0.42701in"/>
        <style:text-properties fo:font-family="Arial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37063in"/>
        <style:text-properties fo:font-family="Arial" fo:font-size="100%"/>
      </text:list-level-style-bullet>
      <text:list-level-style-bullet text:level="2" text:bullet-char="•">
        <style:list-level-properties text:space-before="0.37063in" text:min-label-width="0.37063in"/>
        <style:text-properties fo:font-family="Arial" fo:font-size="100%"/>
      </text:list-level-style-bullet>
      <text:list-level-style-bullet text:level="3" text:bullet-char="•">
        <style:list-level-properties text:space-before="0.87063in" text:min-label-width="0.37063in"/>
        <style:text-properties fo:font-family="Arial" fo:font-size="100%"/>
      </text:list-level-style-bullet>
      <text:list-level-style-bullet text:level="4" text:bullet-char="•">
        <style:list-level-properties text:space-before="1.37063in" text:min-label-width="0.37063in"/>
        <style:text-properties fo:font-family="Arial" fo:font-size="100%"/>
      </text:list-level-style-bullet>
      <text:list-level-style-bullet text:level="5" text:bullet-char="•">
        <style:list-level-properties text:space-before="1.87063in" text:min-label-width="0.37063in"/>
        <style:text-properties fo:font-family="Arial" fo:font-size="100%"/>
      </text:list-level-style-bullet>
      <text:list-level-style-bullet text:level="6" text:bullet-char="•">
        <style:list-level-properties text:space-before="2.37063in" text:min-label-width="0.37063in"/>
        <style:text-properties fo:font-family="Arial" fo:font-size="100%"/>
      </text:list-level-style-bullet>
      <text:list-level-style-bullet text:level="7" text:bullet-char="•">
        <style:list-level-properties text:space-before="2.87063in" text:min-label-width="0.37063in"/>
        <style:text-properties fo:font-family="Arial" fo:font-size="100%"/>
      </text:list-level-style-bullet>
      <text:list-level-style-bullet text:level="8" text:bullet-char="•">
        <style:list-level-properties text:space-before="3.37063in" text:min-label-width="0.37063in"/>
        <style:text-properties fo:font-family="Arial" fo:font-size="100%"/>
      </text:list-level-style-bullet>
      <text:list-level-style-bullet text:level="9" text:bullet-char="•">
        <style:list-level-properties text:space-before="3.87063in" text:min-label-width="0.37063in"/>
        <style:text-properties fo:font-family="Arial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7063in"/>
        <style:text-properties fo:font-family="Arial" fo:font-size="100%"/>
      </text:list-level-style-bullet>
      <text:list-level-style-bullet text:level="2" text:bullet-char="•">
        <style:list-level-properties text:space-before="0.37063in" text:min-label-width="0.37063in"/>
        <style:text-properties fo:font-family="Arial" fo:font-size="100%"/>
      </text:list-level-style-bullet>
      <text:list-level-style-bullet text:level="3" text:bullet-char="•">
        <style:list-level-properties text:space-before="0.87063in" text:min-label-width="0.37063in"/>
        <style:text-properties fo:font-family="Arial" fo:font-size="100%"/>
      </text:list-level-style-bullet>
      <text:list-level-style-bullet text:level="4" text:bullet-char="•">
        <style:list-level-properties text:space-before="1.37063in" text:min-label-width="0.37063in"/>
        <style:text-properties fo:font-family="Arial" fo:font-size="100%"/>
      </text:list-level-style-bullet>
      <text:list-level-style-bullet text:level="5" text:bullet-char="•">
        <style:list-level-properties text:space-before="1.87063in" text:min-label-width="0.37063in"/>
        <style:text-properties fo:font-family="Arial" fo:font-size="100%"/>
      </text:list-level-style-bullet>
      <text:list-level-style-bullet text:level="6" text:bullet-char="•">
        <style:list-level-properties text:space-before="2.37063in" text:min-label-width="0.37063in"/>
        <style:text-properties fo:font-family="Arial" fo:font-size="100%"/>
      </text:list-level-style-bullet>
      <text:list-level-style-bullet text:level="7" text:bullet-char="•">
        <style:list-level-properties text:space-before="2.87063in" text:min-label-width="0.37063in"/>
        <style:text-properties fo:font-family="Arial" fo:font-size="100%"/>
      </text:list-level-style-bullet>
      <text:list-level-style-bullet text:level="8" text:bullet-char="•">
        <style:list-level-properties text:space-before="3.37063in" text:min-label-width="0.37063in"/>
        <style:text-properties fo:font-family="Arial" fo:font-size="100%"/>
      </text:list-level-style-bullet>
      <text:list-level-style-bullet text:level="9" text:bullet-char="•">
        <style:list-level-properties text:space-before="3.87063in" text:min-label-width="0.37063in"/>
        <style:text-properties fo:font-family="Arial" fo:font-size="100%"/>
      </text:list-level-style-bullet>
    </text:list-style>
    <text:list-style style:name="a1284">
      <text:list-level-style-bullet text:level="1" text:bullet-char="•">
        <style:list-level-properties text:space-before="0in" text:min-label-width="0.42701in"/>
        <style:text-properties fo:font-family="Arial" fo:font-size="100%"/>
      </text:list-level-style-bullet>
      <text:list-level-style-bullet text:level="2" text:bullet-char="•">
        <style:list-level-properties text:space-before="0.427in" text:min-label-width="0.42701in"/>
        <style:text-properties fo:font-family="Arial" fo:font-size="100%"/>
      </text:list-level-style-bullet>
      <text:list-level-style-bullet text:level="3" text:bullet-char="•">
        <style:list-level-properties text:space-before="0.927in" text:min-label-width="0.42701in"/>
        <style:text-properties fo:font-family="Arial" fo:font-size="100%"/>
      </text:list-level-style-bullet>
      <text:list-level-style-bullet text:level="4" text:bullet-char="•">
        <style:list-level-properties text:space-before="1.427in" text:min-label-width="0.42701in"/>
        <style:text-properties fo:font-family="Arial" fo:font-size="100%"/>
      </text:list-level-style-bullet>
      <text:list-level-style-bullet text:level="5" text:bullet-char="•">
        <style:list-level-properties text:space-before="1.927in" text:min-label-width="0.42701in"/>
        <style:text-properties fo:font-family="Arial" fo:font-size="100%"/>
      </text:list-level-style-bullet>
      <text:list-level-style-bullet text:level="6" text:bullet-char="•">
        <style:list-level-properties text:space-before="2.427in" text:min-label-width="0.42701in"/>
        <style:text-properties fo:font-family="Arial" fo:font-size="100%"/>
      </text:list-level-style-bullet>
      <text:list-level-style-bullet text:level="7" text:bullet-char="•">
        <style:list-level-properties text:space-before="2.927in" text:min-label-width="0.42701in"/>
        <style:text-properties fo:font-family="Arial" fo:font-size="100%"/>
      </text:list-level-style-bullet>
      <text:list-level-style-bullet text:level="8" text:bullet-char="•">
        <style:list-level-properties text:space-before="3.427in" text:min-label-width="0.42701in"/>
        <style:text-properties fo:font-family="Arial" fo:font-size="100%"/>
      </text:list-level-style-bullet>
      <text:list-level-style-bullet text:level="9" text:bullet-char="•">
        <style:list-level-properties text:space-before="3.927in" text:min-label-width="0.42701in"/>
        <style:text-properties fo:font-family="Arial"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42701in"/>
        <style:text-properties fo:font-family="Arial" fo:font-size="100%"/>
      </text:list-level-style-bullet>
      <text:list-level-style-bullet text:level="2" text:bullet-char="•">
        <style:list-level-properties text:space-before="0.427in" text:min-label-width="0.42701in"/>
        <style:text-properties fo:font-family="Arial" fo:font-size="100%"/>
      </text:list-level-style-bullet>
      <text:list-level-style-bullet text:level="3" text:bullet-char="•">
        <style:list-level-properties text:space-before="0.927in" text:min-label-width="0.42701in"/>
        <style:text-properties fo:font-family="Arial" fo:font-size="100%"/>
      </text:list-level-style-bullet>
      <text:list-level-style-bullet text:level="4" text:bullet-char="•">
        <style:list-level-properties text:space-before="1.427in" text:min-label-width="0.42701in"/>
        <style:text-properties fo:font-family="Arial" fo:font-size="100%"/>
      </text:list-level-style-bullet>
      <text:list-level-style-bullet text:level="5" text:bullet-char="•">
        <style:list-level-properties text:space-before="1.927in" text:min-label-width="0.42701in"/>
        <style:text-properties fo:font-family="Arial" fo:font-size="100%"/>
      </text:list-level-style-bullet>
      <text:list-level-style-bullet text:level="6" text:bullet-char="•">
        <style:list-level-properties text:space-before="2.427in" text:min-label-width="0.42701in"/>
        <style:text-properties fo:font-family="Arial" fo:font-size="100%"/>
      </text:list-level-style-bullet>
      <text:list-level-style-bullet text:level="7" text:bullet-char="•">
        <style:list-level-properties text:space-before="2.927in" text:min-label-width="0.42701in"/>
        <style:text-properties fo:font-family="Arial" fo:font-size="100%"/>
      </text:list-level-style-bullet>
      <text:list-level-style-bullet text:level="8" text:bullet-char="•">
        <style:list-level-properties text:space-before="3.427in" text:min-label-width="0.42701in"/>
        <style:text-properties fo:font-family="Arial" fo:font-size="100%"/>
      </text:list-level-style-bullet>
      <text:list-level-style-bullet text:level="9" text:bullet-char="•">
        <style:list-level-properties text:space-before="3.927in" text:min-label-width="0.42701in"/>
        <style:text-properties fo:font-family="Arial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37575in"/>
        <style:text-properties fo:font-family="Arial" fo:font-size="100%"/>
      </text:list-level-style-bullet>
      <text:list-level-style-bullet text:level="2" text:bullet-char="•">
        <style:list-level-properties text:space-before="0.37575in" text:min-label-width="0.37575in"/>
        <style:text-properties fo:font-family="Arial" fo:font-size="100%"/>
      </text:list-level-style-bullet>
      <text:list-level-style-bullet text:level="3" text:bullet-char="•">
        <style:list-level-properties text:space-before="0.87575in" text:min-label-width="0.37575in"/>
        <style:text-properties fo:font-family="Arial" fo:font-size="100%"/>
      </text:list-level-style-bullet>
      <text:list-level-style-bullet text:level="4" text:bullet-char="•">
        <style:list-level-properties text:space-before="1.37575in" text:min-label-width="0.37575in"/>
        <style:text-properties fo:font-family="Arial" fo:font-size="100%"/>
      </text:list-level-style-bullet>
      <text:list-level-style-bullet text:level="5" text:bullet-char="•">
        <style:list-level-properties text:space-before="1.87575in" text:min-label-width="0.37575in"/>
        <style:text-properties fo:font-family="Arial" fo:font-size="100%"/>
      </text:list-level-style-bullet>
      <text:list-level-style-bullet text:level="6" text:bullet-char="•">
        <style:list-level-properties text:space-before="2.37575in" text:min-label-width="0.37575in"/>
        <style:text-properties fo:font-family="Arial" fo:font-size="100%"/>
      </text:list-level-style-bullet>
      <text:list-level-style-bullet text:level="7" text:bullet-char="•">
        <style:list-level-properties text:space-before="2.87575in" text:min-label-width="0.37575in"/>
        <style:text-properties fo:font-family="Arial" fo:font-size="100%"/>
      </text:list-level-style-bullet>
      <text:list-level-style-bullet text:level="8" text:bullet-char="•">
        <style:list-level-properties text:space-before="3.37575in" text:min-label-width="0.37575in"/>
        <style:text-properties fo:font-family="Arial" fo:font-size="100%"/>
      </text:list-level-style-bullet>
      <text:list-level-style-bullet text:level="9" text:bullet-char="•">
        <style:list-level-properties text:space-before="3.87575in" text:min-label-width="0.37575in"/>
        <style:text-properties fo:font-family="Arial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37575in"/>
        <style:text-properties fo:font-family="Arial" fo:font-size="100%"/>
      </text:list-level-style-bullet>
      <text:list-level-style-bullet text:level="2" text:bullet-char="•">
        <style:list-level-properties text:space-before="0.37575in" text:min-label-width="0.37575in"/>
        <style:text-properties fo:font-family="Arial" fo:font-size="100%"/>
      </text:list-level-style-bullet>
      <text:list-level-style-bullet text:level="3" text:bullet-char="•">
        <style:list-level-properties text:space-before="0.87575in" text:min-label-width="0.37575in"/>
        <style:text-properties fo:font-family="Arial" fo:font-size="100%"/>
      </text:list-level-style-bullet>
      <text:list-level-style-bullet text:level="4" text:bullet-char="•">
        <style:list-level-properties text:space-before="1.37575in" text:min-label-width="0.37575in"/>
        <style:text-properties fo:font-family="Arial" fo:font-size="100%"/>
      </text:list-level-style-bullet>
      <text:list-level-style-bullet text:level="5" text:bullet-char="•">
        <style:list-level-properties text:space-before="1.87575in" text:min-label-width="0.37575in"/>
        <style:text-properties fo:font-family="Arial" fo:font-size="100%"/>
      </text:list-level-style-bullet>
      <text:list-level-style-bullet text:level="6" text:bullet-char="•">
        <style:list-level-properties text:space-before="2.37575in" text:min-label-width="0.37575in"/>
        <style:text-properties fo:font-family="Arial" fo:font-size="100%"/>
      </text:list-level-style-bullet>
      <text:list-level-style-bullet text:level="7" text:bullet-char="•">
        <style:list-level-properties text:space-before="2.87575in" text:min-label-width="0.37575in"/>
        <style:text-properties fo:font-family="Arial" fo:font-size="100%"/>
      </text:list-level-style-bullet>
      <text:list-level-style-bullet text:level="8" text:bullet-char="•">
        <style:list-level-properties text:space-before="3.37575in" text:min-label-width="0.37575in"/>
        <style:text-properties fo:font-family="Arial" fo:font-size="100%"/>
      </text:list-level-style-bullet>
      <text:list-level-style-bullet text:level="9" text:bullet-char="•">
        <style:list-level-properties text:space-before="3.87575in" text:min-label-width="0.37575in"/>
        <style:text-properties fo:font-family="Arial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966in"/>
        <style:text-properties fo:font-family="Arial" fo:font-size="100%"/>
      </text:list-level-style-bullet>
      <text:list-level-style-bullet text:level="2" text:bullet-char="•">
        <style:list-level-properties text:space-before="0.3966in" text:min-label-width="0.3966in"/>
        <style:text-properties fo:font-family="Arial" fo:font-size="100%"/>
      </text:list-level-style-bullet>
      <text:list-level-style-bullet text:level="3" text:bullet-char="•">
        <style:list-level-properties text:space-before="0.8966in" text:min-label-width="0.3966in"/>
        <style:text-properties fo:font-family="Arial" fo:font-size="100%"/>
      </text:list-level-style-bullet>
      <text:list-level-style-bullet text:level="4" text:bullet-char="•">
        <style:list-level-properties text:space-before="1.3966in" text:min-label-width="0.3966in"/>
        <style:text-properties fo:font-family="Arial" fo:font-size="100%"/>
      </text:list-level-style-bullet>
      <text:list-level-style-bullet text:level="5" text:bullet-char="•">
        <style:list-level-properties text:space-before="1.8966in" text:min-label-width="0.3966in"/>
        <style:text-properties fo:font-family="Arial" fo:font-size="100%"/>
      </text:list-level-style-bullet>
      <text:list-level-style-bullet text:level="6" text:bullet-char="•">
        <style:list-level-properties text:space-before="2.3966in" text:min-label-width="0.3966in"/>
        <style:text-properties fo:font-family="Arial" fo:font-size="100%"/>
      </text:list-level-style-bullet>
      <text:list-level-style-bullet text:level="7" text:bullet-char="•">
        <style:list-level-properties text:space-before="2.8966in" text:min-label-width="0.3966in"/>
        <style:text-properties fo:font-family="Arial" fo:font-size="100%"/>
      </text:list-level-style-bullet>
      <text:list-level-style-bullet text:level="8" text:bullet-char="•">
        <style:list-level-properties text:space-before="3.3966in" text:min-label-width="0.3966in"/>
        <style:text-properties fo:font-family="Arial" fo:font-size="100%"/>
      </text:list-level-style-bullet>
      <text:list-level-style-bullet text:level="9" text:bullet-char="•">
        <style:list-level-properties text:space-before="3.8966in" text:min-label-width="0.3966in"/>
        <style:text-properties fo:font-family="Arial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41835in"/>
        <style:text-properties fo:font-family="Arial" fo:font-size="100%"/>
      </text:list-level-style-bullet>
      <text:list-level-style-bullet text:level="2" text:bullet-char="•">
        <style:list-level-properties text:space-before="0.41835in" text:min-label-width="0.41835in"/>
        <style:text-properties fo:font-family="Arial" fo:font-size="100%"/>
      </text:list-level-style-bullet>
      <text:list-level-style-bullet text:level="3" text:bullet-char="•">
        <style:list-level-properties text:space-before="0.91835in" text:min-label-width="0.41835in"/>
        <style:text-properties fo:font-family="Arial" fo:font-size="100%"/>
      </text:list-level-style-bullet>
      <text:list-level-style-bullet text:level="4" text:bullet-char="•">
        <style:list-level-properties text:space-before="1.41835in" text:min-label-width="0.41835in"/>
        <style:text-properties fo:font-family="Arial" fo:font-size="100%"/>
      </text:list-level-style-bullet>
      <text:list-level-style-bullet text:level="5" text:bullet-char="•">
        <style:list-level-properties text:space-before="1.91835in" text:min-label-width="0.41835in"/>
        <style:text-properties fo:font-family="Arial" fo:font-size="100%"/>
      </text:list-level-style-bullet>
      <text:list-level-style-bullet text:level="6" text:bullet-char="•">
        <style:list-level-properties text:space-before="2.41835in" text:min-label-width="0.41835in"/>
        <style:text-properties fo:font-family="Arial" fo:font-size="100%"/>
      </text:list-level-style-bullet>
      <text:list-level-style-bullet text:level="7" text:bullet-char="•">
        <style:list-level-properties text:space-before="2.91835in" text:min-label-width="0.41835in"/>
        <style:text-properties fo:font-family="Arial" fo:font-size="100%"/>
      </text:list-level-style-bullet>
      <text:list-level-style-bullet text:level="8" text:bullet-char="•">
        <style:list-level-properties text:space-before="3.41835in" text:min-label-width="0.41835in"/>
        <style:text-properties fo:font-family="Arial" fo:font-size="100%"/>
      </text:list-level-style-bullet>
      <text:list-level-style-bullet text:level="9" text:bullet-char="•">
        <style:list-level-properties text:space-before="3.91835in" text:min-label-width="0.41835in"/>
        <style:text-properties fo:font-family="Arial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48567in"/>
        <style:text-properties fo:font-family="Arial" fo:font-size="100%"/>
      </text:list-level-style-bullet>
      <text:list-level-style-bullet text:level="2" text:bullet-char="•">
        <style:list-level-properties text:space-before="0.48567in" text:min-label-width="0.48567in"/>
        <style:text-properties fo:font-family="Arial" fo:font-size="100%"/>
      </text:list-level-style-bullet>
      <text:list-level-style-bullet text:level="3" text:bullet-char="•">
        <style:list-level-properties text:space-before="0.98567in" text:min-label-width="0.48567in"/>
        <style:text-properties fo:font-family="Arial" fo:font-size="100%"/>
      </text:list-level-style-bullet>
      <text:list-level-style-bullet text:level="4" text:bullet-char="•">
        <style:list-level-properties text:space-before="1.48567in" text:min-label-width="0.48567in"/>
        <style:text-properties fo:font-family="Arial" fo:font-size="100%"/>
      </text:list-level-style-bullet>
      <text:list-level-style-bullet text:level="5" text:bullet-char="•">
        <style:list-level-properties text:space-before="1.98567in" text:min-label-width="0.48567in"/>
        <style:text-properties fo:font-family="Arial" fo:font-size="100%"/>
      </text:list-level-style-bullet>
      <text:list-level-style-bullet text:level="6" text:bullet-char="•">
        <style:list-level-properties text:space-before="2.48567in" text:min-label-width="0.48567in"/>
        <style:text-properties fo:font-family="Arial" fo:font-size="100%"/>
      </text:list-level-style-bullet>
      <text:list-level-style-bullet text:level="7" text:bullet-char="•">
        <style:list-level-properties text:space-before="2.98567in" text:min-label-width="0.48567in"/>
        <style:text-properties fo:font-family="Arial" fo:font-size="100%"/>
      </text:list-level-style-bullet>
      <text:list-level-style-bullet text:level="8" text:bullet-char="•">
        <style:list-level-properties text:space-before="3.48567in" text:min-label-width="0.48567in"/>
        <style:text-properties fo:font-family="Arial" fo:font-size="100%"/>
      </text:list-level-style-bullet>
      <text:list-level-style-bullet text:level="9" text:bullet-char="•">
        <style:list-level-properties text:space-before="3.98567in" text:min-label-width="0.48567in"/>
        <style:text-properties fo:font-family="Arial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37575in"/>
        <style:text-properties fo:font-family="Arial" fo:font-size="100%"/>
      </text:list-level-style-bullet>
      <text:list-level-style-bullet text:level="2" text:bullet-char="•">
        <style:list-level-properties text:space-before="0.37575in" text:min-label-width="0.37575in"/>
        <style:text-properties fo:font-family="Arial" fo:font-size="100%"/>
      </text:list-level-style-bullet>
      <text:list-level-style-bullet text:level="3" text:bullet-char="•">
        <style:list-level-properties text:space-before="0.87575in" text:min-label-width="0.37575in"/>
        <style:text-properties fo:font-family="Arial" fo:font-size="100%"/>
      </text:list-level-style-bullet>
      <text:list-level-style-bullet text:level="4" text:bullet-char="•">
        <style:list-level-properties text:space-before="1.37575in" text:min-label-width="0.37575in"/>
        <style:text-properties fo:font-family="Arial" fo:font-size="100%"/>
      </text:list-level-style-bullet>
      <text:list-level-style-bullet text:level="5" text:bullet-char="•">
        <style:list-level-properties text:space-before="1.87575in" text:min-label-width="0.37575in"/>
        <style:text-properties fo:font-family="Arial" fo:font-size="100%"/>
      </text:list-level-style-bullet>
      <text:list-level-style-bullet text:level="6" text:bullet-char="•">
        <style:list-level-properties text:space-before="2.37575in" text:min-label-width="0.37575in"/>
        <style:text-properties fo:font-family="Arial" fo:font-size="100%"/>
      </text:list-level-style-bullet>
      <text:list-level-style-bullet text:level="7" text:bullet-char="•">
        <style:list-level-properties text:space-before="2.87575in" text:min-label-width="0.37575in"/>
        <style:text-properties fo:font-family="Arial" fo:font-size="100%"/>
      </text:list-level-style-bullet>
      <text:list-level-style-bullet text:level="8" text:bullet-char="•">
        <style:list-level-properties text:space-before="3.37575in" text:min-label-width="0.37575in"/>
        <style:text-properties fo:font-family="Arial" fo:font-size="100%"/>
      </text:list-level-style-bullet>
      <text:list-level-style-bullet text:level="9" text:bullet-char="•">
        <style:list-level-properties text:space-before="3.87575in" text:min-label-width="0.37575in"/>
        <style:text-properties fo:font-family="Arial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3966in"/>
        <style:text-properties fo:font-family="Arial" fo:font-size="100%"/>
      </text:list-level-style-bullet>
      <text:list-level-style-bullet text:level="2" text:bullet-char="•">
        <style:list-level-properties text:space-before="0.3966in" text:min-label-width="0.3966in"/>
        <style:text-properties fo:font-family="Arial" fo:font-size="100%"/>
      </text:list-level-style-bullet>
      <text:list-level-style-bullet text:level="3" text:bullet-char="•">
        <style:list-level-properties text:space-before="0.8966in" text:min-label-width="0.3966in"/>
        <style:text-properties fo:font-family="Arial" fo:font-size="100%"/>
      </text:list-level-style-bullet>
      <text:list-level-style-bullet text:level="4" text:bullet-char="•">
        <style:list-level-properties text:space-before="1.3966in" text:min-label-width="0.3966in"/>
        <style:text-properties fo:font-family="Arial" fo:font-size="100%"/>
      </text:list-level-style-bullet>
      <text:list-level-style-bullet text:level="5" text:bullet-char="•">
        <style:list-level-properties text:space-before="1.8966in" text:min-label-width="0.3966in"/>
        <style:text-properties fo:font-family="Arial" fo:font-size="100%"/>
      </text:list-level-style-bullet>
      <text:list-level-style-bullet text:level="6" text:bullet-char="•">
        <style:list-level-properties text:space-before="2.3966in" text:min-label-width="0.3966in"/>
        <style:text-properties fo:font-family="Arial" fo:font-size="100%"/>
      </text:list-level-style-bullet>
      <text:list-level-style-bullet text:level="7" text:bullet-char="•">
        <style:list-level-properties text:space-before="2.8966in" text:min-label-width="0.3966in"/>
        <style:text-properties fo:font-family="Arial" fo:font-size="100%"/>
      </text:list-level-style-bullet>
      <text:list-level-style-bullet text:level="8" text:bullet-char="•">
        <style:list-level-properties text:space-before="3.3966in" text:min-label-width="0.3966in"/>
        <style:text-properties fo:font-family="Arial" fo:font-size="100%"/>
      </text:list-level-style-bullet>
      <text:list-level-style-bullet text:level="9" text:bullet-char="•">
        <style:list-level-properties text:space-before="3.8966in" text:min-label-width="0.3966in"/>
        <style:text-properties fo:font-family="Arial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41835in"/>
        <style:text-properties fo:font-family="Arial" fo:font-size="100%"/>
      </text:list-level-style-bullet>
      <text:list-level-style-bullet text:level="2" text:bullet-char="•">
        <style:list-level-properties text:space-before="0.41835in" text:min-label-width="0.41835in"/>
        <style:text-properties fo:font-family="Arial" fo:font-size="100%"/>
      </text:list-level-style-bullet>
      <text:list-level-style-bullet text:level="3" text:bullet-char="•">
        <style:list-level-properties text:space-before="0.91835in" text:min-label-width="0.41835in"/>
        <style:text-properties fo:font-family="Arial" fo:font-size="100%"/>
      </text:list-level-style-bullet>
      <text:list-level-style-bullet text:level="4" text:bullet-char="•">
        <style:list-level-properties text:space-before="1.41835in" text:min-label-width="0.41835in"/>
        <style:text-properties fo:font-family="Arial" fo:font-size="100%"/>
      </text:list-level-style-bullet>
      <text:list-level-style-bullet text:level="5" text:bullet-char="•">
        <style:list-level-properties text:space-before="1.91835in" text:min-label-width="0.41835in"/>
        <style:text-properties fo:font-family="Arial" fo:font-size="100%"/>
      </text:list-level-style-bullet>
      <text:list-level-style-bullet text:level="6" text:bullet-char="•">
        <style:list-level-properties text:space-before="2.41835in" text:min-label-width="0.41835in"/>
        <style:text-properties fo:font-family="Arial" fo:font-size="100%"/>
      </text:list-level-style-bullet>
      <text:list-level-style-bullet text:level="7" text:bullet-char="•">
        <style:list-level-properties text:space-before="2.91835in" text:min-label-width="0.41835in"/>
        <style:text-properties fo:font-family="Arial" fo:font-size="100%"/>
      </text:list-level-style-bullet>
      <text:list-level-style-bullet text:level="8" text:bullet-char="•">
        <style:list-level-properties text:space-before="3.41835in" text:min-label-width="0.41835in"/>
        <style:text-properties fo:font-family="Arial" fo:font-size="100%"/>
      </text:list-level-style-bullet>
      <text:list-level-style-bullet text:level="9" text:bullet-char="•">
        <style:list-level-properties text:space-before="3.91835in" text:min-label-width="0.41835in"/>
        <style:text-properties fo:font-family="Arial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43235in"/>
        <style:text-properties fo:font-family="Arial" fo:font-size="100%"/>
      </text:list-level-style-bullet>
      <text:list-level-style-bullet text:level="2" text:bullet-char="•">
        <style:list-level-properties text:space-before="0.43235in" text:min-label-width="0.43235in"/>
        <style:text-properties fo:font-family="Arial" fo:font-size="100%"/>
      </text:list-level-style-bullet>
      <text:list-level-style-bullet text:level="3" text:bullet-char="•">
        <style:list-level-properties text:space-before="0.93235in" text:min-label-width="0.43235in"/>
        <style:text-properties fo:font-family="Arial" fo:font-size="100%"/>
      </text:list-level-style-bullet>
      <text:list-level-style-bullet text:level="4" text:bullet-char="•">
        <style:list-level-properties text:space-before="1.43235in" text:min-label-width="0.43235in"/>
        <style:text-properties fo:font-family="Arial" fo:font-size="100%"/>
      </text:list-level-style-bullet>
      <text:list-level-style-bullet text:level="5" text:bullet-char="•">
        <style:list-level-properties text:space-before="1.93235in" text:min-label-width="0.43235in"/>
        <style:text-properties fo:font-family="Arial" fo:font-size="100%"/>
      </text:list-level-style-bullet>
      <text:list-level-style-bullet text:level="6" text:bullet-char="•">
        <style:list-level-properties text:space-before="2.43235in" text:min-label-width="0.43235in"/>
        <style:text-properties fo:font-family="Arial" fo:font-size="100%"/>
      </text:list-level-style-bullet>
      <text:list-level-style-bullet text:level="7" text:bullet-char="•">
        <style:list-level-properties text:space-before="2.93235in" text:min-label-width="0.43235in"/>
        <style:text-properties fo:font-family="Arial" fo:font-size="100%"/>
      </text:list-level-style-bullet>
      <text:list-level-style-bullet text:level="8" text:bullet-char="•">
        <style:list-level-properties text:space-before="3.43235in" text:min-label-width="0.43235in"/>
        <style:text-properties fo:font-family="Arial" fo:font-size="100%"/>
      </text:list-level-style-bullet>
      <text:list-level-style-bullet text:level="9" text:bullet-char="•">
        <style:list-level-properties text:space-before="3.93235in" text:min-label-width="0.43235in"/>
        <style:text-properties fo:font-family="Arial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48567in"/>
        <style:text-properties fo:font-family="Arial" fo:font-size="100%"/>
      </text:list-level-style-bullet>
      <text:list-level-style-bullet text:level="2" text:bullet-char="•">
        <style:list-level-properties text:space-before="0.48567in" text:min-label-width="0.48567in"/>
        <style:text-properties fo:font-family="Arial" fo:font-size="100%"/>
      </text:list-level-style-bullet>
      <text:list-level-style-bullet text:level="3" text:bullet-char="•">
        <style:list-level-properties text:space-before="0.98567in" text:min-label-width="0.48567in"/>
        <style:text-properties fo:font-family="Arial" fo:font-size="100%"/>
      </text:list-level-style-bullet>
      <text:list-level-style-bullet text:level="4" text:bullet-char="•">
        <style:list-level-properties text:space-before="1.48567in" text:min-label-width="0.48567in"/>
        <style:text-properties fo:font-family="Arial" fo:font-size="100%"/>
      </text:list-level-style-bullet>
      <text:list-level-style-bullet text:level="5" text:bullet-char="•">
        <style:list-level-properties text:space-before="1.98567in" text:min-label-width="0.48567in"/>
        <style:text-properties fo:font-family="Arial" fo:font-size="100%"/>
      </text:list-level-style-bullet>
      <text:list-level-style-bullet text:level="6" text:bullet-char="•">
        <style:list-level-properties text:space-before="2.48567in" text:min-label-width="0.48567in"/>
        <style:text-properties fo:font-family="Arial" fo:font-size="100%"/>
      </text:list-level-style-bullet>
      <text:list-level-style-bullet text:level="7" text:bullet-char="•">
        <style:list-level-properties text:space-before="2.98567in" text:min-label-width="0.48567in"/>
        <style:text-properties fo:font-family="Arial" fo:font-size="100%"/>
      </text:list-level-style-bullet>
      <text:list-level-style-bullet text:level="8" text:bullet-char="•">
        <style:list-level-properties text:space-before="3.48567in" text:min-label-width="0.48567in"/>
        <style:text-properties fo:font-family="Arial" fo:font-size="100%"/>
      </text:list-level-style-bullet>
      <text:list-level-style-bullet text:level="9" text:bullet-char="•">
        <style:list-level-properties text:space-before="3.98567in" text:min-label-width="0.48567in"/>
        <style:text-properties fo:font-family="Arial" fo:font-size="100%"/>
      </text:list-level-style-bullet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46">
      <text:list-level-style-bullet text:level="1" text:bullet-char="•">
        <style:list-level-properties text:space-before="0in" text:min-label-width="0.3966in"/>
        <style:text-properties fo:font-family="Arial" fo:font-size="100%"/>
      </text:list-level-style-bullet>
      <text:list-level-style-bullet text:level="2" text:bullet-char="•">
        <style:list-level-properties text:space-before="0.3966in" text:min-label-width="0.3966in"/>
        <style:text-properties fo:font-family="Arial" fo:font-size="100%"/>
      </text:list-level-style-bullet>
      <text:list-level-style-bullet text:level="3" text:bullet-char="•">
        <style:list-level-properties text:space-before="0.8966in" text:min-label-width="0.3966in"/>
        <style:text-properties fo:font-family="Arial" fo:font-size="100%"/>
      </text:list-level-style-bullet>
      <text:list-level-style-bullet text:level="4" text:bullet-char="•">
        <style:list-level-properties text:space-before="1.3966in" text:min-label-width="0.3966in"/>
        <style:text-properties fo:font-family="Arial" fo:font-size="100%"/>
      </text:list-level-style-bullet>
      <text:list-level-style-bullet text:level="5" text:bullet-char="•">
        <style:list-level-properties text:space-before="1.8966in" text:min-label-width="0.3966in"/>
        <style:text-properties fo:font-family="Arial" fo:font-size="100%"/>
      </text:list-level-style-bullet>
      <text:list-level-style-bullet text:level="6" text:bullet-char="•">
        <style:list-level-properties text:space-before="2.3966in" text:min-label-width="0.3966in"/>
        <style:text-properties fo:font-family="Arial" fo:font-size="100%"/>
      </text:list-level-style-bullet>
      <text:list-level-style-bullet text:level="7" text:bullet-char="•">
        <style:list-level-properties text:space-before="2.8966in" text:min-label-width="0.3966in"/>
        <style:text-properties fo:font-family="Arial" fo:font-size="100%"/>
      </text:list-level-style-bullet>
      <text:list-level-style-bullet text:level="8" text:bullet-char="•">
        <style:list-level-properties text:space-before="3.3966in" text:min-label-width="0.3966in"/>
        <style:text-properties fo:font-family="Arial" fo:font-size="100%"/>
      </text:list-level-style-bullet>
      <text:list-level-style-bullet text:level="9" text:bullet-char="•">
        <style:list-level-properties text:space-before="3.8966in" text:min-label-width="0.3966in"/>
        <style:text-properties fo:font-family="Arial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41835in"/>
        <style:text-properties fo:font-family="Arial" fo:font-size="100%"/>
      </text:list-level-style-bullet>
      <text:list-level-style-bullet text:level="2" text:bullet-char="•">
        <style:list-level-properties text:space-before="0.41835in" text:min-label-width="0.41835in"/>
        <style:text-properties fo:font-family="Arial" fo:font-size="100%"/>
      </text:list-level-style-bullet>
      <text:list-level-style-bullet text:level="3" text:bullet-char="•">
        <style:list-level-properties text:space-before="0.91835in" text:min-label-width="0.41835in"/>
        <style:text-properties fo:font-family="Arial" fo:font-size="100%"/>
      </text:list-level-style-bullet>
      <text:list-level-style-bullet text:level="4" text:bullet-char="•">
        <style:list-level-properties text:space-before="1.41835in" text:min-label-width="0.41835in"/>
        <style:text-properties fo:font-family="Arial" fo:font-size="100%"/>
      </text:list-level-style-bullet>
      <text:list-level-style-bullet text:level="5" text:bullet-char="•">
        <style:list-level-properties text:space-before="1.91835in" text:min-label-width="0.41835in"/>
        <style:text-properties fo:font-family="Arial" fo:font-size="100%"/>
      </text:list-level-style-bullet>
      <text:list-level-style-bullet text:level="6" text:bullet-char="•">
        <style:list-level-properties text:space-before="2.41835in" text:min-label-width="0.41835in"/>
        <style:text-properties fo:font-family="Arial" fo:font-size="100%"/>
      </text:list-level-style-bullet>
      <text:list-level-style-bullet text:level="7" text:bullet-char="•">
        <style:list-level-properties text:space-before="2.91835in" text:min-label-width="0.41835in"/>
        <style:text-properties fo:font-family="Arial" fo:font-size="100%"/>
      </text:list-level-style-bullet>
      <text:list-level-style-bullet text:level="8" text:bullet-char="•">
        <style:list-level-properties text:space-before="3.41835in" text:min-label-width="0.41835in"/>
        <style:text-properties fo:font-family="Arial" fo:font-size="100%"/>
      </text:list-level-style-bullet>
      <text:list-level-style-bullet text:level="9" text:bullet-char="•">
        <style:list-level-properties text:space-before="3.91835in" text:min-label-width="0.41835in"/>
        <style:text-properties fo:font-family="Arial" fo:font-size="100%"/>
      </text:list-level-style-bullet>
    </text:list-style>
    <text:list-style style:name="a710">
      <text:list-level-style-bullet text:level="1" text:bullet-char="•">
        <style:list-level-properties text:space-before="0.01421in" text:min-label-width="0.51421in"/>
        <style:text-properties fo:font-family="Arial" fo:font-size="100%"/>
      </text:list-level-style-bullet>
      <text:list-level-style-bullet text:level="2" text:bullet-char="•">
        <style:list-level-properties text:space-before="0.51421in" text:min-label-width="0.51421in"/>
        <style:text-properties fo:font-family="Arial" fo:font-size="100%"/>
      </text:list-level-style-bullet>
      <text:list-level-style-bullet text:level="3" text:bullet-char="•">
        <style:list-level-properties text:space-before="1.01421in" text:min-label-width="0.51421in"/>
        <style:text-properties fo:font-family="Arial" fo:font-size="100%"/>
      </text:list-level-style-bullet>
      <text:list-level-style-bullet text:level="4" text:bullet-char="•">
        <style:list-level-properties text:space-before="1.51421in" text:min-label-width="0.51421in"/>
        <style:text-properties fo:font-family="Arial" fo:font-size="100%"/>
      </text:list-level-style-bullet>
      <text:list-level-style-bullet text:level="5" text:bullet-char="•">
        <style:list-level-properties text:space-before="2.01421in" text:min-label-width="0.51421in"/>
        <style:text-properties fo:font-family="Arial" fo:font-size="100%"/>
      </text:list-level-style-bullet>
      <text:list-level-style-bullet text:level="6" text:bullet-char="•">
        <style:list-level-properties text:space-before="2.51421in" text:min-label-width="0.51421in"/>
        <style:text-properties fo:font-family="Arial" fo:font-size="100%"/>
      </text:list-level-style-bullet>
      <text:list-level-style-bullet text:level="7" text:bullet-char="•">
        <style:list-level-properties text:space-before="3.01421in" text:min-label-width="0.51421in"/>
        <style:text-properties fo:font-family="Arial" fo:font-size="100%"/>
      </text:list-level-style-bullet>
      <text:list-level-style-bullet text:level="8" text:bullet-char="•">
        <style:list-level-properties text:space-before="3.51421in" text:min-label-width="0.51421in"/>
        <style:text-properties fo:font-family="Arial" fo:font-size="100%"/>
      </text:list-level-style-bullet>
      <text:list-level-style-bullet text:level="9" text:bullet-char="•">
        <style:list-level-properties text:space-before="4.01421in" text:min-label-width="0.51421in"/>
        <style:text-properties fo:font-family="Arial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44833in"/>
        <style:text-properties fo:font-family="Arial" fo:font-size="100%"/>
      </text:list-level-style-bullet>
      <text:list-level-style-bullet text:level="2" text:bullet-char="•">
        <style:list-level-properties text:space-before="0.44833in" text:min-label-width="0.44833in"/>
        <style:text-properties fo:font-family="Arial" fo:font-size="100%"/>
      </text:list-level-style-bullet>
      <text:list-level-style-bullet text:level="3" text:bullet-char="•">
        <style:list-level-properties text:space-before="0.94833in" text:min-label-width="0.44833in"/>
        <style:text-properties fo:font-family="Arial" fo:font-size="100%"/>
      </text:list-level-style-bullet>
      <text:list-level-style-bullet text:level="4" text:bullet-char="•">
        <style:list-level-properties text:space-before="1.44833in" text:min-label-width="0.44833in"/>
        <style:text-properties fo:font-family="Arial" fo:font-size="100%"/>
      </text:list-level-style-bullet>
      <text:list-level-style-bullet text:level="5" text:bullet-char="•">
        <style:list-level-properties text:space-before="1.94833in" text:min-label-width="0.44833in"/>
        <style:text-properties fo:font-family="Arial" fo:font-size="100%"/>
      </text:list-level-style-bullet>
      <text:list-level-style-bullet text:level="6" text:bullet-char="•">
        <style:list-level-properties text:space-before="2.44833in" text:min-label-width="0.44833in"/>
        <style:text-properties fo:font-family="Arial" fo:font-size="100%"/>
      </text:list-level-style-bullet>
      <text:list-level-style-bullet text:level="7" text:bullet-char="•">
        <style:list-level-properties text:space-before="2.94833in" text:min-label-width="0.44833in"/>
        <style:text-properties fo:font-family="Arial" fo:font-size="100%"/>
      </text:list-level-style-bullet>
      <text:list-level-style-bullet text:level="8" text:bullet-char="•">
        <style:list-level-properties text:space-before="3.44833in" text:min-label-width="0.44833in"/>
        <style:text-properties fo:font-family="Arial" fo:font-size="100%"/>
      </text:list-level-style-bullet>
      <text:list-level-style-bullet text:level="9" text:bullet-char="•">
        <style:list-level-properties text:space-before="3.94833in" text:min-label-width="0.44833in"/>
        <style:text-properties fo:font-family="Arial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43235in"/>
        <style:text-properties fo:font-family="Arial" fo:font-size="100%"/>
      </text:list-level-style-bullet>
      <text:list-level-style-bullet text:level="2" text:bullet-char="•">
        <style:list-level-properties text:space-before="0.43235in" text:min-label-width="0.43235in"/>
        <style:text-properties fo:font-family="Arial" fo:font-size="100%"/>
      </text:list-level-style-bullet>
      <text:list-level-style-bullet text:level="3" text:bullet-char="•">
        <style:list-level-properties text:space-before="0.93235in" text:min-label-width="0.43235in"/>
        <style:text-properties fo:font-family="Arial" fo:font-size="100%"/>
      </text:list-level-style-bullet>
      <text:list-level-style-bullet text:level="4" text:bullet-char="•">
        <style:list-level-properties text:space-before="1.43235in" text:min-label-width="0.43235in"/>
        <style:text-properties fo:font-family="Arial" fo:font-size="100%"/>
      </text:list-level-style-bullet>
      <text:list-level-style-bullet text:level="5" text:bullet-char="•">
        <style:list-level-properties text:space-before="1.93235in" text:min-label-width="0.43235in"/>
        <style:text-properties fo:font-family="Arial" fo:font-size="100%"/>
      </text:list-level-style-bullet>
      <text:list-level-style-bullet text:level="6" text:bullet-char="•">
        <style:list-level-properties text:space-before="2.43235in" text:min-label-width="0.43235in"/>
        <style:text-properties fo:font-family="Arial" fo:font-size="100%"/>
      </text:list-level-style-bullet>
      <text:list-level-style-bullet text:level="7" text:bullet-char="•">
        <style:list-level-properties text:space-before="2.93235in" text:min-label-width="0.43235in"/>
        <style:text-properties fo:font-family="Arial" fo:font-size="100%"/>
      </text:list-level-style-bullet>
      <text:list-level-style-bullet text:level="8" text:bullet-char="•">
        <style:list-level-properties text:space-before="3.43235in" text:min-label-width="0.43235in"/>
        <style:text-properties fo:font-family="Arial" fo:font-size="100%"/>
      </text:list-level-style-bullet>
      <text:list-level-style-bullet text:level="9" text:bullet-char="•">
        <style:list-level-properties text:space-before="3.93235in" text:min-label-width="0.43235in"/>
        <style:text-properties fo:font-family="Arial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3966in"/>
        <style:text-properties fo:font-family="Arial" fo:font-size="100%"/>
      </text:list-level-style-bullet>
      <text:list-level-style-bullet text:level="2" text:bullet-char="•">
        <style:list-level-properties text:space-before="0.3966in" text:min-label-width="0.3966in"/>
        <style:text-properties fo:font-family="Arial" fo:font-size="100%"/>
      </text:list-level-style-bullet>
      <text:list-level-style-bullet text:level="3" text:bullet-char="•">
        <style:list-level-properties text:space-before="0.8966in" text:min-label-width="0.3966in"/>
        <style:text-properties fo:font-family="Arial" fo:font-size="100%"/>
      </text:list-level-style-bullet>
      <text:list-level-style-bullet text:level="4" text:bullet-char="•">
        <style:list-level-properties text:space-before="1.3966in" text:min-label-width="0.3966in"/>
        <style:text-properties fo:font-family="Arial" fo:font-size="100%"/>
      </text:list-level-style-bullet>
      <text:list-level-style-bullet text:level="5" text:bullet-char="•">
        <style:list-level-properties text:space-before="1.8966in" text:min-label-width="0.3966in"/>
        <style:text-properties fo:font-family="Arial" fo:font-size="100%"/>
      </text:list-level-style-bullet>
      <text:list-level-style-bullet text:level="6" text:bullet-char="•">
        <style:list-level-properties text:space-before="2.3966in" text:min-label-width="0.3966in"/>
        <style:text-properties fo:font-family="Arial" fo:font-size="100%"/>
      </text:list-level-style-bullet>
      <text:list-level-style-bullet text:level="7" text:bullet-char="•">
        <style:list-level-properties text:space-before="2.8966in" text:min-label-width="0.3966in"/>
        <style:text-properties fo:font-family="Arial" fo:font-size="100%"/>
      </text:list-level-style-bullet>
      <text:list-level-style-bullet text:level="8" text:bullet-char="•">
        <style:list-level-properties text:space-before="3.3966in" text:min-label-width="0.3966in"/>
        <style:text-properties fo:font-family="Arial" fo:font-size="100%"/>
      </text:list-level-style-bullet>
      <text:list-level-style-bullet text:level="9" text:bullet-char="•">
        <style:list-level-properties text:space-before="3.8966in" text:min-label-width="0.3966in"/>
        <style:text-properties fo:font-family="Arial" fo:font-size="100%"/>
      </text:list-level-style-bullet>
    </text:list-style>
    <text:list-style style:name="a7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324">
      <text:list-level-style-bullet text:level="1" text:bullet-char="•">
        <style:list-level-properties text:space-before="0in" text:min-label-width="0.44833in"/>
        <style:text-properties fo:font-family="Arial" fo:font-size="100%"/>
      </text:list-level-style-bullet>
      <text:list-level-style-bullet text:level="2" text:bullet-char="•">
        <style:list-level-properties text:space-before="0.44833in" text:min-label-width="0.44833in"/>
        <style:text-properties fo:font-family="Arial" fo:font-size="100%"/>
      </text:list-level-style-bullet>
      <text:list-level-style-bullet text:level="3" text:bullet-char="•">
        <style:list-level-properties text:space-before="0.94833in" text:min-label-width="0.44833in"/>
        <style:text-properties fo:font-family="Arial" fo:font-size="100%"/>
      </text:list-level-style-bullet>
      <text:list-level-style-bullet text:level="4" text:bullet-char="•">
        <style:list-level-properties text:space-before="1.44833in" text:min-label-width="0.44833in"/>
        <style:text-properties fo:font-family="Arial" fo:font-size="100%"/>
      </text:list-level-style-bullet>
      <text:list-level-style-bullet text:level="5" text:bullet-char="•">
        <style:list-level-properties text:space-before="1.94833in" text:min-label-width="0.44833in"/>
        <style:text-properties fo:font-family="Arial" fo:font-size="100%"/>
      </text:list-level-style-bullet>
      <text:list-level-style-bullet text:level="6" text:bullet-char="•">
        <style:list-level-properties text:space-before="2.44833in" text:min-label-width="0.44833in"/>
        <style:text-properties fo:font-family="Arial" fo:font-size="100%"/>
      </text:list-level-style-bullet>
      <text:list-level-style-bullet text:level="7" text:bullet-char="•">
        <style:list-level-properties text:space-before="2.94833in" text:min-label-width="0.44833in"/>
        <style:text-properties fo:font-family="Arial" fo:font-size="100%"/>
      </text:list-level-style-bullet>
      <text:list-level-style-bullet text:level="8" text:bullet-char="•">
        <style:list-level-properties text:space-before="3.44833in" text:min-label-width="0.44833in"/>
        <style:text-properties fo:font-family="Arial" fo:font-size="100%"/>
      </text:list-level-style-bullet>
      <text:list-level-style-bullet text:level="9" text:bullet-char="•">
        <style:list-level-properties text:space-before="3.94833in" text:min-label-width="0.44833in"/>
        <style:text-properties fo:font-family="Arial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42951in"/>
        <style:text-properties fo:font-family="Arial" fo:font-size="100%"/>
      </text:list-level-style-bullet>
      <text:list-level-style-bullet text:level="2" text:bullet-char="•">
        <style:list-level-properties text:space-before="0.42951in" text:min-label-width="0.42951in"/>
        <style:text-properties fo:font-family="Arial" fo:font-size="100%"/>
      </text:list-level-style-bullet>
      <text:list-level-style-bullet text:level="3" text:bullet-char="•">
        <style:list-level-properties text:space-before="0.92951in" text:min-label-width="0.42951in"/>
        <style:text-properties fo:font-family="Arial" fo:font-size="100%"/>
      </text:list-level-style-bullet>
      <text:list-level-style-bullet text:level="4" text:bullet-char="•">
        <style:list-level-properties text:space-before="1.42951in" text:min-label-width="0.42951in"/>
        <style:text-properties fo:font-family="Arial" fo:font-size="100%"/>
      </text:list-level-style-bullet>
      <text:list-level-style-bullet text:level="5" text:bullet-char="•">
        <style:list-level-properties text:space-before="1.92951in" text:min-label-width="0.42951in"/>
        <style:text-properties fo:font-family="Arial" fo:font-size="100%"/>
      </text:list-level-style-bullet>
      <text:list-level-style-bullet text:level="6" text:bullet-char="•">
        <style:list-level-properties text:space-before="2.42951in" text:min-label-width="0.42951in"/>
        <style:text-properties fo:font-family="Arial" fo:font-size="100%"/>
      </text:list-level-style-bullet>
      <text:list-level-style-bullet text:level="7" text:bullet-char="•">
        <style:list-level-properties text:space-before="2.92951in" text:min-label-width="0.42951in"/>
        <style:text-properties fo:font-family="Arial" fo:font-size="100%"/>
      </text:list-level-style-bullet>
      <text:list-level-style-bullet text:level="8" text:bullet-char="•">
        <style:list-level-properties text:space-before="3.42951in" text:min-label-width="0.42951in"/>
        <style:text-properties fo:font-family="Arial" fo:font-size="100%"/>
      </text:list-level-style-bullet>
      <text:list-level-style-bullet text:level="9" text:bullet-char="•">
        <style:list-level-properties text:space-before="3.92951in" text:min-label-width="0.42951in"/>
        <style:text-properties fo:font-family="Arial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43235in"/>
        <style:text-properties fo:font-family="Arial" fo:font-size="100%"/>
      </text:list-level-style-bullet>
      <text:list-level-style-bullet text:level="2" text:bullet-char="•">
        <style:list-level-properties text:space-before="0.43235in" text:min-label-width="0.43235in"/>
        <style:text-properties fo:font-family="Arial" fo:font-size="100%"/>
      </text:list-level-style-bullet>
      <text:list-level-style-bullet text:level="3" text:bullet-char="•">
        <style:list-level-properties text:space-before="0.93235in" text:min-label-width="0.43235in"/>
        <style:text-properties fo:font-family="Arial" fo:font-size="100%"/>
      </text:list-level-style-bullet>
      <text:list-level-style-bullet text:level="4" text:bullet-char="•">
        <style:list-level-properties text:space-before="1.43235in" text:min-label-width="0.43235in"/>
        <style:text-properties fo:font-family="Arial" fo:font-size="100%"/>
      </text:list-level-style-bullet>
      <text:list-level-style-bullet text:level="5" text:bullet-char="•">
        <style:list-level-properties text:space-before="1.93235in" text:min-label-width="0.43235in"/>
        <style:text-properties fo:font-family="Arial" fo:font-size="100%"/>
      </text:list-level-style-bullet>
      <text:list-level-style-bullet text:level="6" text:bullet-char="•">
        <style:list-level-properties text:space-before="2.43235in" text:min-label-width="0.43235in"/>
        <style:text-properties fo:font-family="Arial" fo:font-size="100%"/>
      </text:list-level-style-bullet>
      <text:list-level-style-bullet text:level="7" text:bullet-char="•">
        <style:list-level-properties text:space-before="2.93235in" text:min-label-width="0.43235in"/>
        <style:text-properties fo:font-family="Arial" fo:font-size="100%"/>
      </text:list-level-style-bullet>
      <text:list-level-style-bullet text:level="8" text:bullet-char="•">
        <style:list-level-properties text:space-before="3.43235in" text:min-label-width="0.43235in"/>
        <style:text-properties fo:font-family="Arial" fo:font-size="100%"/>
      </text:list-level-style-bullet>
      <text:list-level-style-bullet text:level="9" text:bullet-char="•">
        <style:list-level-properties text:space-before="3.93235in" text:min-label-width="0.43235in"/>
        <style:text-properties fo:font-family="Arial" fo:font-size="100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43">
      <text:list-level-style-bullet text:level="1" text:bullet-char="•">
        <style:list-level-properties text:space-before="0in" text:min-label-width="0.42951in"/>
        <style:text-properties fo:font-family="Arial" fo:font-size="100%"/>
      </text:list-level-style-bullet>
      <text:list-level-style-bullet text:level="2" text:bullet-char="•">
        <style:list-level-properties text:space-before="0.42951in" text:min-label-width="0.42951in"/>
        <style:text-properties fo:font-family="Arial" fo:font-size="100%"/>
      </text:list-level-style-bullet>
      <text:list-level-style-bullet text:level="3" text:bullet-char="•">
        <style:list-level-properties text:space-before="0.92951in" text:min-label-width="0.42951in"/>
        <style:text-properties fo:font-family="Arial" fo:font-size="100%"/>
      </text:list-level-style-bullet>
      <text:list-level-style-bullet text:level="4" text:bullet-char="•">
        <style:list-level-properties text:space-before="1.42951in" text:min-label-width="0.42951in"/>
        <style:text-properties fo:font-family="Arial" fo:font-size="100%"/>
      </text:list-level-style-bullet>
      <text:list-level-style-bullet text:level="5" text:bullet-char="•">
        <style:list-level-properties text:space-before="1.92951in" text:min-label-width="0.42951in"/>
        <style:text-properties fo:font-family="Arial" fo:font-size="100%"/>
      </text:list-level-style-bullet>
      <text:list-level-style-bullet text:level="6" text:bullet-char="•">
        <style:list-level-properties text:space-before="2.42951in" text:min-label-width="0.42951in"/>
        <style:text-properties fo:font-family="Arial" fo:font-size="100%"/>
      </text:list-level-style-bullet>
      <text:list-level-style-bullet text:level="7" text:bullet-char="•">
        <style:list-level-properties text:space-before="2.92951in" text:min-label-width="0.42951in"/>
        <style:text-properties fo:font-family="Arial" fo:font-size="100%"/>
      </text:list-level-style-bullet>
      <text:list-level-style-bullet text:level="8" text:bullet-char="•">
        <style:list-level-properties text:space-before="3.42951in" text:min-label-width="0.42951in"/>
        <style:text-properties fo:font-family="Arial" fo:font-size="100%"/>
      </text:list-level-style-bullet>
      <text:list-level-style-bullet text:level="9" text:bullet-char="•">
        <style:list-level-properties text:space-before="3.92951in" text:min-label-width="0.42951in"/>
        <style:text-properties fo:font-family="Arial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37063in"/>
        <style:text-properties fo:font-family="Arial" fo:font-size="100%"/>
      </text:list-level-style-bullet>
      <text:list-level-style-bullet text:level="2" text:bullet-char="•">
        <style:list-level-properties text:space-before="0.37063in" text:min-label-width="0.37063in"/>
        <style:text-properties fo:font-family="Arial" fo:font-size="100%"/>
      </text:list-level-style-bullet>
      <text:list-level-style-bullet text:level="3" text:bullet-char="•">
        <style:list-level-properties text:space-before="0.87063in" text:min-label-width="0.37063in"/>
        <style:text-properties fo:font-family="Arial" fo:font-size="100%"/>
      </text:list-level-style-bullet>
      <text:list-level-style-bullet text:level="4" text:bullet-char="•">
        <style:list-level-properties text:space-before="1.37063in" text:min-label-width="0.37063in"/>
        <style:text-properties fo:font-family="Arial" fo:font-size="100%"/>
      </text:list-level-style-bullet>
      <text:list-level-style-bullet text:level="5" text:bullet-char="•">
        <style:list-level-properties text:space-before="1.87063in" text:min-label-width="0.37063in"/>
        <style:text-properties fo:font-family="Arial" fo:font-size="100%"/>
      </text:list-level-style-bullet>
      <text:list-level-style-bullet text:level="6" text:bullet-char="•">
        <style:list-level-properties text:space-before="2.37063in" text:min-label-width="0.37063in"/>
        <style:text-properties fo:font-family="Arial" fo:font-size="100%"/>
      </text:list-level-style-bullet>
      <text:list-level-style-bullet text:level="7" text:bullet-char="•">
        <style:list-level-properties text:space-before="2.87063in" text:min-label-width="0.37063in"/>
        <style:text-properties fo:font-family="Arial" fo:font-size="100%"/>
      </text:list-level-style-bullet>
      <text:list-level-style-bullet text:level="8" text:bullet-char="•">
        <style:list-level-properties text:space-before="3.37063in" text:min-label-width="0.37063in"/>
        <style:text-properties fo:font-family="Arial" fo:font-size="100%"/>
      </text:list-level-style-bullet>
      <text:list-level-style-bullet text:level="9" text:bullet-char="•">
        <style:list-level-properties text:space-before="3.87063in" text:min-label-width="0.37063in"/>
        <style:text-properties fo:font-family="Arial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37575in"/>
        <style:text-properties fo:font-family="Arial" fo:font-size="100%"/>
      </text:list-level-style-bullet>
      <text:list-level-style-bullet text:level="2" text:bullet-char="•">
        <style:list-level-properties text:space-before="0.37575in" text:min-label-width="0.37575in"/>
        <style:text-properties fo:font-family="Arial" fo:font-size="100%"/>
      </text:list-level-style-bullet>
      <text:list-level-style-bullet text:level="3" text:bullet-char="•">
        <style:list-level-properties text:space-before="0.87575in" text:min-label-width="0.37575in"/>
        <style:text-properties fo:font-family="Arial" fo:font-size="100%"/>
      </text:list-level-style-bullet>
      <text:list-level-style-bullet text:level="4" text:bullet-char="•">
        <style:list-level-properties text:space-before="1.37575in" text:min-label-width="0.37575in"/>
        <style:text-properties fo:font-family="Arial" fo:font-size="100%"/>
      </text:list-level-style-bullet>
      <text:list-level-style-bullet text:level="5" text:bullet-char="•">
        <style:list-level-properties text:space-before="1.87575in" text:min-label-width="0.37575in"/>
        <style:text-properties fo:font-family="Arial" fo:font-size="100%"/>
      </text:list-level-style-bullet>
      <text:list-level-style-bullet text:level="6" text:bullet-char="•">
        <style:list-level-properties text:space-before="2.37575in" text:min-label-width="0.37575in"/>
        <style:text-properties fo:font-family="Arial" fo:font-size="100%"/>
      </text:list-level-style-bullet>
      <text:list-level-style-bullet text:level="7" text:bullet-char="•">
        <style:list-level-properties text:space-before="2.87575in" text:min-label-width="0.37575in"/>
        <style:text-properties fo:font-family="Arial" fo:font-size="100%"/>
      </text:list-level-style-bullet>
      <text:list-level-style-bullet text:level="8" text:bullet-char="•">
        <style:list-level-properties text:space-before="3.37575in" text:min-label-width="0.37575in"/>
        <style:text-properties fo:font-family="Arial" fo:font-size="100%"/>
      </text:list-level-style-bullet>
      <text:list-level-style-bullet text:level="9" text:bullet-char="•">
        <style:list-level-properties text:space-before="3.87575in" text:min-label-width="0.37575in"/>
        <style:text-properties fo:font-family="Arial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42951in"/>
        <style:text-properties fo:font-family="Arial" fo:font-size="100%"/>
      </text:list-level-style-bullet>
      <text:list-level-style-bullet text:level="2" text:bullet-char="•">
        <style:list-level-properties text:space-before="0.42951in" text:min-label-width="0.42951in"/>
        <style:text-properties fo:font-family="Arial" fo:font-size="100%"/>
      </text:list-level-style-bullet>
      <text:list-level-style-bullet text:level="3" text:bullet-char="•">
        <style:list-level-properties text:space-before="0.92951in" text:min-label-width="0.42951in"/>
        <style:text-properties fo:font-family="Arial" fo:font-size="100%"/>
      </text:list-level-style-bullet>
      <text:list-level-style-bullet text:level="4" text:bullet-char="•">
        <style:list-level-properties text:space-before="1.42951in" text:min-label-width="0.42951in"/>
        <style:text-properties fo:font-family="Arial" fo:font-size="100%"/>
      </text:list-level-style-bullet>
      <text:list-level-style-bullet text:level="5" text:bullet-char="•">
        <style:list-level-properties text:space-before="1.92951in" text:min-label-width="0.42951in"/>
        <style:text-properties fo:font-family="Arial" fo:font-size="100%"/>
      </text:list-level-style-bullet>
      <text:list-level-style-bullet text:level="6" text:bullet-char="•">
        <style:list-level-properties text:space-before="2.42951in" text:min-label-width="0.42951in"/>
        <style:text-properties fo:font-family="Arial" fo:font-size="100%"/>
      </text:list-level-style-bullet>
      <text:list-level-style-bullet text:level="7" text:bullet-char="•">
        <style:list-level-properties text:space-before="2.92951in" text:min-label-width="0.42951in"/>
        <style:text-properties fo:font-family="Arial" fo:font-size="100%"/>
      </text:list-level-style-bullet>
      <text:list-level-style-bullet text:level="8" text:bullet-char="•">
        <style:list-level-properties text:space-before="3.42951in" text:min-label-width="0.42951in"/>
        <style:text-properties fo:font-family="Arial" fo:font-size="100%"/>
      </text:list-level-style-bullet>
      <text:list-level-style-bullet text:level="9" text:bullet-char="•">
        <style:list-level-properties text:space-before="3.92951in" text:min-label-width="0.42951in"/>
        <style:text-properties fo:font-family="Arial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37063in"/>
        <style:text-properties fo:font-family="Arial" fo:font-size="100%"/>
      </text:list-level-style-bullet>
      <text:list-level-style-bullet text:level="2" text:bullet-char="•">
        <style:list-level-properties text:space-before="0.37063in" text:min-label-width="0.37063in"/>
        <style:text-properties fo:font-family="Arial" fo:font-size="100%"/>
      </text:list-level-style-bullet>
      <text:list-level-style-bullet text:level="3" text:bullet-char="•">
        <style:list-level-properties text:space-before="0.87063in" text:min-label-width="0.37063in"/>
        <style:text-properties fo:font-family="Arial" fo:font-size="100%"/>
      </text:list-level-style-bullet>
      <text:list-level-style-bullet text:level="4" text:bullet-char="•">
        <style:list-level-properties text:space-before="1.37063in" text:min-label-width="0.37063in"/>
        <style:text-properties fo:font-family="Arial" fo:font-size="100%"/>
      </text:list-level-style-bullet>
      <text:list-level-style-bullet text:level="5" text:bullet-char="•">
        <style:list-level-properties text:space-before="1.87063in" text:min-label-width="0.37063in"/>
        <style:text-properties fo:font-family="Arial" fo:font-size="100%"/>
      </text:list-level-style-bullet>
      <text:list-level-style-bullet text:level="6" text:bullet-char="•">
        <style:list-level-properties text:space-before="2.37063in" text:min-label-width="0.37063in"/>
        <style:text-properties fo:font-family="Arial" fo:font-size="100%"/>
      </text:list-level-style-bullet>
      <text:list-level-style-bullet text:level="7" text:bullet-char="•">
        <style:list-level-properties text:space-before="2.87063in" text:min-label-width="0.37063in"/>
        <style:text-properties fo:font-family="Arial" fo:font-size="100%"/>
      </text:list-level-style-bullet>
      <text:list-level-style-bullet text:level="8" text:bullet-char="•">
        <style:list-level-properties text:space-before="3.37063in" text:min-label-width="0.37063in"/>
        <style:text-properties fo:font-family="Arial" fo:font-size="100%"/>
      </text:list-level-style-bullet>
      <text:list-level-style-bullet text:level="9" text:bullet-char="•">
        <style:list-level-properties text:space-before="3.87063in" text:min-label-width="0.37063in"/>
        <style:text-properties fo:font-family="Arial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42701in"/>
        <style:text-properties fo:font-family="Arial" fo:font-size="100%"/>
      </text:list-level-style-bullet>
      <text:list-level-style-bullet text:level="2" text:bullet-char="•">
        <style:list-level-properties text:space-before="0.427in" text:min-label-width="0.42701in"/>
        <style:text-properties fo:font-family="Arial" fo:font-size="100%"/>
      </text:list-level-style-bullet>
      <text:list-level-style-bullet text:level="3" text:bullet-char="•">
        <style:list-level-properties text:space-before="0.927in" text:min-label-width="0.42701in"/>
        <style:text-properties fo:font-family="Arial" fo:font-size="100%"/>
      </text:list-level-style-bullet>
      <text:list-level-style-bullet text:level="4" text:bullet-char="•">
        <style:list-level-properties text:space-before="1.427in" text:min-label-width="0.42701in"/>
        <style:text-properties fo:font-family="Arial" fo:font-size="100%"/>
      </text:list-level-style-bullet>
      <text:list-level-style-bullet text:level="5" text:bullet-char="•">
        <style:list-level-properties text:space-before="1.927in" text:min-label-width="0.42701in"/>
        <style:text-properties fo:font-family="Arial" fo:font-size="100%"/>
      </text:list-level-style-bullet>
      <text:list-level-style-bullet text:level="6" text:bullet-char="•">
        <style:list-level-properties text:space-before="2.427in" text:min-label-width="0.42701in"/>
        <style:text-properties fo:font-family="Arial" fo:font-size="100%"/>
      </text:list-level-style-bullet>
      <text:list-level-style-bullet text:level="7" text:bullet-char="•">
        <style:list-level-properties text:space-before="2.927in" text:min-label-width="0.42701in"/>
        <style:text-properties fo:font-family="Arial" fo:font-size="100%"/>
      </text:list-level-style-bullet>
      <text:list-level-style-bullet text:level="8" text:bullet-char="•">
        <style:list-level-properties text:space-before="3.427in" text:min-label-width="0.42701in"/>
        <style:text-properties fo:font-family="Arial" fo:font-size="100%"/>
      </text:list-level-style-bullet>
      <text:list-level-style-bullet text:level="9" text:bullet-char="•">
        <style:list-level-properties text:space-before="3.927in" text:min-label-width="0.42701in"/>
        <style:text-properties fo:font-family="Arial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42951in"/>
        <style:text-properties fo:font-family="Arial" fo:font-size="100%"/>
      </text:list-level-style-bullet>
      <text:list-level-style-bullet text:level="2" text:bullet-char="•">
        <style:list-level-properties text:space-before="0.42951in" text:min-label-width="0.42951in"/>
        <style:text-properties fo:font-family="Arial" fo:font-size="100%"/>
      </text:list-level-style-bullet>
      <text:list-level-style-bullet text:level="3" text:bullet-char="•">
        <style:list-level-properties text:space-before="0.92951in" text:min-label-width="0.42951in"/>
        <style:text-properties fo:font-family="Arial" fo:font-size="100%"/>
      </text:list-level-style-bullet>
      <text:list-level-style-bullet text:level="4" text:bullet-char="•">
        <style:list-level-properties text:space-before="1.42951in" text:min-label-width="0.42951in"/>
        <style:text-properties fo:font-family="Arial" fo:font-size="100%"/>
      </text:list-level-style-bullet>
      <text:list-level-style-bullet text:level="5" text:bullet-char="•">
        <style:list-level-properties text:space-before="1.92951in" text:min-label-width="0.42951in"/>
        <style:text-properties fo:font-family="Arial" fo:font-size="100%"/>
      </text:list-level-style-bullet>
      <text:list-level-style-bullet text:level="6" text:bullet-char="•">
        <style:list-level-properties text:space-before="2.42951in" text:min-label-width="0.42951in"/>
        <style:text-properties fo:font-family="Arial" fo:font-size="100%"/>
      </text:list-level-style-bullet>
      <text:list-level-style-bullet text:level="7" text:bullet-char="•">
        <style:list-level-properties text:space-before="2.92951in" text:min-label-width="0.42951in"/>
        <style:text-properties fo:font-family="Arial" fo:font-size="100%"/>
      </text:list-level-style-bullet>
      <text:list-level-style-bullet text:level="8" text:bullet-char="•">
        <style:list-level-properties text:space-before="3.42951in" text:min-label-width="0.42951in"/>
        <style:text-properties fo:font-family="Arial" fo:font-size="100%"/>
      </text:list-level-style-bullet>
      <text:list-level-style-bullet text:level="9" text:bullet-char="•">
        <style:list-level-properties text:space-before="3.92951in" text:min-label-width="0.42951in"/>
        <style:text-properties fo:font-family="Arial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7063in"/>
        <style:text-properties fo:font-family="Arial" fo:font-size="100%"/>
      </text:list-level-style-bullet>
      <text:list-level-style-bullet text:level="2" text:bullet-char="•">
        <style:list-level-properties text:space-before="0.37063in" text:min-label-width="0.37063in"/>
        <style:text-properties fo:font-family="Arial" fo:font-size="100%"/>
      </text:list-level-style-bullet>
      <text:list-level-style-bullet text:level="3" text:bullet-char="•">
        <style:list-level-properties text:space-before="0.87063in" text:min-label-width="0.37063in"/>
        <style:text-properties fo:font-family="Arial" fo:font-size="100%"/>
      </text:list-level-style-bullet>
      <text:list-level-style-bullet text:level="4" text:bullet-char="•">
        <style:list-level-properties text:space-before="1.37063in" text:min-label-width="0.37063in"/>
        <style:text-properties fo:font-family="Arial" fo:font-size="100%"/>
      </text:list-level-style-bullet>
      <text:list-level-style-bullet text:level="5" text:bullet-char="•">
        <style:list-level-properties text:space-before="1.87063in" text:min-label-width="0.37063in"/>
        <style:text-properties fo:font-family="Arial" fo:font-size="100%"/>
      </text:list-level-style-bullet>
      <text:list-level-style-bullet text:level="6" text:bullet-char="•">
        <style:list-level-properties text:space-before="2.37063in" text:min-label-width="0.37063in"/>
        <style:text-properties fo:font-family="Arial" fo:font-size="100%"/>
      </text:list-level-style-bullet>
      <text:list-level-style-bullet text:level="7" text:bullet-char="•">
        <style:list-level-properties text:space-before="2.87063in" text:min-label-width="0.37063in"/>
        <style:text-properties fo:font-family="Arial" fo:font-size="100%"/>
      </text:list-level-style-bullet>
      <text:list-level-style-bullet text:level="8" text:bullet-char="•">
        <style:list-level-properties text:space-before="3.37063in" text:min-label-width="0.37063in"/>
        <style:text-properties fo:font-family="Arial" fo:font-size="100%"/>
      </text:list-level-style-bullet>
      <text:list-level-style-bullet text:level="9" text:bullet-char="•">
        <style:list-level-properties text:space-before="3.87063in" text:min-label-width="0.37063in"/>
        <style:text-properties fo:font-family="Arial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42701in"/>
        <style:text-properties fo:font-family="Arial" fo:font-size="100%"/>
      </text:list-level-style-bullet>
      <text:list-level-style-bullet text:level="2" text:bullet-char="•">
        <style:list-level-properties text:space-before="0.427in" text:min-label-width="0.42701in"/>
        <style:text-properties fo:font-family="Arial" fo:font-size="100%"/>
      </text:list-level-style-bullet>
      <text:list-level-style-bullet text:level="3" text:bullet-char="•">
        <style:list-level-properties text:space-before="0.927in" text:min-label-width="0.42701in"/>
        <style:text-properties fo:font-family="Arial" fo:font-size="100%"/>
      </text:list-level-style-bullet>
      <text:list-level-style-bullet text:level="4" text:bullet-char="•">
        <style:list-level-properties text:space-before="1.427in" text:min-label-width="0.42701in"/>
        <style:text-properties fo:font-family="Arial" fo:font-size="100%"/>
      </text:list-level-style-bullet>
      <text:list-level-style-bullet text:level="5" text:bullet-char="•">
        <style:list-level-properties text:space-before="1.927in" text:min-label-width="0.42701in"/>
        <style:text-properties fo:font-family="Arial" fo:font-size="100%"/>
      </text:list-level-style-bullet>
      <text:list-level-style-bullet text:level="6" text:bullet-char="•">
        <style:list-level-properties text:space-before="2.427in" text:min-label-width="0.42701in"/>
        <style:text-properties fo:font-family="Arial" fo:font-size="100%"/>
      </text:list-level-style-bullet>
      <text:list-level-style-bullet text:level="7" text:bullet-char="•">
        <style:list-level-properties text:space-before="2.927in" text:min-label-width="0.42701in"/>
        <style:text-properties fo:font-family="Arial" fo:font-size="100%"/>
      </text:list-level-style-bullet>
      <text:list-level-style-bullet text:level="8" text:bullet-char="•">
        <style:list-level-properties text:space-before="3.427in" text:min-label-width="0.42701in"/>
        <style:text-properties fo:font-family="Arial" fo:font-size="100%"/>
      </text:list-level-style-bullet>
      <text:list-level-style-bullet text:level="9" text:bullet-char="•">
        <style:list-level-properties text:space-before="3.927in" text:min-label-width="0.42701in"/>
        <style:text-properties fo:font-family="Arial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576in"/>
        <style:text-properties fo:font-family="Arial" fo:font-size="100%"/>
      </text:list-level-style-bullet>
      <text:list-level-style-bullet text:level="2" text:bullet-char="•">
        <style:list-level-properties text:space-before="0.3576in" text:min-label-width="0.3576in"/>
        <style:text-properties fo:font-family="Arial" fo:font-size="100%"/>
      </text:list-level-style-bullet>
      <text:list-level-style-bullet text:level="3" text:bullet-char="•">
        <style:list-level-properties text:space-before="0.8576in" text:min-label-width="0.3576in"/>
        <style:text-properties fo:font-family="Arial" fo:font-size="100%"/>
      </text:list-level-style-bullet>
      <text:list-level-style-bullet text:level="4" text:bullet-char="•">
        <style:list-level-properties text:space-before="1.3576in" text:min-label-width="0.3576in"/>
        <style:text-properties fo:font-family="Arial" fo:font-size="100%"/>
      </text:list-level-style-bullet>
      <text:list-level-style-bullet text:level="5" text:bullet-char="•">
        <style:list-level-properties text:space-before="1.8576in" text:min-label-width="0.3576in"/>
        <style:text-properties fo:font-family="Arial" fo:font-size="100%"/>
      </text:list-level-style-bullet>
      <text:list-level-style-bullet text:level="6" text:bullet-char="•">
        <style:list-level-properties text:space-before="2.3576in" text:min-label-width="0.3576in"/>
        <style:text-properties fo:font-family="Arial" fo:font-size="100%"/>
      </text:list-level-style-bullet>
      <text:list-level-style-bullet text:level="7" text:bullet-char="•">
        <style:list-level-properties text:space-before="2.8576in" text:min-label-width="0.3576in"/>
        <style:text-properties fo:font-family="Arial" fo:font-size="100%"/>
      </text:list-level-style-bullet>
      <text:list-level-style-bullet text:level="8" text:bullet-char="•">
        <style:list-level-properties text:space-before="3.3576in" text:min-label-width="0.3576in"/>
        <style:text-properties fo:font-family="Arial" fo:font-size="100%"/>
      </text:list-level-style-bullet>
      <text:list-level-style-bullet text:level="9" text:bullet-char="•">
        <style:list-level-properties text:space-before="3.8576in" text:min-label-width="0.3576in"/>
        <style:text-properties fo:font-family="Arial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3576in"/>
        <style:text-properties fo:font-family="Arial" fo:font-size="100%"/>
      </text:list-level-style-bullet>
      <text:list-level-style-bullet text:level="2" text:bullet-char="•">
        <style:list-level-properties text:space-before="0.3576in" text:min-label-width="0.3576in"/>
        <style:text-properties fo:font-family="Arial" fo:font-size="100%"/>
      </text:list-level-style-bullet>
      <text:list-level-style-bullet text:level="3" text:bullet-char="•">
        <style:list-level-properties text:space-before="0.8576in" text:min-label-width="0.3576in"/>
        <style:text-properties fo:font-family="Arial" fo:font-size="100%"/>
      </text:list-level-style-bullet>
      <text:list-level-style-bullet text:level="4" text:bullet-char="•">
        <style:list-level-properties text:space-before="1.3576in" text:min-label-width="0.3576in"/>
        <style:text-properties fo:font-family="Arial" fo:font-size="100%"/>
      </text:list-level-style-bullet>
      <text:list-level-style-bullet text:level="5" text:bullet-char="•">
        <style:list-level-properties text:space-before="1.8576in" text:min-label-width="0.3576in"/>
        <style:text-properties fo:font-family="Arial" fo:font-size="100%"/>
      </text:list-level-style-bullet>
      <text:list-level-style-bullet text:level="6" text:bullet-char="•">
        <style:list-level-properties text:space-before="2.3576in" text:min-label-width="0.3576in"/>
        <style:text-properties fo:font-family="Arial" fo:font-size="100%"/>
      </text:list-level-style-bullet>
      <text:list-level-style-bullet text:level="7" text:bullet-char="•">
        <style:list-level-properties text:space-before="2.8576in" text:min-label-width="0.3576in"/>
        <style:text-properties fo:font-family="Arial" fo:font-size="100%"/>
      </text:list-level-style-bullet>
      <text:list-level-style-bullet text:level="8" text:bullet-char="•">
        <style:list-level-properties text:space-before="3.3576in" text:min-label-width="0.3576in"/>
        <style:text-properties fo:font-family="Arial" fo:font-size="100%"/>
      </text:list-level-style-bullet>
      <text:list-level-style-bullet text:level="9" text:bullet-char="•">
        <style:list-level-properties text:space-before="3.8576in" text:min-label-width="0.3576in"/>
        <style:text-properties fo:font-family="Arial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576in"/>
        <style:text-properties fo:font-family="Arial" fo:font-size="100%"/>
      </text:list-level-style-bullet>
      <text:list-level-style-bullet text:level="2" text:bullet-char="•">
        <style:list-level-properties text:space-before="0.3576in" text:min-label-width="0.3576in"/>
        <style:text-properties fo:font-family="Arial" fo:font-size="100%"/>
      </text:list-level-style-bullet>
      <text:list-level-style-bullet text:level="3" text:bullet-char="•">
        <style:list-level-properties text:space-before="0.8576in" text:min-label-width="0.3576in"/>
        <style:text-properties fo:font-family="Arial" fo:font-size="100%"/>
      </text:list-level-style-bullet>
      <text:list-level-style-bullet text:level="4" text:bullet-char="•">
        <style:list-level-properties text:space-before="1.3576in" text:min-label-width="0.3576in"/>
        <style:text-properties fo:font-family="Arial" fo:font-size="100%"/>
      </text:list-level-style-bullet>
      <text:list-level-style-bullet text:level="5" text:bullet-char="•">
        <style:list-level-properties text:space-before="1.8576in" text:min-label-width="0.3576in"/>
        <style:text-properties fo:font-family="Arial" fo:font-size="100%"/>
      </text:list-level-style-bullet>
      <text:list-level-style-bullet text:level="6" text:bullet-char="•">
        <style:list-level-properties text:space-before="2.3576in" text:min-label-width="0.3576in"/>
        <style:text-properties fo:font-family="Arial" fo:font-size="100%"/>
      </text:list-level-style-bullet>
      <text:list-level-style-bullet text:level="7" text:bullet-char="•">
        <style:list-level-properties text:space-before="2.8576in" text:min-label-width="0.3576in"/>
        <style:text-properties fo:font-family="Arial" fo:font-size="100%"/>
      </text:list-level-style-bullet>
      <text:list-level-style-bullet text:level="8" text:bullet-char="•">
        <style:list-level-properties text:space-before="3.3576in" text:min-label-width="0.3576in"/>
        <style:text-properties fo:font-family="Arial" fo:font-size="100%"/>
      </text:list-level-style-bullet>
      <text:list-level-style-bullet text:level="9" text:bullet-char="•">
        <style:list-level-properties text:space-before="3.8576in" text:min-label-width="0.3576in"/>
        <style:text-properties fo:font-family="Arial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48567in"/>
        <style:text-properties fo:font-family="Arial" fo:font-size="100%"/>
      </text:list-level-style-bullet>
      <text:list-level-style-bullet text:level="2" text:bullet-char="•">
        <style:list-level-properties text:space-before="0.48567in" text:min-label-width="0.48567in"/>
        <style:text-properties fo:font-family="Arial" fo:font-size="100%"/>
      </text:list-level-style-bullet>
      <text:list-level-style-bullet text:level="3" text:bullet-char="•">
        <style:list-level-properties text:space-before="0.98567in" text:min-label-width="0.48567in"/>
        <style:text-properties fo:font-family="Arial" fo:font-size="100%"/>
      </text:list-level-style-bullet>
      <text:list-level-style-bullet text:level="4" text:bullet-char="•">
        <style:list-level-properties text:space-before="1.48567in" text:min-label-width="0.48567in"/>
        <style:text-properties fo:font-family="Arial" fo:font-size="100%"/>
      </text:list-level-style-bullet>
      <text:list-level-style-bullet text:level="5" text:bullet-char="•">
        <style:list-level-properties text:space-before="1.98567in" text:min-label-width="0.48567in"/>
        <style:text-properties fo:font-family="Arial" fo:font-size="100%"/>
      </text:list-level-style-bullet>
      <text:list-level-style-bullet text:level="6" text:bullet-char="•">
        <style:list-level-properties text:space-before="2.48567in" text:min-label-width="0.48567in"/>
        <style:text-properties fo:font-family="Arial" fo:font-size="100%"/>
      </text:list-level-style-bullet>
      <text:list-level-style-bullet text:level="7" text:bullet-char="•">
        <style:list-level-properties text:space-before="2.98567in" text:min-label-width="0.48567in"/>
        <style:text-properties fo:font-family="Arial" fo:font-size="100%"/>
      </text:list-level-style-bullet>
      <text:list-level-style-bullet text:level="8" text:bullet-char="•">
        <style:list-level-properties text:space-before="3.48567in" text:min-label-width="0.48567in"/>
        <style:text-properties fo:font-family="Arial" fo:font-size="100%"/>
      </text:list-level-style-bullet>
      <text:list-level-style-bullet text:level="9" text:bullet-char="•">
        <style:list-level-properties text:space-before="3.98567in" text:min-label-width="0.48567in"/>
        <style:text-properties fo:font-family="Arial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48163in"/>
        <style:text-properties fo:font-family="Arial" fo:font-size="100%"/>
      </text:list-level-style-bullet>
      <text:list-level-style-bullet text:level="2" text:bullet-char="•">
        <style:list-level-properties text:space-before="0.48163in" text:min-label-width="0.48163in"/>
        <style:text-properties fo:font-family="Arial" fo:font-size="100%"/>
      </text:list-level-style-bullet>
      <text:list-level-style-bullet text:level="3" text:bullet-char="•">
        <style:list-level-properties text:space-before="0.98163in" text:min-label-width="0.48163in"/>
        <style:text-properties fo:font-family="Arial" fo:font-size="100%"/>
      </text:list-level-style-bullet>
      <text:list-level-style-bullet text:level="4" text:bullet-char="•">
        <style:list-level-properties text:space-before="1.48163in" text:min-label-width="0.48163in"/>
        <style:text-properties fo:font-family="Arial" fo:font-size="100%"/>
      </text:list-level-style-bullet>
      <text:list-level-style-bullet text:level="5" text:bullet-char="•">
        <style:list-level-properties text:space-before="1.98163in" text:min-label-width="0.48163in"/>
        <style:text-properties fo:font-family="Arial" fo:font-size="100%"/>
      </text:list-level-style-bullet>
      <text:list-level-style-bullet text:level="6" text:bullet-char="•">
        <style:list-level-properties text:space-before="2.48163in" text:min-label-width="0.48163in"/>
        <style:text-properties fo:font-family="Arial" fo:font-size="100%"/>
      </text:list-level-style-bullet>
      <text:list-level-style-bullet text:level="7" text:bullet-char="•">
        <style:list-level-properties text:space-before="2.98163in" text:min-label-width="0.48163in"/>
        <style:text-properties fo:font-family="Arial" fo:font-size="100%"/>
      </text:list-level-style-bullet>
      <text:list-level-style-bullet text:level="8" text:bullet-char="•">
        <style:list-level-properties text:space-before="3.48163in" text:min-label-width="0.48163in"/>
        <style:text-properties fo:font-family="Arial" fo:font-size="100%"/>
      </text:list-level-style-bullet>
      <text:list-level-style-bullet text:level="9" text:bullet-char="•">
        <style:list-level-properties text:space-before="3.98163in" text:min-label-width="0.48163in"/>
        <style:text-properties fo:font-family="Arial" fo:font-size="100%"/>
      </text:list-level-style-bullet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34">
      <text:list-level-style-bullet text:level="1" text:bullet-char="•">
        <style:list-level-properties text:space-before="0in" text:min-label-width="0.48567in"/>
        <style:text-properties fo:font-family="Arial" fo:font-size="100%"/>
      </text:list-level-style-bullet>
      <text:list-level-style-bullet text:level="2" text:bullet-char="•">
        <style:list-level-properties text:space-before="0.48567in" text:min-label-width="0.48567in"/>
        <style:text-properties fo:font-family="Arial" fo:font-size="100%"/>
      </text:list-level-style-bullet>
      <text:list-level-style-bullet text:level="3" text:bullet-char="•">
        <style:list-level-properties text:space-before="0.98567in" text:min-label-width="0.48567in"/>
        <style:text-properties fo:font-family="Arial" fo:font-size="100%"/>
      </text:list-level-style-bullet>
      <text:list-level-style-bullet text:level="4" text:bullet-char="•">
        <style:list-level-properties text:space-before="1.48567in" text:min-label-width="0.48567in"/>
        <style:text-properties fo:font-family="Arial" fo:font-size="100%"/>
      </text:list-level-style-bullet>
      <text:list-level-style-bullet text:level="5" text:bullet-char="•">
        <style:list-level-properties text:space-before="1.98567in" text:min-label-width="0.48567in"/>
        <style:text-properties fo:font-family="Arial" fo:font-size="100%"/>
      </text:list-level-style-bullet>
      <text:list-level-style-bullet text:level="6" text:bullet-char="•">
        <style:list-level-properties text:space-before="2.48567in" text:min-label-width="0.48567in"/>
        <style:text-properties fo:font-family="Arial" fo:font-size="100%"/>
      </text:list-level-style-bullet>
      <text:list-level-style-bullet text:level="7" text:bullet-char="•">
        <style:list-level-properties text:space-before="2.98567in" text:min-label-width="0.48567in"/>
        <style:text-properties fo:font-family="Arial" fo:font-size="100%"/>
      </text:list-level-style-bullet>
      <text:list-level-style-bullet text:level="8" text:bullet-char="•">
        <style:list-level-properties text:space-before="3.48567in" text:min-label-width="0.48567in"/>
        <style:text-properties fo:font-family="Arial" fo:font-size="100%"/>
      </text:list-level-style-bullet>
      <text:list-level-style-bullet text:level="9" text:bullet-char="•">
        <style:list-level-properties text:space-before="3.98567in" text:min-label-width="0.48567in"/>
        <style:text-properties fo:font-family="Arial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48163in"/>
        <style:text-properties fo:font-family="Arial" fo:font-size="100%"/>
      </text:list-level-style-bullet>
      <text:list-level-style-bullet text:level="2" text:bullet-char="•">
        <style:list-level-properties text:space-before="0.48163in" text:min-label-width="0.48163in"/>
        <style:text-properties fo:font-family="Arial" fo:font-size="100%"/>
      </text:list-level-style-bullet>
      <text:list-level-style-bullet text:level="3" text:bullet-char="•">
        <style:list-level-properties text:space-before="0.98163in" text:min-label-width="0.48163in"/>
        <style:text-properties fo:font-family="Arial" fo:font-size="100%"/>
      </text:list-level-style-bullet>
      <text:list-level-style-bullet text:level="4" text:bullet-char="•">
        <style:list-level-properties text:space-before="1.48163in" text:min-label-width="0.48163in"/>
        <style:text-properties fo:font-family="Arial" fo:font-size="100%"/>
      </text:list-level-style-bullet>
      <text:list-level-style-bullet text:level="5" text:bullet-char="•">
        <style:list-level-properties text:space-before="1.98163in" text:min-label-width="0.48163in"/>
        <style:text-properties fo:font-family="Arial" fo:font-size="100%"/>
      </text:list-level-style-bullet>
      <text:list-level-style-bullet text:level="6" text:bullet-char="•">
        <style:list-level-properties text:space-before="2.48163in" text:min-label-width="0.48163in"/>
        <style:text-properties fo:font-family="Arial" fo:font-size="100%"/>
      </text:list-level-style-bullet>
      <text:list-level-style-bullet text:level="7" text:bullet-char="•">
        <style:list-level-properties text:space-before="2.98163in" text:min-label-width="0.48163in"/>
        <style:text-properties fo:font-family="Arial" fo:font-size="100%"/>
      </text:list-level-style-bullet>
      <text:list-level-style-bullet text:level="8" text:bullet-char="•">
        <style:list-level-properties text:space-before="3.48163in" text:min-label-width="0.48163in"/>
        <style:text-properties fo:font-family="Arial" fo:font-size="100%"/>
      </text:list-level-style-bullet>
      <text:list-level-style-bullet text:level="9" text:bullet-char="•">
        <style:list-level-properties text:space-before="3.98163in" text:min-label-width="0.48163in"/>
        <style:text-properties fo:font-family="Arial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966in"/>
        <style:text-properties fo:font-family="Arial" fo:font-size="100%"/>
      </text:list-level-style-bullet>
      <text:list-level-style-bullet text:level="2" text:bullet-char="•">
        <style:list-level-properties text:space-before="0.3966in" text:min-label-width="0.3966in"/>
        <style:text-properties fo:font-family="Arial" fo:font-size="100%"/>
      </text:list-level-style-bullet>
      <text:list-level-style-bullet text:level="3" text:bullet-char="•">
        <style:list-level-properties text:space-before="0.8966in" text:min-label-width="0.3966in"/>
        <style:text-properties fo:font-family="Arial" fo:font-size="100%"/>
      </text:list-level-style-bullet>
      <text:list-level-style-bullet text:level="4" text:bullet-char="•">
        <style:list-level-properties text:space-before="1.3966in" text:min-label-width="0.3966in"/>
        <style:text-properties fo:font-family="Arial" fo:font-size="100%"/>
      </text:list-level-style-bullet>
      <text:list-level-style-bullet text:level="5" text:bullet-char="•">
        <style:list-level-properties text:space-before="1.8966in" text:min-label-width="0.3966in"/>
        <style:text-properties fo:font-family="Arial" fo:font-size="100%"/>
      </text:list-level-style-bullet>
      <text:list-level-style-bullet text:level="6" text:bullet-char="•">
        <style:list-level-properties text:space-before="2.3966in" text:min-label-width="0.3966in"/>
        <style:text-properties fo:font-family="Arial" fo:font-size="100%"/>
      </text:list-level-style-bullet>
      <text:list-level-style-bullet text:level="7" text:bullet-char="•">
        <style:list-level-properties text:space-before="2.8966in" text:min-label-width="0.3966in"/>
        <style:text-properties fo:font-family="Arial" fo:font-size="100%"/>
      </text:list-level-style-bullet>
      <text:list-level-style-bullet text:level="8" text:bullet-char="•">
        <style:list-level-properties text:space-before="3.3966in" text:min-label-width="0.3966in"/>
        <style:text-properties fo:font-family="Arial" fo:font-size="100%"/>
      </text:list-level-style-bullet>
      <text:list-level-style-bullet text:level="9" text:bullet-char="•">
        <style:list-level-properties text:space-before="3.8966in" text:min-label-width="0.3966in"/>
        <style:text-properties fo:font-family="Arial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48567in"/>
        <style:text-properties fo:font-family="Arial" fo:font-size="100%"/>
      </text:list-level-style-bullet>
      <text:list-level-style-bullet text:level="2" text:bullet-char="•">
        <style:list-level-properties text:space-before="0.48567in" text:min-label-width="0.48567in"/>
        <style:text-properties fo:font-family="Arial" fo:font-size="100%"/>
      </text:list-level-style-bullet>
      <text:list-level-style-bullet text:level="3" text:bullet-char="•">
        <style:list-level-properties text:space-before="0.98567in" text:min-label-width="0.48567in"/>
        <style:text-properties fo:font-family="Arial" fo:font-size="100%"/>
      </text:list-level-style-bullet>
      <text:list-level-style-bullet text:level="4" text:bullet-char="•">
        <style:list-level-properties text:space-before="1.48567in" text:min-label-width="0.48567in"/>
        <style:text-properties fo:font-family="Arial" fo:font-size="100%"/>
      </text:list-level-style-bullet>
      <text:list-level-style-bullet text:level="5" text:bullet-char="•">
        <style:list-level-properties text:space-before="1.98567in" text:min-label-width="0.48567in"/>
        <style:text-properties fo:font-family="Arial" fo:font-size="100%"/>
      </text:list-level-style-bullet>
      <text:list-level-style-bullet text:level="6" text:bullet-char="•">
        <style:list-level-properties text:space-before="2.48567in" text:min-label-width="0.48567in"/>
        <style:text-properties fo:font-family="Arial" fo:font-size="100%"/>
      </text:list-level-style-bullet>
      <text:list-level-style-bullet text:level="7" text:bullet-char="•">
        <style:list-level-properties text:space-before="2.98567in" text:min-label-width="0.48567in"/>
        <style:text-properties fo:font-family="Arial" fo:font-size="100%"/>
      </text:list-level-style-bullet>
      <text:list-level-style-bullet text:level="8" text:bullet-char="•">
        <style:list-level-properties text:space-before="3.48567in" text:min-label-width="0.48567in"/>
        <style:text-properties fo:font-family="Arial" fo:font-size="100%"/>
      </text:list-level-style-bullet>
      <text:list-level-style-bullet text:level="9" text:bullet-char="•">
        <style:list-level-properties text:space-before="3.98567in" text:min-label-width="0.48567in"/>
        <style:text-properties fo:font-family="Arial" fo:font-size="100%"/>
      </text:list-level-style-bullet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1">
      <text:list-level-style-bullet text:level="1" text:bullet-char="•">
        <style:list-level-properties text:space-before="0in" text:min-label-width="0.43235in"/>
        <style:text-properties fo:font-family="Arial" fo:font-size="100%"/>
      </text:list-level-style-bullet>
      <text:list-level-style-bullet text:level="2" text:bullet-char="•">
        <style:list-level-properties text:space-before="0.43235in" text:min-label-width="0.43235in"/>
        <style:text-properties fo:font-family="Arial" fo:font-size="100%"/>
      </text:list-level-style-bullet>
      <text:list-level-style-bullet text:level="3" text:bullet-char="•">
        <style:list-level-properties text:space-before="0.93235in" text:min-label-width="0.43235in"/>
        <style:text-properties fo:font-family="Arial" fo:font-size="100%"/>
      </text:list-level-style-bullet>
      <text:list-level-style-bullet text:level="4" text:bullet-char="•">
        <style:list-level-properties text:space-before="1.43235in" text:min-label-width="0.43235in"/>
        <style:text-properties fo:font-family="Arial" fo:font-size="100%"/>
      </text:list-level-style-bullet>
      <text:list-level-style-bullet text:level="5" text:bullet-char="•">
        <style:list-level-properties text:space-before="1.93235in" text:min-label-width="0.43235in"/>
        <style:text-properties fo:font-family="Arial" fo:font-size="100%"/>
      </text:list-level-style-bullet>
      <text:list-level-style-bullet text:level="6" text:bullet-char="•">
        <style:list-level-properties text:space-before="2.43235in" text:min-label-width="0.43235in"/>
        <style:text-properties fo:font-family="Arial" fo:font-size="100%"/>
      </text:list-level-style-bullet>
      <text:list-level-style-bullet text:level="7" text:bullet-char="•">
        <style:list-level-properties text:space-before="2.93235in" text:min-label-width="0.43235in"/>
        <style:text-properties fo:font-family="Arial" fo:font-size="100%"/>
      </text:list-level-style-bullet>
      <text:list-level-style-bullet text:level="8" text:bullet-char="•">
        <style:list-level-properties text:space-before="3.43235in" text:min-label-width="0.43235in"/>
        <style:text-properties fo:font-family="Arial" fo:font-size="100%"/>
      </text:list-level-style-bullet>
      <text:list-level-style-bullet text:level="9" text:bullet-char="•">
        <style:list-level-properties text:space-before="3.93235in" text:min-label-width="0.43235in"/>
        <style:text-properties fo:font-family="Arial" fo:font-size="100%"/>
      </text:list-level-style-bullet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22">
      <text:list-level-style-bullet text:level="1" text:bullet-char="•">
        <style:list-level-properties text:space-before="0in" text:min-label-width="0.37575in"/>
        <style:text-properties fo:font-family="Arial" fo:font-size="100%"/>
      </text:list-level-style-bullet>
      <text:list-level-style-bullet text:level="2" text:bullet-char="•">
        <style:list-level-properties text:space-before="0.37575in" text:min-label-width="0.37575in"/>
        <style:text-properties fo:font-family="Arial" fo:font-size="100%"/>
      </text:list-level-style-bullet>
      <text:list-level-style-bullet text:level="3" text:bullet-char="•">
        <style:list-level-properties text:space-before="0.87575in" text:min-label-width="0.37575in"/>
        <style:text-properties fo:font-family="Arial" fo:font-size="100%"/>
      </text:list-level-style-bullet>
      <text:list-level-style-bullet text:level="4" text:bullet-char="•">
        <style:list-level-properties text:space-before="1.37575in" text:min-label-width="0.37575in"/>
        <style:text-properties fo:font-family="Arial" fo:font-size="100%"/>
      </text:list-level-style-bullet>
      <text:list-level-style-bullet text:level="5" text:bullet-char="•">
        <style:list-level-properties text:space-before="1.87575in" text:min-label-width="0.37575in"/>
        <style:text-properties fo:font-family="Arial" fo:font-size="100%"/>
      </text:list-level-style-bullet>
      <text:list-level-style-bullet text:level="6" text:bullet-char="•">
        <style:list-level-properties text:space-before="2.37575in" text:min-label-width="0.37575in"/>
        <style:text-properties fo:font-family="Arial" fo:font-size="100%"/>
      </text:list-level-style-bullet>
      <text:list-level-style-bullet text:level="7" text:bullet-char="•">
        <style:list-level-properties text:space-before="2.87575in" text:min-label-width="0.37575in"/>
        <style:text-properties fo:font-family="Arial" fo:font-size="100%"/>
      </text:list-level-style-bullet>
      <text:list-level-style-bullet text:level="8" text:bullet-char="•">
        <style:list-level-properties text:space-before="3.37575in" text:min-label-width="0.37575in"/>
        <style:text-properties fo:font-family="Arial" fo:font-size="100%"/>
      </text:list-level-style-bullet>
      <text:list-level-style-bullet text:level="9" text:bullet-char="•">
        <style:list-level-properties text:space-before="3.87575in" text:min-label-width="0.37575in"/>
        <style:text-properties fo:font-family="Arial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37575in"/>
        <style:text-properties fo:font-family="Arial" fo:font-size="100%"/>
      </text:list-level-style-bullet>
      <text:list-level-style-bullet text:level="2" text:bullet-char="•">
        <style:list-level-properties text:space-before="0.37575in" text:min-label-width="0.37575in"/>
        <style:text-properties fo:font-family="Arial" fo:font-size="100%"/>
      </text:list-level-style-bullet>
      <text:list-level-style-bullet text:level="3" text:bullet-char="•">
        <style:list-level-properties text:space-before="0.87575in" text:min-label-width="0.37575in"/>
        <style:text-properties fo:font-family="Arial" fo:font-size="100%"/>
      </text:list-level-style-bullet>
      <text:list-level-style-bullet text:level="4" text:bullet-char="•">
        <style:list-level-properties text:space-before="1.37575in" text:min-label-width="0.37575in"/>
        <style:text-properties fo:font-family="Arial" fo:font-size="100%"/>
      </text:list-level-style-bullet>
      <text:list-level-style-bullet text:level="5" text:bullet-char="•">
        <style:list-level-properties text:space-before="1.87575in" text:min-label-width="0.37575in"/>
        <style:text-properties fo:font-family="Arial" fo:font-size="100%"/>
      </text:list-level-style-bullet>
      <text:list-level-style-bullet text:level="6" text:bullet-char="•">
        <style:list-level-properties text:space-before="2.37575in" text:min-label-width="0.37575in"/>
        <style:text-properties fo:font-family="Arial" fo:font-size="100%"/>
      </text:list-level-style-bullet>
      <text:list-level-style-bullet text:level="7" text:bullet-char="•">
        <style:list-level-properties text:space-before="2.87575in" text:min-label-width="0.37575in"/>
        <style:text-properties fo:font-family="Arial" fo:font-size="100%"/>
      </text:list-level-style-bullet>
      <text:list-level-style-bullet text:level="8" text:bullet-char="•">
        <style:list-level-properties text:space-before="3.37575in" text:min-label-width="0.37575in"/>
        <style:text-properties fo:font-family="Arial" fo:font-size="100%"/>
      </text:list-level-style-bullet>
      <text:list-level-style-bullet text:level="9" text:bullet-char="•">
        <style:list-level-properties text:space-before="3.87575in" text:min-label-width="0.37575in"/>
        <style:text-properties fo:font-family="Arial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37063in"/>
        <style:text-properties fo:font-family="Arial" fo:font-size="100%"/>
      </text:list-level-style-bullet>
      <text:list-level-style-bullet text:level="2" text:bullet-char="•">
        <style:list-level-properties text:space-before="0.37063in" text:min-label-width="0.37063in"/>
        <style:text-properties fo:font-family="Arial" fo:font-size="100%"/>
      </text:list-level-style-bullet>
      <text:list-level-style-bullet text:level="3" text:bullet-char="•">
        <style:list-level-properties text:space-before="0.87063in" text:min-label-width="0.37063in"/>
        <style:text-properties fo:font-family="Arial" fo:font-size="100%"/>
      </text:list-level-style-bullet>
      <text:list-level-style-bullet text:level="4" text:bullet-char="•">
        <style:list-level-properties text:space-before="1.37063in" text:min-label-width="0.37063in"/>
        <style:text-properties fo:font-family="Arial" fo:font-size="100%"/>
      </text:list-level-style-bullet>
      <text:list-level-style-bullet text:level="5" text:bullet-char="•">
        <style:list-level-properties text:space-before="1.87063in" text:min-label-width="0.37063in"/>
        <style:text-properties fo:font-family="Arial" fo:font-size="100%"/>
      </text:list-level-style-bullet>
      <text:list-level-style-bullet text:level="6" text:bullet-char="•">
        <style:list-level-properties text:space-before="2.37063in" text:min-label-width="0.37063in"/>
        <style:text-properties fo:font-family="Arial" fo:font-size="100%"/>
      </text:list-level-style-bullet>
      <text:list-level-style-bullet text:level="7" text:bullet-char="•">
        <style:list-level-properties text:space-before="2.87063in" text:min-label-width="0.37063in"/>
        <style:text-properties fo:font-family="Arial" fo:font-size="100%"/>
      </text:list-level-style-bullet>
      <text:list-level-style-bullet text:level="8" text:bullet-char="•">
        <style:list-level-properties text:space-before="3.37063in" text:min-label-width="0.37063in"/>
        <style:text-properties fo:font-family="Arial" fo:font-size="100%"/>
      </text:list-level-style-bullet>
      <text:list-level-style-bullet text:level="9" text:bullet-char="•">
        <style:list-level-properties text:space-before="3.87063in" text:min-label-width="0.37063in"/>
        <style:text-properties fo:font-family="Arial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966in"/>
        <style:text-properties fo:font-family="Arial" fo:font-size="100%"/>
      </text:list-level-style-bullet>
      <text:list-level-style-bullet text:level="2" text:bullet-char="•">
        <style:list-level-properties text:space-before="0.3966in" text:min-label-width="0.3966in"/>
        <style:text-properties fo:font-family="Arial" fo:font-size="100%"/>
      </text:list-level-style-bullet>
      <text:list-level-style-bullet text:level="3" text:bullet-char="•">
        <style:list-level-properties text:space-before="0.8966in" text:min-label-width="0.3966in"/>
        <style:text-properties fo:font-family="Arial" fo:font-size="100%"/>
      </text:list-level-style-bullet>
      <text:list-level-style-bullet text:level="4" text:bullet-char="•">
        <style:list-level-properties text:space-before="1.3966in" text:min-label-width="0.3966in"/>
        <style:text-properties fo:font-family="Arial" fo:font-size="100%"/>
      </text:list-level-style-bullet>
      <text:list-level-style-bullet text:level="5" text:bullet-char="•">
        <style:list-level-properties text:space-before="1.8966in" text:min-label-width="0.3966in"/>
        <style:text-properties fo:font-family="Arial" fo:font-size="100%"/>
      </text:list-level-style-bullet>
      <text:list-level-style-bullet text:level="6" text:bullet-char="•">
        <style:list-level-properties text:space-before="2.3966in" text:min-label-width="0.3966in"/>
        <style:text-properties fo:font-family="Arial" fo:font-size="100%"/>
      </text:list-level-style-bullet>
      <text:list-level-style-bullet text:level="7" text:bullet-char="•">
        <style:list-level-properties text:space-before="2.8966in" text:min-label-width="0.3966in"/>
        <style:text-properties fo:font-family="Arial" fo:font-size="100%"/>
      </text:list-level-style-bullet>
      <text:list-level-style-bullet text:level="8" text:bullet-char="•">
        <style:list-level-properties text:space-before="3.3966in" text:min-label-width="0.3966in"/>
        <style:text-properties fo:font-family="Arial" fo:font-size="100%"/>
      </text:list-level-style-bullet>
      <text:list-level-style-bullet text:level="9" text:bullet-char="•">
        <style:list-level-properties text:space-before="3.8966in" text:min-label-width="0.3966in"/>
        <style:text-properties fo:font-family="Arial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41835in"/>
        <style:text-properties fo:font-family="Arial" fo:font-size="100%"/>
      </text:list-level-style-bullet>
      <text:list-level-style-bullet text:level="2" text:bullet-char="•">
        <style:list-level-properties text:space-before="0.41835in" text:min-label-width="0.41835in"/>
        <style:text-properties fo:font-family="Arial" fo:font-size="100%"/>
      </text:list-level-style-bullet>
      <text:list-level-style-bullet text:level="3" text:bullet-char="•">
        <style:list-level-properties text:space-before="0.91835in" text:min-label-width="0.41835in"/>
        <style:text-properties fo:font-family="Arial" fo:font-size="100%"/>
      </text:list-level-style-bullet>
      <text:list-level-style-bullet text:level="4" text:bullet-char="•">
        <style:list-level-properties text:space-before="1.41835in" text:min-label-width="0.41835in"/>
        <style:text-properties fo:font-family="Arial" fo:font-size="100%"/>
      </text:list-level-style-bullet>
      <text:list-level-style-bullet text:level="5" text:bullet-char="•">
        <style:list-level-properties text:space-before="1.91835in" text:min-label-width="0.41835in"/>
        <style:text-properties fo:font-family="Arial" fo:font-size="100%"/>
      </text:list-level-style-bullet>
      <text:list-level-style-bullet text:level="6" text:bullet-char="•">
        <style:list-level-properties text:space-before="2.41835in" text:min-label-width="0.41835in"/>
        <style:text-properties fo:font-family="Arial" fo:font-size="100%"/>
      </text:list-level-style-bullet>
      <text:list-level-style-bullet text:level="7" text:bullet-char="•">
        <style:list-level-properties text:space-before="2.91835in" text:min-label-width="0.41835in"/>
        <style:text-properties fo:font-family="Arial" fo:font-size="100%"/>
      </text:list-level-style-bullet>
      <text:list-level-style-bullet text:level="8" text:bullet-char="•">
        <style:list-level-properties text:space-before="3.41835in" text:min-label-width="0.41835in"/>
        <style:text-properties fo:font-family="Arial" fo:font-size="100%"/>
      </text:list-level-style-bullet>
      <text:list-level-style-bullet text:level="9" text:bullet-char="•">
        <style:list-level-properties text:space-before="3.91835in" text:min-label-width="0.41835in"/>
        <style:text-properties fo:font-family="Arial" fo:font-size="100%"/>
      </text:list-level-style-bullet>
    </text:list-style>
  </office:automatic-styles>
  <office:body>
    <office:presentation>
      <draw:page draw:name="Slide1" draw:style-name="a359" draw:master-page-name="Master1-Layout7-blank-Blank" presentation:presentation-page-layout-name="Master1-PPL7" draw:id="Slide-256">
        <draw:custom-shape svg:x="0in" svg:y="4.26581in" svg:width="6.10134in" svg:height="6.97961in" draw:id="id63" draw:style-name="a361" draw:name="Freeform 2">
          <svg:title/>
          <svg:desc/>
          <draw:enhanced-geometry xmlns:dr3d="urn:oasis:names:tc:opendocument:xmlns:dr3d:1.0" draw:type="non-primitive" svg:viewBox="0 0 5579065 6382152" draw:enhanced-path="M 0 0 L 5579065 0 5579065 6382153 0 63821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579065"/>
            <draw:equation draw:name="f7" draw:formula="?f4 / 638215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6.10134in" svg:height="6.97961in" draw:id="id64" draw:style-name="a363" draw:transform="translate(-3.05067in -3.4898in) rotate(-3.14159) translate(16.94933in 3.4898in)" draw:name="Freeform 3">
          <svg:title/>
          <svg:desc/>
          <draw:enhanced-geometry xmlns:dr3d="urn:oasis:names:tc:opendocument:xmlns:dr3d:1.0" draw:type="non-primitive" svg:viewBox="0 0 5579065 6382152" draw:enhanced-path="M 0 0 L 5579065 0 5579065 6382152 0 6382152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579065"/>
            <draw:equation draw:name="f7" draw:formula="?f4 / 638215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8.49574in" svg:height="7.83732in" draw:id="id65" draw:style-name="a365" draw:transform="translate(-4.24787in -3.91866in) rotate(-1.5708) translate(3.91866in 4.24787in)" draw:name="Freeform 4">
          <svg:title/>
          <svg:desc/>
          <draw:enhanced-geometry xmlns:dr3d="urn:oasis:names:tc:opendocument:xmlns:dr3d:1.0" draw:type="non-primitive" svg:viewBox="0 0 7768508 7166448" draw:enhanced-path="M 0 0 L 7768508 0 7768508 7166448 0 7166448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68508"/>
            <draw:equation draw:name="f7" draw:formula="?f4 / 716644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8.49574in" svg:height="7.83732in" draw:id="id66" draw:style-name="a367" draw:transform="translate(-4.24787in -3.91866in) rotate(-1.5708) translate(16.08134in 6.96923in)" draw:name="Freeform 5">
          <svg:title/>
          <svg:desc/>
          <draw:enhanced-geometry xmlns:dr3d="urn:oasis:names:tc:opendocument:xmlns:dr3d:1.0" draw:type="non-primitive" svg:viewBox="0 0 7768508 7166448" draw:enhanced-path="M 7768508 7166448 L 0 7166448 0 0 7768508 0 7768508 7166448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68508"/>
            <draw:equation draw:name="f7" draw:formula="?f4 / 716644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14424in" svg:y="1.125in" svg:width="1.71152in" svg:height="1.81219in" draw:id="id67" draw:style-name="a369" draw:name="Freeform 6">
          <svg:title/>
          <svg:desc/>
          <draw:enhanced-geometry xmlns:dr3d="urn:oasis:names:tc:opendocument:xmlns:dr3d:1.0" draw:type="non-primitive" svg:viewBox="0 0 1565012 1657071" draw:enhanced-path="M 0 0 L 1565012 0 1565012 1657071 0 165707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65012"/>
            <draw:equation draw:name="f7" draw:formula="?f4 / 165707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68" draw:style-name="a372" draw:name="TextBox 7" svg:x="-0.49303in" svg:y="0.32445in" svg:width="20.83803in" svg:height="0.68075in">
          <draw:text-box>
            <text:p text:style-name="a371" text:class-names="" text:cond-style-name=""><text:span text:style-name="a370" text:class-names="">BANGLADESH ARMY UNIVERSITY OF SCIENCE &amp; TECHNOLOGY KHULNA</text:span></text:p>
          </draw:text-box>
          <svg:title/>
          <svg:desc/>
        </draw:frame>
        <draw:frame draw:id="id69" draw:style-name="a387" draw:name="TextBox 8" svg:x="3.25353in" svg:y="4.14328in" svg:width="9.26773in" svg:height="7.10672in">
          <draw:text-box>
            <text:p text:style-name="a374" text:class-names="" text:cond-style-name=""><text:span text:style-name="a373" text:class-names="">Presented By:</text:span></text:p>
            <text:p text:style-name="a376" text:class-names="" text:cond-style-name=""><text:span text:style-name="a375" text:class-names="">Name: SAMIA TASNIM</text:span></text:p>
            <text:p text:style-name="a378" text:class-names="" text:cond-style-name=""><text:span text:style-name="a377" text:class-names="">ID: 1072420005101013</text:span></text:p>
            <text:p text:style-name="a380" text:class-names="" text:cond-style-name=""><text:span text:style-name="a379" text:class-names="">Department : CSE</text:span></text:p>
            <text:p text:style-name="a382" text:class-names="" text:cond-style-name=""><text:span text:style-name="a381" text:class-names=""><text:s text:c="1"/>Course Title: Object Oriented Programing Sessional-II</text:span></text:p>
            <text:p text:style-name="a384" text:class-names="" text:cond-style-name=""><text:span text:style-name="a383" text:class-names="">Course Code: CSE-220</text:span></text:p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0" draw:style-name="a398" draw:name="TextBox 9" svg:x="12.07748in" svg:y="4.24024in" svg:width="9.31654in" svg:height="4.66832in">
          <draw:text-box>
            <text:p text:style-name="a389" text:class-names="" text:cond-style-name=""><text:span text:style-name="a388" text:class-names="">Submitted To:</text:span></text:p>
            <text:p text:style-name="a391" text:class-names="" text:cond-style-name=""><text:span text:style-name="a390" text:class-names="">Teacher Name: Rohul Amin</text:span></text:p>
            <text:p text:style-name="a393" text:class-names="" text:cond-style-name=""><text:span text:style-name="a392" text:class-names="">Designation: Lecturer</text:span></text:p>
            <text:p text:style-name="a395" text:class-names="" text:cond-style-name=""><text:span text:style-name="a394" text:class-names="">Department of CSE</text:span></text:p>
            <text:p text:style-name="a397" text:class-names="" text:cond-style-name=""><text:span text:style-name="a396" text:class-names=""/></text:p>
          </draw:text-box>
          <svg:title/>
          <svg:desc/>
        </draw:frame>
        <draw:frame draw:id="id71" draw:style-name="a401" draw:name="TextBox 10" svg:x="2.4096in" svg:y="3.21998in" svg:width="16.87948in" svg:height="0.52767in">
          <draw:text-box>
            <text:p text:style-name="a400" text:class-names="" text:cond-style-name=""><text:span text:style-name="a399" text:class-names="">Student Result Management System Using OOP in Java</text:span></text:p>
          </draw:text-box>
          <svg:title/>
          <svg:desc/>
        </draw:frame>
        <draw:g draw:name="Group 11" draw:id="id72">
          <svg:title/>
          <svg:desc/>
          <draw:custom-shape svg:x="18.99548in" svg:y="10.30218in" svg:width="1.34897in" svg:height="1.34897in" draw:id="id73" draw:style-name="a402" draw:name="Freeform 12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74" draw:style-name="a405" draw:name="TextBox 13" svg:x="19.12195in" svg:y="10.57092in" svg:width="1.09604in" svg:height="0.95377in">
            <draw:text-box>
              <text:p text:style-name="a404" text:class-names="" text:cond-style-name=""><text:span text:style-name="a403" text:class-names=""/></text:p>
            </draw:text-box>
            <svg:title/>
            <svg:desc/>
          </draw:frame>
        </draw:g>
      </draw:page>
      <draw:page draw:name="Slide2" draw:style-name="a406" draw:master-page-name="Master1-Layout7-blank-Blank" presentation:presentation-page-layout-name="Master1-PPL7" draw:id="Slide-257">
        <draw:custom-shape svg:width="11.27249in" svg:height="3.72382in" draw:id="id75" draw:style-name="a408" draw:transform="translate(-5.63625in -1.86191in) rotate(-1.5708) translate(1.60443in 5.63551in)" draw:name="Freeform 2">
          <svg:title/>
          <svg:desc/>
          <draw:enhanced-geometry xmlns:dr3d="urn:oasis:names:tc:opendocument:xmlns:dr3d:1.0" draw:type="non-primitive" svg:viewBox="0 0 13516228 3969675" draw:enhanced-path="M 0 0 L 13516229 0 13516229 3969675 0 396967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16228"/>
            <draw:equation draw:name="f7" draw:formula="?f4 / 396967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11.27249in" svg:height="4.20575in" draw:id="id76" draw:style-name="a410" draw:transform="translate(-5.63625in -2.10287in) rotate(-1.5708) translate(17.891in 5.62045in)" draw:name="Freeform 3">
          <svg:title/>
          <svg:desc/>
          <draw:enhanced-geometry xmlns:dr3d="urn:oasis:names:tc:opendocument:xmlns:dr3d:1.0" draw:type="non-primitive" svg:viewBox="0 0 13516228 3969675" draw:enhanced-path="M 13516229 3969675 L 0 3969675 0 0 13516229 0 13516229 3969675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16228"/>
            <draw:equation draw:name="f7" draw:formula="?f4 / 396967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77" draw:style-name="a413" draw:name="TextBox 4" svg:x="3.06152in" svg:y="1.34375in" svg:width="13.87696in" svg:height="1.08098in">
          <draw:text-box>
            <text:p text:style-name="a412" text:class-names="" text:cond-style-name=""><text:span text:style-name="a411" text:class-names="">Table of Contents<text:s text:c="1"/></text:span></text:p>
          </draw:text-box>
          <svg:title/>
          <svg:desc/>
        </draw:frame>
        <draw:frame draw:id="id78" draw:style-name="a434" draw:name="TextBox 5" svg:x="2.91349in" svg:y="2.98578in" svg:width="8.393in" svg:height="5.8035in">
          <draw:text-box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Introduction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7" text:class-names="">Objectives of the Project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Tools and Technologies Used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3" text:class-names="">OOP Concepts Used in the Project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Features of the System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Project Structure</text:span></text:p>
                  </text:list-item>
                </text:list>
              </text:list-item>
            </text:list>
            <text:p text:style-name="a433" text:class-names="" text:cond-style-name=""><text:span text:style-name="a432" text:class-names=""/></text:p>
          </draw:text-box>
          <svg:title/>
          <svg:desc/>
        </draw:frame>
        <draw:frame draw:id="id79" draw:style-name="a457" draw:name="TextBox 6" svg:x="11.04427in" svg:y="2.81692in" svg:width="7.33599in" svg:height="6.99596in">
          <draw:text-box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Java Code Example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Program Output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Advantages of the Project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Limitations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Future Enhancements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>Conclusion</text:span></text:p>
                  </text:list-item>
                </text:list>
              </text:list-item>
            </text:list>
            <text:p text:style-name="a454" text:class-names="" text:cond-style-name=""><text:span text:style-name="a453" text:class-names=""/></text:p>
            <text:p text:style-name="a456" text:class-names="" text:cond-style-name=""><text:span text:style-name="a455" text:class-names=""/></text:p>
          </draw:text-box>
          <svg:title/>
          <svg:desc/>
        </draw:frame>
        <draw:g draw:name="Group 7" draw:id="id80">
          <svg:title/>
          <svg:desc/>
          <draw:custom-shape svg:x="17.70597in" svg:y="0.00035in" svg:width="1.34897in" svg:height="1.34897in" draw:id="id84" draw:style-name="a462" draw:name="Freeform 8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85" draw:style-name="a465" draw:name="TextBox 9" svg:x="17.83244in" svg:y="0.26909in" svg:width="1.09604in" svg:height="0.95377in">
            <draw:text-box>
              <text:p text:style-name="a464" text:class-names="" text:cond-style-name=""><text:span text:style-name="a463" text:class-names=""/></text:p>
            </draw:text-box>
            <svg:title/>
            <svg:desc/>
          </draw:frame>
        </draw:g>
        <draw:g draw:name="Group 10" draw:id="id81">
          <svg:title/>
          <svg:desc/>
          <draw:custom-shape svg:x="0.56097in" svg:y="9.89683in" svg:width="1.34897in" svg:height="1.34897in" draw:id="id82" draw:style-name="a458" draw:name="Freeform 11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83" draw:style-name="a461" draw:name="TextBox 12" svg:x="0.68744in" svg:y="10.16557in" svg:width="1.09604in" svg:height="0.95377in">
            <draw:text-box>
              <text:p text:style-name="a460" text:class-names="" text:cond-style-name=""><text:span text:style-name="a459" text:class-names=""/></text:p>
            </draw:text-box>
            <svg:title/>
            <svg:desc/>
          </draw:frame>
        </draw:g>
      </draw:page>
      <draw:page draw:name="Slide3" draw:style-name="a466" draw:master-page-name="Master1-Layout7-blank-Blank" presentation:presentation-page-layout-name="Master1-PPL7" draw:id="Slide-258">
        <draw:g draw:name="Group 2" draw:id="id86">
          <svg:title/>
          <svg:desc/>
          <draw:custom-shape svg:x="14.81937in" svg:y="0.00078in" svg:width="5.18176in" svg:height="11.25425in" draw:id="id100" draw:style-name="a514" draw:name="Freeform 3">
            <svg:title/>
            <svg:desc/>
            <draw:enhanced-geometry xmlns:dr3d="urn:oasis:names:tc:opendocument:xmlns:dr3d:1.0" draw:type="non-primitive" svg:viewBox="0 0 1564803 3118341" draw:enhanced-path="M 66456 0 L 1498347 0 C 1535049 0 1564803 29753 1564803 66456 L 1564803 3051885 C 1564803 3088587 1535049 3118341 1498347 3118341 L 66456 3118341 C 29753 3118341 0 3088587 0 3051885 L 0 66456 C 0 29753 29753 0 66456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4803"/>
              <draw:equation draw:name="f7" draw:formula="?f4 / 3118341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01" draw:style-name="a517" draw:name="TextBox 4" svg:x="14.81937in" svg:y="-0.13673in" svg:width="5.18176in" svg:height="11.39175in">
            <draw:text-box>
              <text:p text:style-name="a516" text:class-names="" text:cond-style-name=""><text:span text:style-name="a515" text:class-names=""/></text:p>
            </draw:text-box>
            <svg:title/>
            <svg:desc/>
          </draw:frame>
        </draw:g>
        <draw:g draw:name="Group 5" draw:id="id87">
          <svg:title/>
          <svg:desc/>
          <draw:custom-shape svg:x="11.67005in" svg:y="1.47622in" svg:width="8.03621in" svg:height="8.58297in" draw:id="id99" draw:style-name="a513" draw:name="Freeform 6">
            <svg:title/>
            <svg:desc/>
            <office:event-listeners>
              <presentation:event-listener script:event-name="dom:click" presentation:action="show" xlink:href="https://media.licdn.com/dms/image/v2/D5612AQHYTBZ4wsEfaw/article-cover_image-shrink_720_1280/article-cover_image-shrink_720_1280/0/1693421413102?e=2147483647&amp;v=beta&amp;t=jKwEvwFe3qlBoLjh2QdHLH0ke2YDkV_Yqw6jI2HaesM" xlink:type="simple" xlink:show="embed" xlink:actuate="onRequest"/>
            </office:event-listeners>
            <draw:enhanced-geometry xmlns:dr3d="urn:oasis:names:tc:opendocument:xmlns:dr3d:1.0" draw:type="non-primitive" svg:viewBox="0 0 722119 771249" draw:enhanced-path="M 67428 0 L 654690 0 C 691930 0 722119 30189 722119 67428 L 722119 703821 C 722119 721704 715014 738855 702369 751500 689724 764145 672573 771249 654690 771249 L 67428 771249 C 49545 771249 32394 764145 19749 751500 7104 738855 0 721704 0 703821 L 0 67428 C 0 49545 7104 32394 19749 19749 32394 7104 49545 0 67428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22119"/>
              <draw:equation draw:name="f7" draw:formula="?f4 / 77124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frame draw:id="id88" draw:style-name="a495" draw:name="TextBox 7" svg:x="0.89148in" svg:y="1.48259in" svg:width="11.30732in" svg:height="8.22914in">
          <draw:text-box>
            <text:p text:style-name="a468" text:class-names="" text:cond-style-name=""><text:span text:style-name="a467" text:class-names="">A Student Result Management System is a simple application used to manage student information and academic results.</text:span></text:p>
            <text:p text:style-name="a470" text:class-names="" text:cond-style-name=""><text:span text:style-name="a469" text:class-names="">This project allows users to: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Add student records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View student information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Calculate grades automatically</text:span></text:p>
                  </text:list-item>
                </text:list>
              </text:list-item>
            </text:list>
            <text:p text:style-name="a481" text:class-names="" text:cond-style-name=""><text:span text:style-name="a480" text:class-names="">This project is developed using:</text:span></text:p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Java Programming Language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Object-Oriented Programming (OOP) Concepts</text:span></text:p>
                  </text:list-item>
                </text:list>
              </text:list-item>
            </text:list>
            <text:p text:style-name="a489" text:class-names="" text:cond-style-name=""><text:span text:style-name="a488" text:class-names="">Purpose:</text:span></text:p>
            <text:p text:style-name="a492" text:class-names="" text:cond-style-name=""><text:span text:style-name="a490" text:class-names=""><text:s text:c="1"/></text:span><text:span text:style-name="a491" text:class-names="">To understand how OOP concepts can be applied in a real-world student management system.</text:span></text:p>
            <text:p text:style-name="a494" text:class-names="" text:cond-style-name=""><text:span text:style-name="a493" text:class-names=""/></text:p>
          </draw:text-box>
          <svg:title/>
          <svg:desc/>
        </draw:frame>
        <draw:frame draw:id="id89" draw:style-name="a499" draw:name="TextBox 8" svg:x="0.89148in" svg:y="0.28515in" svg:width="9.82705in" svg:height="1.11568in">
          <draw:text-box>
            <text:p text:style-name="a498" text:class-names="" text:cond-style-name=""><text:span text:style-name="a496" text:class-names="">I</text:span><text:span text:style-name="a497" text:class-names="">ntroduction</text:span></text:p>
          </draw:text-box>
          <svg:title/>
          <svg:desc/>
        </draw:frame>
        <draw:g draw:name="Group 9" draw:id="id90">
          <svg:title/>
          <svg:desc/>
          <draw:custom-shape svg:x="-0.4575in" svg:y="10.125in" svg:width="1.34897in" svg:height="1.34897in" draw:id="id97" draw:style-name="a508" draw:name="Freeform 10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98" draw:style-name="a511" draw:name="TextBox 11" svg:x="-0.33103in" svg:y="10.39374in" svg:width="1.09604in" svg:height="0.95377in">
            <draw:text-box>
              <text:p text:style-name="a510" text:class-names="" text:cond-style-name=""><text:span text:style-name="a509" text:class-names=""/></text:p>
            </draw:text-box>
            <svg:title/>
            <svg:desc/>
          </draw:frame>
        </draw:g>
        <draw:g draw:name="Group 12" draw:id="id91">
          <svg:title/>
          <svg:desc/>
          <draw:custom-shape svg:x="0in" svg:y="10.50208in" svg:width="1.34897in" svg:height="1.3469in" draw:id="id95" draw:style-name="a504" draw:name="Freeform 13">
            <svg:title/>
            <svg:desc/>
  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154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96" draw:style-name="a507" draw:name="TextBox 14" svg:x="0.12647in" svg:y="10.77062in" svg:width="1.09604in" svg:height="0.95208in">
            <draw:text-box>
              <text:p text:style-name="a506" text:class-names="" text:cond-style-name=""><text:span text:style-name="a505" text:class-names=""/></text:p>
            </draw:text-box>
            <svg:title/>
            <svg:desc/>
          </draw:frame>
        </draw:g>
        <draw:g draw:name="Group 15" draw:id="id92">
          <svg:title/>
          <svg:desc/>
          <draw:custom-shape svg:x="-0.18107in" svg:y="-0.1531in" svg:width="1.34897in" svg:height="1.28111in" draw:id="id93" draw:style-name="a500" draw:name="Freeform 16">
            <svg:title/>
            <svg:desc/>
            <draw:enhanced-geometry xmlns:dr3d="urn:oasis:names:tc:opendocument:xmlns:dr3d:1.0" draw:type="non-primitive" svg:viewBox="0 0 812800 771909" draw:enhanced-path="M 406400 0 C 181951 0 0 172798 0 385954 0 599111 181951 771909 406400 771909 630849 771909 812800 599111 812800 385954 812800 172798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77190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94" draw:style-name="a503" draw:name="TextBox 17" svg:x="-0.0546in" svg:y="0.10927in" svg:width="1.09604in" svg:height="0.89862in">
            <draw:text-box>
              <text:p text:style-name="a502" text:class-names="" text:cond-style-name=""><text:span text:style-name="a501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7" smil:attributeName="visibility" smil:to="visible" smil:begin="0.0s" smil:dur="0.001s" smil:fill="hold"/>
                  <anim:transitionFilter smil:targetElement="id87" smil:type="fade" smil:subtype="crossfade" smil:dur="0.5s"/>
                </anim:par>
              </anim:par>
            </anim:par>
          </anim:seq>
        </anim:par>
      </draw:page>
      <draw:page draw:name="Slide4" draw:style-name="a518" draw:master-page-name="Master1-Layout7-blank-Blank" presentation:presentation-page-layout-name="Master1-PPL7" draw:id="Slide-259">
        <draw:g draw:name="Group 2" draw:id="id102">
          <svg:title/>
          <svg:desc/>
          <draw:custom-shape svg:x="1.8182in" svg:y="2.83849in" svg:width="16.50698in" svg:height="6.76533in" draw:id="id111" draw:style-name="a551" draw:name="Freeform 3">
            <svg:title/>
            <svg:desc/>
            <draw:enhanced-geometry xmlns:dr3d="urn:oasis:names:tc:opendocument:xmlns:dr3d:1.0" draw:type="non-primitive" svg:viewBox="0 0 3975370 1629293" draw:enhanced-path="M 20004 0 L 3955366 0 C 3966414 0 3975370 8956 3975370 20004 L 3975370 1609290 C 3975370 1614595 3973263 1619683 3969511 1623434 3965760 1627186 3960672 1629293 3955366 1629293 L 20004 1629293 C 14698 1629293 9610 1627186 5859 1623434 2108 1619683 0 1614595 0 1609290 L 0 20004 C 0 14698 2108 9610 5859 5859 9610 2108 14698 0 2000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75370"/>
              <draw:equation draw:name="f7" draw:formula="?f4 / 1629293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12" draw:style-name="a554" draw:name="TextBox 4" svg:x="1.8182in" svg:y="2.68029in" svg:width="16.50698in" svg:height="6.92354in">
            <draw:text-box>
              <text:p text:style-name="a553" text:class-names="" text:cond-style-name=""><text:span text:style-name="a552" text:class-names=""/></text:p>
            </draw:text-box>
            <svg:title/>
            <svg:desc/>
          </draw:frame>
        </draw:g>
        <draw:frame draw:id="id103" draw:style-name="a522" draw:name="TextBox 5" svg:x="-0.35305in" svg:y="1.0417in" svg:width="19.41836in" svg:height="1.1483in">
          <draw:text-box>
            <text:p text:style-name="a521" text:class-names="" text:cond-style-name=""><text:span text:style-name="a519" text:class-names="">Objective</text:span><text:span text:style-name="a520" text:class-names="">s<text:s text:c="1"/></text:span></text:p>
          </draw:text-box>
          <svg:title/>
          <svg:desc/>
        </draw:frame>
        <draw:frame draw:id="id104" draw:style-name="a542" draw:name="TextBox 6" svg:x="2.61527in" svg:y="3.92268in" svg:width="18.54771in" svg:height="5.56955in">
          <draw:text-box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To develop a Student Result Management System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To implement OOP concepts in Java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To store and manage student records efficiently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To calculate grades automatically based on marks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To improve programming and problem-solving skills</text:span></text:p>
                  </text:list-item>
                </text:list>
              </text:list-item>
            </text:list>
            <text:p text:style-name="a539" text:class-names="" text:cond-style-name=""><text:span text:style-name="a538" text:class-names=""/></text:p>
            <text:p text:style-name="a541" text:class-names="" text:cond-style-name=""><text:span text:style-name="a540" text:class-names=""/></text:p>
          </draw:text-box>
          <svg:title/>
          <svg:desc/>
        </draw:frame>
        <draw:g draw:name="Group 7" draw:id="id105">
          <svg:title/>
          <svg:desc/>
          <draw:custom-shape svg:x="1.23575in" svg:y="2.5273in" svg:width="1.1986in" svg:height="1.19676in" draw:id="id109" draw:style-name="a547" draw:name="Freeform 8">
            <svg:title/>
            <svg:desc/>
  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154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10" draw:style-name="a550" draw:name="TextBox 9" svg:x="1.34811in" svg:y="2.76591in" svg:width="0.97386in" svg:height="0.84595in">
            <draw:text-box>
              <text:p text:style-name="a549" text:class-names="" text:cond-style-name=""><text:span text:style-name="a548" text:class-names=""/></text:p>
            </draw:text-box>
            <svg:title/>
            <svg:desc/>
          </draw:frame>
        </draw:g>
        <draw:g draw:name="Group 10" draw:id="id106">
          <svg:title/>
          <svg:desc/>
          <draw:custom-shape svg:x="17.60826in" svg:y="8.78682in" svg:width="1.13125in" svg:height="1.12951in" draw:id="id107" draw:style-name="a543" draw:name="Freeform 11">
            <svg:title/>
            <svg:desc/>
  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154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08" draw:style-name="a546" draw:name="TextBox 12" svg:x="17.71432in" svg:y="9.01202in" svg:width="0.91914in" svg:height="0.79841in">
            <draw:text-box>
              <text:p text:style-name="a545" text:class-names="" text:cond-style-name=""><text:span text:style-name="a544" text:class-names=""/></text:p>
            </draw:text-box>
            <svg:title/>
            <svg:desc/>
          </draw:frame>
        </draw:g>
      </draw:page>
      <draw:page draw:name="Slide5" draw:style-name="a555" draw:master-page-name="Master1-Layout7-blank-Blank" presentation:presentation-page-layout-name="Master1-PPL7" draw:id="Slide-260">
        <draw:frame draw:id="id113" draw:style-name="a563" draw:name="TextBox 2" svg:x="0.40803in" svg:y="0.63373in" svg:width="12.58497in" svg:height="2.6552in">
          <draw:text-box>
            <text:p text:style-name="a558" text:class-names="" text:cond-style-name=""><text:span text:style-name="a556" text:class-names="">To</text:span><text:span text:style-name="a557" text:class-names="">ols and Technologies Used</text:span></text:p>
            <text:p text:style-name="a560" text:class-names="" text:cond-style-name=""><text:span text:style-name="a559" text:class-names="">Programming Language:</text:span></text:p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4" draw:style-name="a587" draw:name="TextBox 3" svg:x="3.33595in" svg:y="2.76698in" svg:width="15.53905in" svg:height="6.37474in">
          <draw:text-box>
            <text:p text:style-name="a565" text:class-names="" text:cond-style-name=""><text:span text:style-name="a564" text:class-names="">Tools and Technologies Used</text:span></text:p>
            <text:p text:style-name="a567" text:class-names="" text:cond-style-name=""><text:span text:style-name="a566" text:class-names="">Programming Language:</text:span></text:p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8" text:class-names="">Java</text:span></text:p>
                  </text:list-item>
                </text:list>
              </text:list-item>
            </text:list>
            <text:p text:style-name="a572" text:class-names="" text:cond-style-name=""><text:span text:style-name="a571" text:class-names="">IDE: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IntelliJ IDEA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Eclipse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NetBeans</text:span></text:p>
                  </text:list-item>
                </text:list>
              </text:list-item>
            </text:list>
            <text:p text:style-name="a583" text:class-names="" text:cond-style-name=""><text:span text:style-name="a582" text:class-names=""/></text:p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0in" svg:y="2.68026in" svg:width="7.46262in" svg:height="8.53684in" draw:id="id115" draw:style-name="a589" draw:name="Freeform 4">
          <svg:title/>
          <svg:desc/>
          <draw:enhanced-geometry xmlns:dr3d="urn:oasis:names:tc:opendocument:xmlns:dr3d:1.0" draw:type="non-primitive" svg:viewBox="0 0 6823821 7806087" draw:enhanced-path="M 0 0 L 6823821 0 6823821 7806087 0 78060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23821"/>
            <draw:equation draw:name="f7" draw:formula="?f4 / 780608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64598in" svg:y="0in" svg:width="7.38703in" svg:height="8.45036in" draw:id="id116" draw:style-name="a591" draw:name="Freeform 5">
          <svg:title/>
          <svg:desc/>
          <draw:enhanced-geometry xmlns:dr3d="urn:oasis:names:tc:opendocument:xmlns:dr3d:1.0" draw:type="non-primitive" svg:viewBox="0 0 6754697 7727013" draw:enhanced-path="M 6754698 7727013 L 0 7727013 0 0 6754698 0 6754698 7727013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54697"/>
            <draw:equation draw:name="f7" draw:formula="?f4 / 772701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6" draw:id="id117">
          <svg:title/>
          <svg:desc/>
          <draw:custom-shape svg:x="11.84169in" svg:y="2.43106in" svg:width="5.36036in" svg:height="7.18201in" draw:id="id127" draw:style-name="a605" draw:name="Freeform 7">
            <svg:title/>
            <svg:desc/>
            <draw:enhanced-geometry xmlns:dr3d="urn:oasis:names:tc:opendocument:xmlns:dr3d:1.0" draw:type="non-primitive" svg:viewBox="0 0 722119 967522" draw:enhanced-path="M 47385 0 L 674734 0 C 687301 0 699353 4992 708240 13879 717126 22765 722119 34818 722119 47385 L 722119 920137 C 722119 932705 717126 944757 708240 953644 699353 962530 687301 967522 674734 967522 L 47385 967522 C 34818 967522 22765 962530 13879 953644 4992 944757 0 932705 0 920137 L 0 47385 C 0 34818 4992 22765 13879 13879 22765 4992 34818 0 4738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22119"/>
              <draw:equation draw:name="f7" draw:formula="?f4 / 967522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g draw:name="Group 8" draw:id="id118">
          <svg:title/>
          <svg:desc/>
          <draw:custom-shape svg:x="19.14006in" svg:y="10.49342in" svg:width="1.13125in" svg:height="1.12951in" draw:id="id125" draw:style-name="a600" draw:name="Freeform 9">
            <svg:title/>
            <svg:desc/>
  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154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26" draw:style-name="a603" draw:name="TextBox 10" svg:x="19.24612in" svg:y="10.71862in" svg:width="0.91914in" svg:height="0.79841in">
            <draw:text-box>
              <text:p text:style-name="a602" text:class-names="" text:cond-style-name=""><text:span text:style-name="a601" text:class-names=""/></text:p>
            </draw:text-box>
            <svg:title/>
            <svg:desc/>
          </draw:frame>
        </draw:g>
        <draw:g draw:name="Group 11" draw:id="id119">
          <svg:title/>
          <svg:desc/>
          <draw:custom-shape svg:x="19.03334in" svg:y="9.60746in" svg:width="1.57533in" svg:height="1.80385in" draw:id="id123" draw:style-name="a596" draw:name="Freeform 12">
            <svg:title/>
            <svg:desc/>
            <draw:enhanced-geometry xmlns:dr3d="urn:oasis:names:tc:opendocument:xmlns:dr3d:1.0" draw:type="non-primitive" svg:viewBox="0 0 812800 1296063" draw:enhanced-path="M 406400 0 C 181951 0 0 290133 0 648031 0 1005929 181951 1296063 406400 1296063 630849 1296063 812800 1005929 812800 648031 812800 290133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1296063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24" draw:style-name="a599" draw:name="TextBox 13" svg:x="19.18102in" svg:y="9.89588in" svg:width="1.27995in" svg:height="1.34632in">
            <draw:text-box>
              <text:p text:style-name="a598" text:class-names="" text:cond-style-name=""><text:span text:style-name="a597" text:class-names=""/></text:p>
            </draw:text-box>
            <svg:title/>
            <svg:desc/>
          </draw:frame>
        </draw:g>
        <draw:g draw:name="Group 14" draw:id="id120">
          <svg:title/>
          <svg:desc/>
          <draw:custom-shape svg:x="19.46937in" svg:y="9.05044in" svg:width="1.13125in" svg:height="1.80385in" draw:id="id121" draw:style-name="a592" draw:name="Freeform 15">
            <svg:title/>
            <svg:desc/>
            <draw:enhanced-geometry xmlns:dr3d="urn:oasis:names:tc:opendocument:xmlns:dr3d:1.0" draw:type="non-primitive" svg:viewBox="0 0 812800 1296063" draw:enhanced-path="M 406400 0 C 181951 0 0 290133 0 648031 0 1005929 181951 1296063 406400 1296063 630849 1296063 812800 1005929 812800 648031 812800 290133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1296063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22" draw:style-name="a595" draw:name="TextBox 16" svg:x="19.57542in" svg:y="9.33886in" svg:width="0.91914in" svg:height="1.34632in">
            <draw:text-box>
              <text:p text:style-name="a594" text:class-names="" text:cond-style-name=""><text:span text:style-name="a593" text:class-names=""/></text:p>
            </draw:text-box>
            <svg:title/>
            <svg:desc/>
          </draw:frame>
        </draw:g>
      </draw:page>
      <draw:page draw:name="Slide6" draw:style-name="a606" draw:master-page-name="Master1-Layout7-blank-Blank" presentation:presentation-page-layout-name="Master1-PPL7" draw:id="Slide-261">
        <draw:g draw:name="Group 2" draw:id="id128">
          <svg:title/>
          <svg:desc/>
          <draw:custom-shape svg:x="-0.0017in" svg:y="0.00078in" svg:width="5.70808in" svg:height="11.25425in" draw:id="id133" draw:style-name="a634" draw:name="Freeform 3">
            <svg:title/>
            <svg:desc/>
            <draw:enhanced-geometry xmlns:dr3d="urn:oasis:names:tc:opendocument:xmlns:dr3d:1.0" draw:type="non-primitive" svg:viewBox="0 0 1564803 3118341" draw:enhanced-path="M 66456 0 L 1498347 0 C 1535049 0 1564803 29753 1564803 66456 L 1564803 3051885 C 1564803 3088587 1535049 3118341 1498347 3118341 L 66456 3118341 C 29753 3118341 0 3088587 0 3051885 L 0 66456 C 0 29753 29753 0 66456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4803"/>
              <draw:equation draw:name="f7" draw:formula="?f4 / 3118341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34" draw:style-name="a637" draw:name="TextBox 4" svg:x="-0.0017in" svg:y="-0.13673in" svg:width="5.70808in" svg:height="11.39175in">
            <draw:text-box>
              <text:p text:style-name="a636" text:class-names="" text:cond-style-name=""><text:span text:style-name="a635" text:class-names=""/></text:p>
            </draw:text-box>
            <svg:title/>
            <svg:desc/>
          </draw:frame>
        </draw:g>
        <draw:g draw:name="Group 5" draw:id="id129">
          <svg:title/>
          <svg:desc/>
          <draw:custom-shape svg:x="0.33623in" svg:y="2.43969in" svg:width="8.69022in" svg:height="6.45728in" draw:id="id132" draw:style-name="a633" draw:name="Freeform 6">
            <svg:title/>
            <svg:desc/>
            <draw:enhanced-geometry xmlns:dr3d="urn:oasis:names:tc:opendocument:xmlns:dr3d:1.0" draw:type="non-primitive" svg:viewBox="0 0 722119 536571" draw:enhanced-path="M 29228 0 L 692890 0 C 700642 0 708076 3079 713558 8561 719039 14042 722119 21476 722119 29228 L 722119 507342 C 722119 515094 719039 522529 713558 528010 708076 533491 700642 536571 692890 536571 L 29228 536571 C 21476 536571 14042 533491 8561 528010 3079 522529 0 515094 0 507342 L 0 29228 C 0 21476 3079 14042 8561 8561 14042 3079 21476 0 29228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22119"/>
              <draw:equation draw:name="f7" draw:formula="?f4 / 536571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frame draw:id="id130" draw:style-name="a610" draw:name="TextBox 7" svg:x="9.55235in" svg:y="1.20833in" svg:width="9.32265in" svg:height="2.17517in">
          <draw:text-box>
            <text:p text:style-name="a609" text:class-names="" text:cond-style-name=""><text:span text:style-name="a607" text:class-names="">F</text:span><text:span text:style-name="a608" text:class-names="">eatures of the Project</text:span></text:p>
          </draw:text-box>
          <svg:title/>
          <svg:desc/>
        </draw:frame>
        <draw:frame draw:id="id131" draw:style-name="a631" draw:name="TextBox 8" svg:x="9.20512in" svg:y="3.00302in" svg:width="15.33406in" svg:height="5.54525in">
          <draw:text-box>
            <text:p text:style-name="a612" text:class-names="" text:cond-style-name=""><text:span text:style-name="a611" text:class-names=""/></text:p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Add Student Information</text:span></text:p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Store Student ID, Name, and Marks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Grade Calculation</text:span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Display All Students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Search Student by ID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38" draw:master-page-name="Master1-Layout7-blank-Blank" presentation:presentation-page-layout-name="Master1-PPL7" draw:id="Slide-262">
        <draw:g draw:name="Group 2" draw:id="id135">
          <svg:title/>
          <svg:desc/>
          <draw:custom-shape svg:x="0.7864in" svg:y="1.79704in" svg:width="9.41459in" svg:height="3.83382in" draw:id="id154" draw:style-name="a682" draw:name="Freeform 3">
            <svg:title/>
            <svg:desc/>
            <draw:enhanced-geometry xmlns:dr3d="urn:oasis:names:tc:opendocument:xmlns:dr3d:1.0" draw:type="non-primitive" svg:viewBox="0 0 2267312 923297" draw:enhanced-path="M 35073 0 L 2232239 0 C 2241541 0 2250462 3695 2257039 10273 2263617 16850 2267312 25771 2267312 35073 L 2267312 888224 C 2267312 897526 2263617 906447 2257039 913024 2250462 919602 2241541 923297 2232239 923297 L 35073 923297 C 25771 923297 16850 919602 10273 913024 3695 906447 0 897526 0 888224 L 0 35073 C 0 25771 3695 16850 10273 10273 16850 3695 25771 0 35073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67312"/>
              <draw:equation draw:name="f7" draw:formula="?f4 / 92329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55" draw:style-name="a685" draw:name="TextBox 4" svg:x="0.7864in" svg:y="1.63884in" svg:width="9.41459in" svg:height="3.99202in">
            <draw:text-box>
              <text:p text:style-name="a684" text:class-names="" text:cond-style-name=""><text:span text:style-name="a683" text:class-names=""/></text:p>
            </draw:text-box>
            <svg:title/>
            <svg:desc/>
          </draw:frame>
        </draw:g>
        <draw:g draw:name="Group 5" draw:id="id136">
          <svg:title/>
          <svg:desc/>
          <draw:custom-shape svg:x="0.89762in" svg:y="5.96419in" svg:width="9.10238in" svg:height="4.47526in" draw:id="id152" draw:style-name="a678" draw:name="Freeform 6">
            <svg:title/>
            <svg:desc/>
            <draw:enhanced-geometry xmlns:dr3d="urn:oasis:names:tc:opendocument:xmlns:dr3d:1.0" draw:type="non-primitive" svg:viewBox="0 0 2192123 1077776" draw:enhanced-path="M 36276 0 L 2155847 0 C 2175881 0 2192123 16241 2192123 36276 L 2192123 1041500 C 2192123 1051121 2188301 1060348 2181498 1067151 2174695 1073954 2165468 1077776 2155847 1077776 L 36276 1077776 C 26655 1077776 17428 1073954 10625 1067151 3822 1060348 0 1051121 0 1041500 L 0 36276 C 0 26655 3822 17428 10625 10625 17428 3822 26655 0 36276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92123"/>
              <draw:equation draw:name="f7" draw:formula="?f4 / 1077776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53" draw:style-name="a681" draw:name="TextBox 7" svg:x="0.89762in" svg:y="5.80599in" svg:width="9.10238in" svg:height="4.63347in">
            <draw:text-box>
              <text:p text:style-name="a680" text:class-names="" text:cond-style-name=""><text:span text:style-name="a679" text:class-names=""/></text:p>
            </draw:text-box>
            <svg:title/>
            <svg:desc/>
          </draw:frame>
        </draw:g>
        <draw:g draw:name="Group 8" draw:id="id137">
          <svg:title/>
          <svg:desc/>
          <draw:custom-shape svg:x="10.39836in" svg:y="1.69836in" svg:width="9.11854in" svg:height="3.9325in" draw:id="id150" draw:style-name="a674" draw:name="Freeform 9">
            <svg:title/>
            <svg:desc/>
            <draw:enhanced-geometry xmlns:dr3d="urn:oasis:names:tc:opendocument:xmlns:dr3d:1.0" draw:type="non-primitive" svg:viewBox="0 0 2196014 947063" draw:enhanced-path="M 36212 0 L 2159802 0 C 2169406 0 2178616 3815 2185407 10606 2192199 17397 2196014 26608 2196014 36212 L 2196014 910851 C 2196014 920455 2192199 929666 2185407 936457 2178616 943248 2169406 947063 2159802 947063 L 36212 947063 C 26608 947063 17397 943248 10606 936457 3815 929666 0 920455 0 910851 L 0 36212 C 0 26608 3815 17397 10606 10606 17397 3815 26608 0 3621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96014"/>
              <draw:equation draw:name="f7" draw:formula="?f4 / 947063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51" draw:style-name="a677" draw:name="TextBox 10" svg:x="10.39836in" svg:y="1.54016in" svg:width="9.11854in" svg:height="4.0907in">
            <draw:text-box>
              <text:p text:style-name="a676" text:class-names="" text:cond-style-name=""><text:span text:style-name="a675" text:class-names=""/></text:p>
            </draw:text-box>
            <svg:title/>
            <svg:desc/>
          </draw:frame>
        </draw:g>
        <draw:g draw:name="Group 11" draw:id="id138">
          <svg:title/>
          <svg:desc/>
          <draw:custom-shape svg:x="10.39836in" svg:y="5.84961in" svg:width="9.11854in" svg:height="4.26006in" draw:id="id148" draw:style-name="a670" draw:name="Freeform 12">
            <svg:title/>
            <svg:desc/>
            <draw:enhanced-geometry xmlns:dr3d="urn:oasis:names:tc:opendocument:xmlns:dr3d:1.0" draw:type="non-primitive" svg:viewBox="0 0 2196014 1025949" draw:enhanced-path="M 36212 0 L 2159802 0 C 2169406 0 2178616 3815 2185407 10606 2192199 17397 2196014 26608 2196014 36212 L 2196014 989737 C 2196014 999341 2192199 1008551 2185407 1015342 2178616 1022133 2169406 1025949 2159802 1025949 L 36212 1025949 C 26608 1025949 17397 1022133 10606 1015342 3815 1008551 0 999341 0 989737 L 0 36212 C 0 26608 3815 17397 10606 10606 17397 3815 26608 0 3621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96014"/>
              <draw:equation draw:name="f7" draw:formula="?f4 / 102594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49" draw:style-name="a673" draw:name="TextBox 13" svg:x="10.39836in" svg:y="5.69141in" svg:width="9.11854in" svg:height="4.41826in">
            <draw:text-box>
              <text:p text:style-name="a672" text:class-names="" text:cond-style-name=""><text:span text:style-name="a671" text:class-names=""/></text:p>
            </draw:text-box>
            <svg:title/>
            <svg:desc/>
          </draw:frame>
        </draw:g>
        <draw:frame draw:id="id139" draw:style-name="a641" draw:name="TextBox 14" svg:x="1.67244in" svg:y="1.65788in" svg:width="9.64605in" svg:height="1.05311in">
          <draw:text-box>
            <text:p text:style-name="a640" text:class-names="" text:cond-style-name=""><text:span text:style-name="a639" text:class-names="">Class</text:span></text:p>
          </draw:text-box>
          <svg:title/>
          <svg:desc/>
        </draw:frame>
        <draw:frame draw:id="id140" draw:style-name="a644" draw:name="TextBox 15" svg:x="10.97067in" svg:y="1.53663in" svg:width="9.35877in" svg:height="1.00929in">
          <draw:text-box>
            <text:p text:style-name="a643" text:class-names="" text:cond-style-name=""><text:span text:style-name="a642" text:class-names="">Object</text:span></text:p>
          </draw:text-box>
          <svg:title/>
          <svg:desc/>
        </draw:frame>
        <draw:frame draw:id="id141" draw:style-name="a647" draw:name="TextBox 16" svg:x="1.89727in" svg:y="5.9649in" svg:width="7.67468in" svg:height="0.83286in">
          <draw:text-box>
            <text:p text:style-name="a646" text:class-names="" text:cond-style-name=""><text:span text:style-name="a645" text:class-names="">Encapsulation</text:span></text:p>
          </draw:text-box>
          <svg:title/>
          <svg:desc/>
        </draw:frame>
        <draw:frame draw:id="id142" draw:style-name="a650" draw:name="TextBox 17" svg:x="10.97067in" svg:y="5.86229in" svg:width="8.56649in" svg:height="0.93547in">
          <draw:text-box>
            <text:p text:style-name="a649" text:class-names="" text:cond-style-name=""><text:span text:style-name="a648" text:class-names="">Constructor</text:span></text:p>
          </draw:text-box>
          <svg:title/>
          <svg:desc/>
        </draw:frame>
        <draw:frame draw:id="id143" draw:style-name="a653" draw:name="TextBox 18" svg:x="2.79468in" svg:y="0.58724in" svg:width="14.98535in" svg:height="0.77778in">
          <draw:text-box>
            <text:p text:style-name="a652" text:class-names="" text:cond-style-name=""><text:span text:style-name="a651" text:class-names="">OOP Concepts Used in the Project</text:span></text:p>
          </draw:text-box>
          <svg:title/>
          <svg:desc/>
        </draw:frame>
        <draw:frame draw:id="id144" draw:style-name="a657" draw:name="TextBox 19" svg:x="1.67244in" svg:y="2.78064in" svg:width="8.12433in" svg:height="2.50909in">
          <draw:text-box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A class is a blueprint used to create objects. The Student class is used to store student information and related methods.</text:span></text:p>
                  </text:list-item>
                </text:list>
              </text:list-item>
            </text:list>
          </draw:text-box>
          <svg:title/>
          <svg:desc/>
        </draw:frame>
        <draw:frame draw:id="id145" draw:style-name="a661" draw:name="TextBox 20" svg:x="10.97067in" svg:y="2.90891in" svg:width="8.06833in" svg:height="1.34704in">
          <draw:text-box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<text:s text:c="1"/>Student objects are created to store individual student records.</text:span></text:p>
                  </text:list-item>
                </text:list>
              </text:list-item>
            </text:list>
          </draw:text-box>
          <svg:title/>
          <svg:desc/>
        </draw:frame>
        <draw:frame draw:id="id146" draw:style-name="a665" draw:name="TextBox 21" svg:x="10.92278in" svg:y="7.08943in" svg:width="7.19186in" svg:height="2.0197in">
          <draw:text-box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A constructor is a special method used to initialize object data when an object is created.</text:span></text:p>
                  </text:list-item>
                </text:list>
              </text:list-item>
            </text:list>
          </draw:text-box>
          <svg:title/>
          <svg:desc/>
        </draw:frame>
        <draw:frame draw:id="id147" draw:style-name="a669" draw:name="TextBox 22" svg:x="1.67244in" svg:y="7.22528in" svg:width="8.67177in" svg:height="1.8385in">
          <draw:text-box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Encapsulation combines data and methods into a single unit and protects data from direct access.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686" draw:master-page-name="Master1-Layout7-blank-Blank" presentation:presentation-page-layout-name="Master1-PPL7" draw:id="Slide-263">
        <draw:frame draw:id="id156" draw:style-name="a689" draw:name="TextBox 2" svg:x="10.138in" svg:y="2.65487in" svg:width="9.38134in" svg:height="2.04752in">
          <draw:text-box>
            <text:p text:style-name="a688" text:class-names="" text:cond-style-name=""><text:span text:style-name="a687" text:class-names="">StudentResultManagement Class</text:span></text:p>
          </draw:text-box>
          <svg:title/>
          <svg:desc/>
        </draw:frame>
        <draw:frame draw:id="id157" draw:style-name="a692" draw:name="TextBox 3" svg:x="3.02378in" svg:y="2.60278in" svg:width="5.73492in" svg:height="1.12588in">
          <draw:text-box>
            <text:p text:style-name="a691" text:class-names="" text:cond-style-name=""><text:span text:style-name="a690" text:class-names="">Student Class</text:span></text:p>
          </draw:text-box>
          <svg:title/>
          <svg:desc/>
        </draw:frame>
        <draw:custom-shape svg:x="9.82918in" svg:y="0.00014in" svg:width="10.1712in" svg:height="2.36788in" draw:id="id158" draw:style-name="a694" draw:name="Freeform 4">
          <svg:title/>
          <svg:desc/>
          <draw:enhanced-geometry xmlns:dr3d="urn:oasis:names:tc:opendocument:xmlns:dr3d:1.0" draw:type="non-primitive" svg:viewBox="0 0 9676532 2841968" draw:enhanced-path="M 9676532 2841968 L 0 2841968 0 0 9676532 0 9676532 2841968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76532"/>
            <draw:equation draw:name="f7" draw:formula="?f4 / 284196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8.75673in" svg:height="2.68038in" draw:id="id159" draw:style-name="a696" draw:transform="translate(-4.37836in -1.34019in) rotate(-3.14159) translate(4.34744in 9.92763in)" draw:name="Freeform 5">
          <svg:title/>
          <svg:desc/>
          <draw:enhanced-geometry xmlns:dr3d="urn:oasis:names:tc:opendocument:xmlns:dr3d:1.0" draw:type="non-primitive" svg:viewBox="0 0 9676532 2841968" draw:enhanced-path="M 9676532 2841968 L 0 2841968 0 0 9676532 0 9676532 2841968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76532"/>
            <draw:equation draw:name="f7" draw:formula="?f4 / 284196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60" draw:style-name="a699" draw:name="TextBox 6" svg:x="0.5126in" svg:y="1.32292in" svg:width="19.29345in" svg:height="1.03792in">
          <draw:text-box>
            <text:p text:style-name="a698" text:class-names="" text:cond-style-name=""><text:span text:style-name="a697" text:class-names="">Project Structure</text:span></text:p>
          </draw:text-box>
          <svg:title/>
          <svg:desc/>
        </draw:frame>
        <draw:g draw:name="Group 7" draw:id="id161">
          <svg:title/>
          <svg:desc/>
          <draw:custom-shape svg:x="1.64447in" svg:y="3.98289in" svg:width="8.49354in" svg:height="5.92404in" draw:id="id173" draw:style-name="a753" draw:name="Freeform 8">
            <svg:title/>
            <svg:desc/>
            <draw:enhanced-geometry xmlns:dr3d="urn:oasis:names:tc:opendocument:xmlns:dr3d:1.0" draw:type="non-primitive" svg:viewBox="0 0 2045495 1426683" draw:enhanced-path="M 38877 0 L 2006619 0 C 2016929 0 2026818 4096 2034109 11387 2041399 18677 2045495 28566 2045495 38877 L 2045495 1387807 C 2045495 1409278 2028090 1426683 2006619 1426683 L 38877 1426683 C 28566 1426683 18677 1422587 11387 1415297 4096 1408006 0 1398117 0 1387807 L 0 38877 C 0 28566 4096 18677 11387 11387 18677 4096 28566 0 38877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5495"/>
              <draw:equation draw:name="f7" draw:formula="?f4 / 1426683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74" draw:style-name="a756" draw:name="TextBox 9" svg:x="1.64447in" svg:y="3.82469in" svg:width="8.49354in" svg:height="6.08224in">
            <draw:text-box>
              <text:p text:style-name="a755" text:class-names="" text:cond-style-name=""><text:span text:style-name="a754" text:class-names=""/></text:p>
            </draw:text-box>
            <svg:title/>
            <svg:desc/>
          </draw:frame>
        </draw:g>
        <draw:g draw:name="Group 10" draw:id="id162">
          <svg:title/>
          <svg:desc/>
          <draw:custom-shape svg:x="10.71947in" svg:y="5.17114in" svg:width="8.49354in" svg:height="4.95386in" draw:id="id171" draw:style-name="a749" draw:name="Freeform 11">
            <svg:title/>
            <svg:desc/>
            <draw:enhanced-geometry xmlns:dr3d="urn:oasis:names:tc:opendocument:xmlns:dr3d:1.0" draw:type="non-primitive" svg:viewBox="0 0 2045495 1193037" draw:enhanced-path="M 38877 0 L 2006619 0 C 2016929 0 2026818 4096 2034109 11387 2041399 18677 2045495 28566 2045495 38877 L 2045495 1154160 C 2045495 1164471 2041399 1174359 2034109 1181650 2026818 1188941 2016929 1193037 2006619 1193037 L 38877 1193037 C 28566 1193037 18677 1188941 11387 1181650 4096 1174359 0 1164471 0 1154160 L 0 38877 C 0 28566 4096 18677 11387 11387 18677 4096 28566 0 38877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5495"/>
              <draw:equation draw:name="f7" draw:formula="?f4 / 119303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72" draw:style-name="a752" draw:name="TextBox 12" svg:x="10.71947in" svg:y="5.01293in" svg:width="8.49354in" svg:height="5.11207in">
            <draw:text-box>
              <text:p text:style-name="a751" text:class-names="" text:cond-style-name=""><text:span text:style-name="a750" text:class-names=""/></text:p>
            </draw:text-box>
            <svg:title/>
            <svg:desc/>
          </draw:frame>
        </draw:g>
        <draw:frame draw:id="id163" draw:style-name="a714" draw:name="TextBox 13" svg:x="11.09394in" svg:y="5.26096in" svg:width="8.11867in" svg:height="5.10818in">
          <draw:text-box>
            <text:p text:style-name="a701" text:class-names="" text:cond-style-name=""><text:span text:style-name="a700" text:class-names="">Responsible for: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Program Execution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p text:style-name="a706" text:class-names="" text:cond-style-name=""><text:span text:style-name="a705" text:class-names="">Student Data Management</text:span></text:p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8" text:class-names="">Menu Operations</text:span></text:p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4" draw:style-name="a740" draw:name="TextBox 14" svg:x="3.4675in" svg:y="4.08961in" svg:width="6.36021in" svg:height="5.56784in">
          <draw:text-box>
            <text:p text:style-name="a716" text:class-names="" text:cond-style-name=""><text:span text:style-name="a715" text:class-names="">Contains:</text:span></text:p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Student ID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Student Name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>Student Marks</text:span></text:p>
                  </text:list-item>
                </text:list>
              </text:list-item>
            </text:list>
            <text:p text:style-name="a727" text:class-names="" text:cond-style-name=""><text:span text:style-name="a726" text:class-names="">Methods:</text:span></text:p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>getId()</text:span></text:p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1" text:class-names="">getGrade()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display()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7" text:class-names=""/></text:p>
                  </text:list-item>
                </text:list>
              </text:list-item>
            </text:list>
          </draw:text-box>
          <svg:title/>
          <svg:desc/>
        </draw:frame>
        <draw:g draw:name="Group 15" draw:id="id165">
          <svg:title/>
          <svg:desc/>
          <draw:custom-shape svg:x="1.42625in" svg:y="3.57288in" svg:width="1.13125in" svg:height="1.12951in" draw:id="id169" draw:style-name="a745" draw:name="Freeform 16">
            <svg:title/>
            <svg:desc/>
  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154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70" draw:style-name="a748" draw:name="TextBox 17" svg:x="1.5323in" svg:y="3.79808in" svg:width="0.91914in" svg:height="0.79841in">
            <draw:text-box>
              <text:p text:style-name="a747" text:class-names="" text:cond-style-name=""><text:span text:style-name="a746" text:class-names=""/></text:p>
            </draw:text-box>
            <svg:title/>
            <svg:desc/>
          </draw:frame>
        </draw:g>
        <draw:g draw:name="Group 18" draw:id="id166">
          <svg:title/>
          <svg:desc/>
          <draw:custom-shape svg:x="18.18831in" svg:y="4.60638in" svg:width="1.13125in" svg:height="1.12951in" draw:id="id167" draw:style-name="a741" draw:name="Freeform 19">
            <svg:title/>
            <svg:desc/>
  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154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68" draw:style-name="a744" draw:name="TextBox 20" svg:x="18.29436in" svg:y="4.83159in" svg:width="0.91914in" svg:height="0.79841in">
            <draw:text-box>
              <text:p text:style-name="a743" text:class-names="" text:cond-style-name=""><text:span text:style-name="a742" text:class-names=""/></text:p>
            </draw:text-box>
            <svg:title/>
            <svg:desc/>
          </draw:frame>
        </draw:g>
      </draw:page>
      <draw:page draw:name="Slide9" draw:style-name="a757" draw:master-page-name="Master1-Layout7-blank-Blank" presentation:presentation-page-layout-name="Master1-PPL7" draw:id="Slide-264">
        <draw:frame draw:id="id175" draw:style-name="a881" draw:name="TextBox 4" svg:x="0.22193in" svg:y="1.00674in" svg:width="8.00963in" svg:height="10.87602in">
          <draw:text-box>
            <text:p text:style-name="a762" text:class-names="" text:cond-style-name=""><text:span text:style-name="a758" text:class-names="">import<text:s text:c="1"/></text:span><text:span text:style-name="a759" text:class-names="">java.util.Scanner</text:span><text:span text:style-name="a760" text:class-names="">;</text:span><text:span text:style-name="a761" text:class-names=""/></text:p>
            <text:p text:style-name="a764" text:class-names="" text:cond-style-name=""><text:span text:style-name="a763" text:class-names=""/></text:p>
            <text:p text:style-name="a767" text:class-names="" text:cond-style-name=""><text:span text:style-name="a765" text:class-names="">class Student {</text:span><text:span text:style-name="a766" text:class-names=""/></text:p>
            <text:p text:style-name="a769" text:class-names="" text:cond-style-name=""><text:span text:style-name="a768" text:class-names=""/></text:p>
            <text:p text:style-name="a772" text:class-names="" text:cond-style-name=""><text:span text:style-name="a770" text:class-names=""><text:s text:c="4"/>private int id;</text:span><text:span text:style-name="a771" text:class-names=""/></text:p>
            <text:p text:style-name="a775" text:class-names="" text:cond-style-name=""><text:span text:style-name="a773" text:class-names=""><text:s text:c="4"/>private String name;</text:span><text:span text:style-name="a774" text:class-names=""/></text:p>
            <text:p text:style-name="a778" text:class-names="" text:cond-style-name=""><text:span text:style-name="a776" text:class-names=""><text:s text:c="4"/>private double marks;</text:span><text:span text:style-name="a777" text:class-names=""/></text:p>
            <text:p text:style-name="a780" text:class-names="" text:cond-style-name=""><text:span text:style-name="a779" text:class-names=""/></text:p>
            <text:p text:style-name="a783" text:class-names="" text:cond-style-name=""><text:span text:style-name="a781" text:class-names=""><text:s text:c="4"/>// Constructor</text:span><text:span text:style-name="a782" text:class-names=""/></text:p>
            <text:p text:style-name="a786" text:class-names="" text:cond-style-name=""><text:span text:style-name="a784" text:class-names=""><text:s text:c="4"/>Student(int id, String name, double marks) {</text:span><text:span text:style-name="a785" text:class-names=""/></text:p>
            <text:p text:style-name="a789" text:class-names="" text:cond-style-name=""><text:span text:style-name="a787" text:class-names=""><text:s text:c="8"/>this.id = id;</text:span><text:span text:style-name="a788" text:class-names=""/></text:p>
            <text:p text:style-name="a792" text:class-names="" text:cond-style-name=""><text:span text:style-name="a790" text:class-names=""><text:s text:c="8"/>this.name = name;</text:span><text:span text:style-name="a791" text:class-names=""/></text:p>
            <text:p text:style-name="a797" text:class-names="" text:cond-style-name=""><text:span text:style-name="a793" text:class-names=""><text:s text:c="8"/></text:span><text:span text:style-name="a794" text:class-names="">this.marks</text:span><text:span text:style-name="a795" text:class-names=""><text:s text:c="1"/>= marks;</text:span><text:span text:style-name="a796" text:class-names=""/></text:p>
            <text:p text:style-name="a800" text:class-names="" text:cond-style-name=""><text:span text:style-name="a798" text:class-names=""><text:s text:c="4"/>}</text:span><text:span text:style-name="a799" text:class-names=""/></text:p>
            <text:p text:style-name="a802" text:class-names="" text:cond-style-name=""><text:span text:style-name="a801" text:class-names=""/></text:p>
            <text:p text:style-name="a807" text:class-names="" text:cond-style-name=""><text:span text:style-name="a803" text:class-names=""><text:s text:c="4"/>String<text:s text:c="1"/></text:span><text:span text:style-name="a804" text:class-names="">getGrade</text:span><text:span text:style-name="a805" text:class-names="">() {</text:span><text:span text:style-name="a806" text:class-names=""/></text:p>
            <text:p text:style-name="a810" text:class-names="" text:cond-style-name=""><text:span text:style-name="a808" text:class-names=""><text:s text:c="8"/>if (marks &gt;= 80)</text:span><text:span text:style-name="a809" text:class-names=""/></text:p>
            <text:p text:style-name="a813" text:class-names="" text:cond-style-name=""><text:span text:style-name="a811" text:class-names=""><text:s text:c="12"/>return "A+";</text:span><text:span text:style-name="a812" text:class-names=""/></text:p>
            <text:p text:style-name="a816" text:class-names="" text:cond-style-name=""><text:span text:style-name="a814" text:class-names=""><text:s text:c="8"/>else if (marks &gt;= 70)</text:span><text:span text:style-name="a815" text:class-names=""/></text:p>
            <text:p text:style-name="a819" text:class-names="" text:cond-style-name=""><text:span text:style-name="a817" text:class-names=""><text:s text:c="12"/>return "A";</text:span><text:span text:style-name="a818" text:class-names=""/></text:p>
            <text:p text:style-name="a822" text:class-names="" text:cond-style-name=""><text:span text:style-name="a820" text:class-names=""><text:s text:c="8"/>else if (marks &gt;= 60)</text:span><text:span text:style-name="a821" text:class-names=""/></text:p>
            <text:p text:style-name="a825" text:class-names="" text:cond-style-name=""><text:span text:style-name="a823" text:class-names=""><text:s text:c="12"/>return "B";</text:span><text:span text:style-name="a824" text:class-names=""/></text:p>
            <text:p text:style-name="a828" text:class-names="" text:cond-style-name=""><text:span text:style-name="a826" text:class-names=""><text:s text:c="8"/>else if (marks &gt;= 50)</text:span><text:span text:style-name="a827" text:class-names=""/></text:p>
            <text:p text:style-name="a831" text:class-names="" text:cond-style-name=""><text:span text:style-name="a829" text:class-names=""><text:s text:c="12"/>return "C";</text:span><text:span text:style-name="a830" text:class-names=""/></text:p>
            <text:p text:style-name="a834" text:class-names="" text:cond-style-name=""><text:span text:style-name="a832" text:class-names=""><text:s text:c="8"/>else</text:span><text:span text:style-name="a833" text:class-names=""/></text:p>
            <text:p text:style-name="a837" text:class-names="" text:cond-style-name=""><text:span text:style-name="a835" text:class-names=""><text:s text:c="12"/>return "F";</text:span><text:span text:style-name="a836" text:class-names=""/></text:p>
            <text:p text:style-name="a840" text:class-names="" text:cond-style-name=""><text:span text:style-name="a838" text:class-names=""><text:s text:c="4"/>}</text:span><text:span text:style-name="a839" text:class-names=""/></text:p>
            <text:p text:style-name="a842" text:class-names="" text:cond-style-name=""><text:span text:style-name="a841" text:class-names=""/></text:p>
            <text:p text:style-name="a845" text:class-names="" text:cond-style-name=""><text:span text:style-name="a843" text:class-names=""><text:s text:c="4"/>void display() {</text:span><text:span text:style-name="a844" text:class-names=""/></text:p>
            <text:p text:style-name="a850" text:class-names="" text:cond-style-name=""><text:span text:style-name="a846" text:class-names=""><text:s text:c="8"/></text:span><text:span text:style-name="a847" text:class-names="">System.out.println</text:span><text:span text:style-name="a848" text:class-names="">("ID: " + id);</text:span><text:span text:style-name="a849" text:class-names=""/></text:p>
            <text:p text:style-name="a855" text:class-names="" text:cond-style-name=""><text:span text:style-name="a851" text:class-names=""><text:s text:c="8"/></text:span><text:span text:style-name="a852" text:class-names="">System.out.println</text:span><text:span text:style-name="a853" text:class-names="">("Name: " + name);</text:span><text:span text:style-name="a854" text:class-names=""/></text:p>
            <text:p text:style-name="a860" text:class-names="" text:cond-style-name=""><text:span text:style-name="a856" text:class-names=""><text:s text:c="8"/></text:span><text:span text:style-name="a857" text:class-names="">System.out.println</text:span><text:span text:style-name="a858" text:class-names="">("Marks: " + marks);</text:span><text:span text:style-name="a859" text:class-names=""/></text:p>
            <text:p text:style-name="a867" text:class-names="" text:cond-style-name=""><text:span text:style-name="a861" text:class-names=""><text:s text:c="8"/></text:span><text:span text:style-name="a862" text:class-names="">System.out.println</text:span><text:span text:style-name="a863" text:class-names="">("Grade: " +<text:s text:c="1"/></text:span><text:span text:style-name="a864" text:class-names="">getGrade</text:span><text:span text:style-name="a865" text:class-names="">());</text:span><text:span text:style-name="a866" text:class-names=""/></text:p>
            <text:p text:style-name="a872" text:class-names="" text:cond-style-name=""><text:span text:style-name="a868" text:class-names=""><text:s text:c="8"/></text:span><text:span text:style-name="a869" text:class-names="">System.out.println</text:span><text:span text:style-name="a870" text:class-names="">();</text:span><text:span text:style-name="a871" text:class-names=""/></text:p>
            <text:p text:style-name="a875" text:class-names="" text:cond-style-name=""><text:span text:style-name="a873" text:class-names=""><text:s text:c="4"/>}</text:span><text:span text:style-name="a874" text:class-names=""/></text:p>
            <text:p text:style-name="a878" text:class-names="" text:cond-style-name=""><text:span text:style-name="a876" text:class-names="">}</text:span><text:span text:style-name="a877" text:class-names=""/></text:p>
            <text:p text:style-name="a880" text:class-names="" text:cond-style-name=""><text:span text:style-name="a879" text:class-names=""/></text:p>
          </draw:text-box>
          <svg:title/>
          <svg:desc/>
        </draw:frame>
        <draw:frame draw:id="id176" draw:style-name="a1013" draw:name="TextBox 5" svg:x="7.90543in" svg:y="0.89858in" svg:width="10.85714in" svg:height="10.37815in">
          <draw:text-box>
            <text:p text:style-name="a884" text:class-names="" text:cond-style-name=""><text:span text:style-name="a882" text:class-names="">public class Main {</text:span><text:span text:style-name="a883" text:class-names=""/></text:p>
            <text:p text:style-name="a886" text:class-names="" text:cond-style-name=""><text:span text:style-name="a885" text:class-names=""/></text:p>
            <text:p text:style-name="a891" text:class-names="" text:cond-style-name=""><text:span text:style-name="a887" text:class-names=""><text:s text:c="4"/>public static void main(String[]<text:s text:c="1"/></text:span><text:span text:style-name="a888" text:class-names="">args</text:span><text:span text:style-name="a889" text:class-names="">) {</text:span><text:span text:style-name="a890" text:class-names=""/></text:p>
            <text:p text:style-name="a893" text:class-names="" text:cond-style-name=""><text:span text:style-name="a892" text:class-names=""/></text:p>
            <text:p text:style-name="a898" text:class-names="" text:cond-style-name=""><text:span text:style-name="a894" text:class-names=""><text:s text:c="8"/>Scanner<text:s text:c="1"/></text:span><text:span text:style-name="a895" text:class-names="">sc</text:span><text:span text:style-name="a896" text:class-names=""><text:s text:c="1"/>= new Scanner(System.in);</text:span><text:span text:style-name="a897" text:class-names=""/></text:p>
            <text:p text:style-name="a900" text:class-names="" text:cond-style-name=""><text:span text:style-name="a899" text:class-names=""/></text:p>
            <text:p text:style-name="a903" text:class-names="" text:cond-style-name=""><text:span text:style-name="a901" text:class-names=""><text:s text:c="8"/>Student[] students = new Student[10];</text:span><text:span text:style-name="a902" text:class-names=""/></text:p>
            <text:p text:style-name="a906" text:class-names="" text:cond-style-name=""><text:span text:style-name="a904" text:class-names=""><text:s text:c="8"/>int count = 0;</text:span><text:span text:style-name="a905" text:class-names=""/></text:p>
            <text:p text:style-name="a908" text:class-names="" text:cond-style-name=""><text:span text:style-name="a907" text:class-names=""/></text:p>
            <text:p text:style-name="a911" text:class-names="" text:cond-style-name=""><text:span text:style-name="a909" text:class-names=""><text:s text:c="8"/>int choice;</text:span><text:span text:style-name="a910" text:class-names=""/></text:p>
            <text:p text:style-name="a913" text:class-names="" text:cond-style-name=""><text:span text:style-name="a912" text:class-names=""/></text:p>
            <text:p text:style-name="a916" text:class-names="" text:cond-style-name=""><text:span text:style-name="a914" text:class-names=""><text:s text:c="8"/>do {</text:span><text:span text:style-name="a915" text:class-names=""/></text:p>
            <text:p text:style-name="a918" text:class-names="" text:cond-style-name=""><text:span text:style-name="a917" text:class-names=""/></text:p>
            <text:p text:style-name="a923" text:class-names="" text:cond-style-name=""><text:span text:style-name="a919" text:class-names=""><text:s text:c="12"/></text:span><text:span text:style-name="a920" text:class-names="">System.out.println</text:span><text:span text:style-name="a921" text:class-names="">("\n1. Add Student");</text:span><text:span text:style-name="a922" text:class-names=""/></text:p>
            <text:p text:style-name="a928" text:class-names="" text:cond-style-name=""><text:span text:style-name="a924" text:class-names=""><text:s text:c="12"/></text:span><text:span text:style-name="a925" text:class-names="">System.out.println</text:span><text:span text:style-name="a926" text:class-names="">("2. Show All Students");</text:span><text:span text:style-name="a927" text:class-names=""/></text:p>
            <text:p text:style-name="a933" text:class-names="" text:cond-style-name=""><text:span text:style-name="a929" text:class-names=""><text:s text:c="12"/></text:span><text:span text:style-name="a930" text:class-names="">System.out.println</text:span><text:span text:style-name="a931" text:class-names="">("3. Exit");</text:span><text:span text:style-name="a932" text:class-names=""/></text:p>
            <text:p text:style-name="a935" text:class-names="" text:cond-style-name=""><text:span text:style-name="a934" text:class-names=""/></text:p>
            <text:p text:style-name="a940" text:class-names="" text:cond-style-name=""><text:span text:style-name="a936" text:class-names=""><text:s text:c="12"/></text:span><text:span text:style-name="a937" text:class-names="">System.out.print</text:span><text:span text:style-name="a938" text:class-names="">("Enter Choice: ");</text:span><text:span text:style-name="a939" text:class-names=""/></text:p>
            <text:p text:style-name="a947" text:class-names="" text:cond-style-name=""><text:span text:style-name="a941" text:class-names=""><text:s text:c="12"/>choice =<text:s text:c="1"/></text:span><text:span text:style-name="a942" text:class-names="">Integer.parseInt</text:span><text:span text:style-name="a943" text:class-names="">(</text:span><text:span text:style-name="a944" text:class-names="">sc.nextLine</text:span><text:span text:style-name="a945" text:class-names="">());</text:span><text:span text:style-name="a946" text:class-names=""/></text:p>
            <text:p text:style-name="a949" text:class-names="" text:cond-style-name=""><text:span text:style-name="a948" text:class-names=""/></text:p>
            <text:p text:style-name="a952" text:class-names="" text:cond-style-name=""><text:span text:style-name="a950" text:class-names=""><text:s text:c="12"/>if (choice == 1) {</text:span><text:span text:style-name="a951" text:class-names=""/></text:p>
            <text:p text:style-name="a954" text:class-names="" text:cond-style-name=""><text:span text:style-name="a953" text:class-names=""/></text:p>
            <text:p text:style-name="a957" text:class-names="" text:cond-style-name=""><text:span text:style-name="a955" text:class-names=""><text:s text:c="16"/>if (count &lt; 10) {</text:span><text:span text:style-name="a956" text:class-names=""/></text:p>
            <text:p text:style-name="a959" text:class-names="" text:cond-style-name=""><text:span text:style-name="a958" text:class-names=""/></text:p>
            <text:p text:style-name="a964" text:class-names="" text:cond-style-name=""><text:span text:style-name="a960" text:class-names=""><text:s text:c="20"/></text:span><text:span text:style-name="a961" text:class-names="">System.out.print</text:span><text:span text:style-name="a962" text:class-names="">("Enter ID: ");</text:span><text:span text:style-name="a963" text:class-names=""/></text:p>
            <text:p text:style-name="a971" text:class-names="" text:cond-style-name=""><text:span text:style-name="a965" text:class-names=""><text:s text:c="20"/>int id =<text:s text:c="1"/></text:span><text:span text:style-name="a966" text:class-names="">Integer.parseInt</text:span><text:span text:style-name="a967" text:class-names="">(</text:span><text:span text:style-name="a968" text:class-names="">sc.nextLine</text:span><text:span text:style-name="a969" text:class-names="">());</text:span><text:span text:style-name="a970" text:class-names=""/></text:p>
            <text:p text:style-name="a973" text:class-names="" text:cond-style-name=""><text:span text:style-name="a972" text:class-names=""/></text:p>
            <text:p text:style-name="a978" text:class-names="" text:cond-style-name=""><text:span text:style-name="a974" text:class-names=""><text:s text:c="20"/></text:span><text:span text:style-name="a975" text:class-names="">System.out.print</text:span><text:span text:style-name="a976" text:class-names="">("Enter Name: ");</text:span><text:span text:style-name="a977" text:class-names=""/></text:p>
            <text:p text:style-name="a983" text:class-names="" text:cond-style-name=""><text:span text:style-name="a979" text:class-names=""><text:s text:c="20"/>String name =<text:s text:c="1"/></text:span><text:span text:style-name="a980" text:class-names="">sc.nextLine</text:span><text:span text:style-name="a981" text:class-names="">();</text:span><text:span text:style-name="a982" text:class-names=""/></text:p>
            <text:p text:style-name="a985" text:class-names="" text:cond-style-name=""><text:span text:style-name="a984" text:class-names=""/></text:p>
            <text:p text:style-name="a990" text:class-names="" text:cond-style-name=""><text:span text:style-name="a986" text:class-names=""><text:s text:c="20"/></text:span><text:span text:style-name="a987" text:class-names="">System.out.print</text:span><text:span text:style-name="a988" text:class-names="">("Enter Marks: ");</text:span><text:span text:style-name="a989" text:class-names=""/></text:p>
            <text:p text:style-name="a997" text:class-names="" text:cond-style-name=""><text:span text:style-name="a991" text:class-names=""><text:s text:c="20"/>double marks =<text:s text:c="1"/></text:span><text:span text:style-name="a992" text:class-names="">Double.parseDouble</text:span><text:span text:style-name="a993" text:class-names="">(</text:span><text:span text:style-name="a994" text:class-names="">sc.nextLine</text:span><text:span text:style-name="a995" text:class-names="">());</text:span><text:span text:style-name="a996" text:class-names=""/></text:p>
            <text:p text:style-name="a999" text:class-names="" text:cond-style-name=""><text:span text:style-name="a998" text:class-names=""/></text:p>
            <text:p text:style-name="a1002" text:class-names="" text:cond-style-name=""><text:span text:style-name="a1000" text:class-names=""><text:s text:c="20"/>students[count] = new Student(id, name, marks);</text:span><text:span text:style-name="a1001" text:class-names=""/></text:p>
            <text:p text:style-name="a1005" text:class-names="" text:cond-style-name=""><text:span text:style-name="a1003" text:class-names=""><text:s text:c="20"/>count++;</text:span><text:span text:style-name="a1004" text:class-names=""/></text:p>
            <text:p text:style-name="a1007" text:class-names="" text:cond-style-name=""><text:span text:style-name="a1006" text:class-names=""/></text:p>
            <text:p text:style-name="a1012" text:class-names="" text:cond-style-name=""><text:span text:style-name="a1008" text:class-names=""><text:s text:c="20"/></text:span><text:span text:style-name="a1009" text:class-names="">System.out.println</text:span><text:span text:style-name="a1010" text:class-names="">("Student Added!");</text:span><text:span text:style-name="a1011" text:class-names=""/></text:p>
          </draw:text-box>
          <svg:title/>
          <svg:desc/>
        </draw:frame>
        <draw:custom-shape svg:x="18.96133in" svg:y="9.90244in" svg:width="1.13125in" svg:height="1.12951in" draw:id="id177" draw:style-name="a1014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0.00248in" svg:y="0.00112in" svg:width="1.13125in" svg:height="1.12951in" draw:id="id178" draw:style-name="a1015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8.86265in" svg:y="10.14915in" svg:width="1.13125in" svg:height="1.12951in" draw:id="id179" draw:style-name="a1016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22778in" svg:y="-0.13046in" svg:width="1.13125in" svg:height="1.12951in" draw:id="id180" draw:style-name="a1017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9087in" svg:y="4.95178in" svg:width="1.13125in" svg:height="1.12951in" draw:id="id181" draw:style-name="a1018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4357in" svg:y="4.35967in" svg:width="0.75296in" svg:height="0.71832in" draw:id="id182" draw:style-name="a1019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9712in" svg:y="0.08336in" svg:width="5.60493in" svg:height="0.81701in" draw:id="id183" draw:style-name="a1020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67186in" svg:y="0.08336in" svg:width="5.25954in" svg:height="0.81701in" draw:id="id184" draw:style-name="a1021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85" draw:style-name="a1024" draw:name="TextBox 2" svg:x="2.12829in" svg:y="0.08826in" svg:width="5.03292in" svg:height="0.70789in">
          <draw:text-box>
            <text:p text:style-name="a1023" text:class-names="" text:cond-style-name=""><text:span text:style-name="a1022" text:class-names="">Java Code Example</text:span></text:p>
          </draw:text-box>
          <svg:title/>
          <svg:desc/>
        </draw:frame>
        <draw:frame draw:id="id186" draw:style-name="a1028" draw:name="TextBox 3" svg:x="9.2704in" svg:y="-0.1261in" svg:width="8.15287in" svg:height="0.92239in">
          <draw:text-box>
            <text:p text:style-name="a1027" text:class-names="" text:cond-style-name=""><text:span text:style-name="a1025" text:class-names="">Main Function</text:span><text:span text:style-name="a1026" text:class-names=""/></text:p>
          </draw:text-box>
          <svg:title/>
          <svg:desc/>
        </draw:frame>
      </draw:page>
      <draw:page draw:name="Slide10" draw:style-name="a1029" draw:master-page-name="Master1-Layout7-blank-Blank" presentation:presentation-page-layout-name="Master1-PPL7" draw:id="Slide-265">
        <draw:frame draw:id="id187" draw:style-name="a1072" draw:name="TextBox 2" svg:x="-3.21261in" svg:y="1.76371in" svg:width="26.15937in" svg:height="9.6847in">
          <draw:text-box>
            <text:p text:style-name="a1031" text:class-names="" text:cond-style-name=""><text:span text:style-name="a1030" text:class-names="">System.out.print("Enter Choice: ");</text:span></text:p>
            <text:p text:style-name="a1033" text:class-names="" text:cond-style-name=""><text:span text:style-name="a1032" text:class-names=""><text:s text:c="1"/>choice = Integer.parseInt(sc.nextLine());</text:span></text:p>
            <text:p text:style-name="a1035" text:class-names="" text:cond-style-name=""><text:span text:style-name="a1034" text:class-names=""/></text:p>
            <text:p text:style-name="a1037" text:class-names="" text:cond-style-name=""><text:span text:style-name="a1036" text:class-names=""><text:s text:c="1"/>if (choice == 1) {</text:span></text:p>
            <text:p text:style-name="a1039" text:class-names="" text:cond-style-name=""><text:span text:style-name="a1038" text:class-names=""/></text:p>
            <text:p text:style-name="a1041" text:class-names="" text:cond-style-name=""><text:span text:style-name="a1040" text:class-names=""><text:s text:c="1"/>if (count &lt; 10) {</text:span></text:p>
            <text:p text:style-name="a1043" text:class-names="" text:cond-style-name=""><text:span text:style-name="a1042" text:class-names=""/></text:p>
            <text:p text:style-name="a1045" text:class-names="" text:cond-style-name=""><text:span text:style-name="a1044" text:class-names=""><text:s text:c="1"/>System.out.print("Enter ID: ");</text:span></text:p>
            <text:p text:style-name="a1047" text:class-names="" text:cond-style-name=""><text:span text:style-name="a1046" text:class-names=""><text:s text:c="1"/>int id = Integer.parseInt(sc.nextLine());</text:span></text:p>
            <text:p text:style-name="a1049" text:class-names="" text:cond-style-name=""><text:span text:style-name="a1048" text:class-names=""/></text:p>
            <text:p text:style-name="a1051" text:class-names="" text:cond-style-name=""><text:span text:style-name="a1050" text:class-names=""><text:s text:c="1"/>System.out.print("Enter Name: ");</text:span></text:p>
            <text:p text:style-name="a1053" text:class-names="" text:cond-style-name=""><text:span text:style-name="a1052" text:class-names=""><text:s text:c="1"/>String name = sc.nextLine();</text:span></text:p>
            <text:p text:style-name="a1055" text:class-names="" text:cond-style-name=""><text:span text:style-name="a1054" text:class-names=""/></text:p>
            <text:p text:style-name="a1057" text:class-names="" text:cond-style-name=""><text:span text:style-name="a1056" text:class-names=""><text:s text:c="1"/>System.out.print("Enter Marks: ");</text:span></text:p>
            <text:p text:style-name="a1059" text:class-names="" text:cond-style-name=""><text:span text:style-name="a1058" text:class-names=""><text:s text:c="1"/>double marks = Double.parseDouble(sc.nextLine());</text:span></text:p>
            <text:p text:style-name="a1061" text:class-names="" text:cond-style-name=""><text:span text:style-name="a1060" text:class-names=""/></text:p>
            <text:p text:style-name="a1063" text:class-names="" text:cond-style-name=""><text:span text:style-name="a1062" text:class-names=""><text:s text:c="1"/>students[count] = new Student(id, name, marks);</text:span></text:p>
            <text:p text:style-name="a1065" text:class-names="" text:cond-style-name=""><text:span text:style-name="a1064" text:class-names=""><text:s text:c="1"/>count++;</text:span></text:p>
            <text:p text:style-name="a1067" text:class-names="" text:cond-style-name=""><text:span text:style-name="a1066" text:class-names=""/></text:p>
            <text:p text:style-name="a1069" text:class-names="" text:cond-style-name=""><text:span text:style-name="a1068" text:class-names=""><text:s text:c="1"/>System.out.println("Student Added!");</text:span></text:p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88" draw:style-name="a1076" draw:name="TextBox 2" svg:x="7.03947in" svg:y="0.34539in" svg:width="5.52632in" svg:height="1.00977in">
          <draw:text-box>
            <text:p text:style-name="a1075" text:class-names="" text:cond-style-name=""><text:span text:style-name="a1073" text:class-names="">Main Function</text:span><text:span text:style-name="a1074" text:class-names=""/></text:p>
          </draw:text-box>
          <svg:title/>
          <svg:desc/>
        </draw:frame>
        <draw:custom-shape svg:x="18.86265in" svg:y="10.14915in" svg:width="1.13125in" svg:height="1.12951in" draw:id="id189" draw:style-name="a1077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8.68392in" svg:y="10.31581in" svg:width="1.13125in" svg:height="1.12951in" draw:id="id190" draw:style-name="a1078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0019in" svg:y="0.00551in" svg:width="1.13125in" svg:height="1.12951in" draw:id="id191" draw:style-name="a1079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3144in" svg:y="0.00551in" svg:width="1.13125in" svg:height="1.12951in" draw:id="id192" draw:style-name="a1080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72669in" svg:y="0.34871in" svg:width="5.27598in" svg:height="0.99793in" draw:id="id193" draw:style-name="a1081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page>
      <draw:page draw:name="Slide11" draw:style-name="a1082" draw:master-page-name="Master1-Layout7-blank-Blank" presentation:presentation-page-layout-name="Master1-PPL7" draw:id="Slide-266">
        <draw:frame draw:id="id194" draw:style-name="a1085" draw:name="TextBox 2" svg:x="11.11136in" svg:y="0.25093in" svg:width="6.64522in" svg:height="0.89231in">
          <draw:text-box>
            <text:p text:style-name="a1084" text:class-names="" text:cond-style-name=""><text:span text:style-name="a1083" text:class-names="">Program Output</text:span></text:p>
          </draw:text-box>
          <svg:title/>
          <svg:desc/>
        </draw:frame>
        <draw:frame draw:id="id195" draw:style-name="a1157" draw:name="TextBox 3" svg:x="4.05198in" svg:y="1.25062in" svg:width="20.46935in" svg:height="9.46159in">
          <draw:text-box>
            <text:p text:style-name="a1088" text:class-names="" text:cond-style-name=""><text:span text:style-name="a1086" text:class-names="">1. Add Student</text:span><text:span text:style-name="a1087" text:class-names=""/></text:p>
            <text:p text:style-name="a1091" text:class-names="" text:cond-style-name=""><text:span text:style-name="a1089" text:class-names="">2. Show All Students</text:span><text:span text:style-name="a1090" text:class-names=""/></text:p>
            <text:p text:style-name="a1094" text:class-names="" text:cond-style-name=""><text:span text:style-name="a1092" text:class-names="">3. Exit</text:span><text:span text:style-name="a1093" text:class-names=""/></text:p>
            <text:p text:style-name="a1097" text:class-names="" text:cond-style-name=""><text:span text:style-name="a1095" text:class-names="">Enter Choice: 1</text:span><text:span text:style-name="a1096" text:class-names=""/></text:p>
            <text:p text:style-name="a1100" text:class-names="" text:cond-style-name=""><text:span text:style-name="a1098" text:class-names="">Enter ID: 13</text:span><text:span text:style-name="a1099" text:class-names=""/></text:p>
            <text:p text:style-name="a1104" text:class-names="" text:cond-style-name=""><text:span text:style-name="a1101" text:class-names="">Enter Name:<text:s text:c="1"/></text:span><text:span text:style-name="a1102" text:class-names="">tasnim</text:span><text:span text:style-name="a1103" text:class-names=""/></text:p>
            <text:p text:style-name="a1107" text:class-names="" text:cond-style-name=""><text:span text:style-name="a1105" text:class-names="">Enter Marks: 70</text:span><text:span text:style-name="a1106" text:class-names=""/></text:p>
            <text:p text:style-name="a1110" text:class-names="" text:cond-style-name=""><text:span text:style-name="a1108" text:class-names="">Student Added!</text:span><text:span text:style-name="a1109" text:class-names=""/></text:p>
            <text:p text:style-name="a1112" text:class-names="" text:cond-style-name=""><text:span text:style-name="a1111" text:class-names=""/></text:p>
            <text:p text:style-name="a1115" text:class-names="" text:cond-style-name=""><text:span text:style-name="a1113" text:class-names="">1. Add Student</text:span><text:span text:style-name="a1114" text:class-names=""/></text:p>
            <text:p text:style-name="a1118" text:class-names="" text:cond-style-name=""><text:span text:style-name="a1116" text:class-names="">2. Show All Students</text:span><text:span text:style-name="a1117" text:class-names=""/></text:p>
            <text:p text:style-name="a1121" text:class-names="" text:cond-style-name=""><text:span text:style-name="a1119" text:class-names="">3. Exit</text:span><text:span text:style-name="a1120" text:class-names=""/></text:p>
            <text:p text:style-name="a1124" text:class-names="" text:cond-style-name=""><text:span text:style-name="a1122" text:class-names="">Enter Choice: 2</text:span><text:span text:style-name="a1123" text:class-names=""/></text:p>
            <text:p text:style-name="a1127" text:class-names="" text:cond-style-name=""><text:span text:style-name="a1125" text:class-names="">ID: 13</text:span><text:span text:style-name="a1126" text:class-names=""/></text:p>
            <text:p text:style-name="a1131" text:class-names="" text:cond-style-name=""><text:span text:style-name="a1128" text:class-names="">Name:<text:s text:c="1"/></text:span><text:span text:style-name="a1129" text:class-names="">tasnim</text:span><text:span text:style-name="a1130" text:class-names=""/></text:p>
            <text:p text:style-name="a1134" text:class-names="" text:cond-style-name=""><text:span text:style-name="a1132" text:class-names="">Marks: 70.0</text:span><text:span text:style-name="a1133" text:class-names=""/></text:p>
            <text:p text:style-name="a1137" text:class-names="" text:cond-style-name=""><text:span text:style-name="a1135" text:class-names="">Grade: A</text:span><text:span text:style-name="a1136" text:class-names=""/></text:p>
            <text:p text:style-name="a1139" text:class-names="" text:cond-style-name=""><text:span text:style-name="a1138" text:class-names=""/></text:p>
            <text:p text:style-name="a1141" text:class-names="" text:cond-style-name=""><text:span text:style-name="a1140" text:class-names=""/></text:p>
            <text:p text:style-name="a1144" text:class-names="" text:cond-style-name=""><text:span text:style-name="a1142" text:class-names="">1. Add Student</text:span><text:span text:style-name="a1143" text:class-names=""/></text:p>
            <text:p text:style-name="a1147" text:class-names="" text:cond-style-name=""><text:span text:style-name="a1145" text:class-names="">2. Show All Students</text:span><text:span text:style-name="a1146" text:class-names=""/></text:p>
            <text:p text:style-name="a1150" text:class-names="" text:cond-style-name=""><text:span text:style-name="a1148" text:class-names="">3. Exit</text:span><text:span text:style-name="a1149" text:class-names=""/></text:p>
            <text:p text:style-name="a1153" text:class-names="" text:cond-style-name=""><text:span text:style-name="a1151" text:class-names="">Enter Choice: 3</text:span><text:span text:style-name="a1152" text:class-names=""/></text:p>
            <text:p text:style-name="a1156" text:class-names="" text:cond-style-name=""><text:span text:style-name="a1154" text:class-names="">Program Ended.</text:span><text:span text:style-name="a1155" text:class-names=""/></text:p>
          </draw:text-box>
          <svg:title/>
          <svg:desc/>
        </draw:frame>
        <draw:frame draw:id="id196" draw:style-name="a1206" draw:name="TextBox 4" svg:x="-6.86688in" svg:y="1.48308in" svg:width="25.07461in" svg:height="9.01073in">
          <draw:text-box>
            <text:p text:style-name="a1159" text:class-names="" text:cond-style-name=""><text:span text:style-name="a1158" text:class-names=""><text:s text:c="1"/>} else {</text:span></text:p>
            <text:p text:style-name="a1161" text:class-names="" text:cond-style-name=""><text:span text:style-name="a1160" text:class-names=""><text:s text:c="20"/>System.out.println("List Full!");</text:span></text:p>
            <text:p text:style-name="a1163" text:class-names="" text:cond-style-name=""><text:span text:style-name="a1162" text:class-names=""><text:s text:c="16"/>}</text:span></text:p>
            <text:p text:style-name="a1165" text:class-names="" text:cond-style-name=""><text:span text:style-name="a1164" text:class-names=""/></text:p>
            <text:p text:style-name="a1167" text:class-names="" text:cond-style-name=""><text:span text:style-name="a1166" text:class-names=""><text:s text:c="12"/>} else if (choice == 2) {</text:span></text:p>
            <text:p text:style-name="a1169" text:class-names="" text:cond-style-name=""><text:span text:style-name="a1168" text:class-names=""/></text:p>
            <text:p text:style-name="a1171" text:class-names="" text:cond-style-name=""><text:span text:style-name="a1170" text:class-names=""><text:s text:c="16"/>if (count == 0) {</text:span></text:p>
            <text:p text:style-name="a1173" text:class-names="" text:cond-style-name=""><text:span text:style-name="a1172" text:class-names=""><text:s text:c="20"/>System.out.println("No Student Found!");</text:span></text:p>
            <text:p text:style-name="a1175" text:class-names="" text:cond-style-name=""><text:span text:style-name="a1174" text:class-names=""><text:s text:c="16"/>} else {</text:span></text:p>
            <text:p text:style-name="a1177" text:class-names="" text:cond-style-name=""><text:span text:style-name="a1176" text:class-names=""><text:s text:c="20"/>for (int i = 0; i &lt; count; i++) {</text:span></text:p>
            <text:p text:style-name="a1179" text:class-names="" text:cond-style-name=""><text:span text:style-name="a1178" text:class-names=""><text:s text:c="24"/>students[i].display();</text:span></text:p>
            <text:p text:style-name="a1181" text:class-names="" text:cond-style-name=""><text:span text:style-name="a1180" text:class-names=""><text:s text:c="20"/>}</text:span></text:p>
            <text:p text:style-name="a1183" text:class-names="" text:cond-style-name=""><text:span text:style-name="a1182" text:class-names=""><text:s text:c="16"/>}</text:span></text:p>
            <text:p text:style-name="a1185" text:class-names="" text:cond-style-name=""><text:span text:style-name="a1184" text:class-names=""/></text:p>
            <text:p text:style-name="a1187" text:class-names="" text:cond-style-name=""><text:span text:style-name="a1186" text:class-names=""><text:s text:c="12"/>} else if (choice != 3) {</text:span></text:p>
            <text:p text:style-name="a1189" text:class-names="" text:cond-style-name=""><text:span text:style-name="a1188" text:class-names=""><text:s text:c="16"/>System.out.println("Invalid Choice!");</text:span></text:p>
            <text:p text:style-name="a1191" text:class-names="" text:cond-style-name=""><text:span text:style-name="a1190" text:class-names=""><text:s text:c="12"/>}</text:span></text:p>
            <text:p text:style-name="a1193" text:class-names="" text:cond-style-name=""><text:span text:style-name="a1192" text:class-names=""/></text:p>
            <text:p text:style-name="a1195" text:class-names="" text:cond-style-name=""><text:span text:style-name="a1194" text:class-names=""><text:s text:c="8"/>} while (choice != 3);</text:span></text:p>
            <text:p text:style-name="a1197" text:class-names="" text:cond-style-name=""><text:span text:style-name="a1196" text:class-names=""/></text:p>
            <text:p text:style-name="a1199" text:class-names="" text:cond-style-name=""><text:span text:style-name="a1198" text:class-names=""><text:s text:c="8"/>sc.close();</text:span></text:p>
            <text:p text:style-name="a1201" text:class-names="" text:cond-style-name=""><text:span text:style-name="a1200" text:class-names=""><text:s text:c="8"/>System.out.println("Program Ended.");</text:span></text:p>
            <text:p text:style-name="a1203" text:class-names="" text:cond-style-name=""><text:span text:style-name="a1202" text:class-names=""><text:s text:c="4"/>}</text:span></text:p>
            <text:p text:style-name="a1205" text:class-names="" text:cond-style-name=""><text:span text:style-name="a1204" text:class-names="">}</text:span></text:p>
          </draw:text-box>
          <svg:title/>
          <svg:desc/>
        </draw:frame>
        <draw:frame draw:id="id197" draw:style-name="a1212" draw:name="TextBox 6" svg:x="5in" svg:y="5.625in" svg:width="10in" svg:height="0.70684in">
          <draw:text-box>
            <text:p text:style-name="a1209" text:class-names="" text:cond-style-name=""><text:span text:style-name="a1207" text:class-names="">Main Function</text:span><text:span text:style-name="a1208" text:class-names=""/></text:p>
            <text:p text:style-name="a1211" text:class-names="" text:cond-style-name=""><text:span text:style-name="a1210" text:class-names=""/></text:p>
          </draw:text-box>
          <svg:title/>
          <svg:desc/>
        </draw:frame>
        <draw:frame draw:id="id198" draw:style-name="a1217" draw:name="TextBox 7" svg:x="3.84868in" svg:y="0.24671in" svg:width="6.90789in" svg:height="1.00977in">
          <draw:text-box>
            <text:p text:style-name="a1216" text:class-names="" text:cond-style-name=""><text:span text:style-name="a1213" text:class-names="">Main<text:s text:c="1"/></text:span><text:span text:style-name="a1214" text:class-names="">Fuction</text:span><text:span text:style-name="a1215" text:class-names=""/></text:p>
          </draw:text-box>
          <svg:title/>
          <svg:desc/>
        </draw:frame>
        <draw:custom-shape svg:x="0.3144in" svg:y="0.00551in" svg:width="1.13125in" svg:height="1.12951in" draw:id="id199" draw:style-name="a1218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0041in" svg:y="0.12283in" svg:width="1.13125in" svg:height="1.12951in" draw:id="id200" draw:style-name="a1219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8.87142in" svg:y="10.14147in" svg:width="1.13125in" svg:height="1.12951in" draw:id="id201" draw:style-name="a1220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9.01725in" svg:y="9.92546in" svg:width="1.13125in" svg:height="1.12951in" draw:id="id202" draw:style-name="a1221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9.90541in" svg:y="11.15365in" svg:width="0.09507in" svg:height="0.10404in" draw:id="id203" draw:style-name="a1222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42624in" svg:y="5.6305in" svg:width="0.86809in" svg:height="0.91569in" draw:id="id204" draw:style-name="a1223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3.27493in" svg:y="0.36735in" svg:width="5.39112in" svg:height="0.8828in" draw:id="id205" draw:style-name="a1224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49861in" svg:y="0.21932in" svg:width="5.86809in" svg:height="1.03082in" draw:id="id206" draw:style-name="a1225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29796in" svg:y="5.13708in" svg:width="0.67072in" svg:height="0.63609in" draw:id="id207" draw:style-name="a1226" draw:name="Freeform 19">
          <svg:title/>
          <svg:desc/>
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2800"/>
            <draw:equation draw:name="f7" draw:formula="?f4 / 81154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page>
      <draw:page draw:name="Slide12" draw:style-name="a1227" draw:master-page-name="Master1-Layout7-blank-Blank" presentation:presentation-page-layout-name="Master1-PPL7" draw:id="Slide-267">
        <draw:custom-shape svg:x="0.00186in" svg:y="0.00682in" svg:width="10.58508in" svg:height="3.05588in" draw:id="id208" draw:style-name="a1229" draw:name="Freeform 2">
          <svg:title/>
          <svg:desc/>
          <draw:enhanced-geometry xmlns:dr3d="urn:oasis:names:tc:opendocument:xmlns:dr3d:1.0" draw:type="non-primitive" svg:viewBox="0 0 11152862 3275562" draw:enhanced-path="M 0 3275562 L 11152862 3275562 11152862 0 0 0 0 3275562 Z N" draw:text-areas="?f8 ?f10 ?f9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52862"/>
            <draw:equation draw:name="f7" draw:formula="?f4 / 327556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64615in" svg:y="0.00682in" svg:width="10.35481in" svg:height="3.05588in" draw:id="id209" draw:style-name="a1231" draw:name="Freeform 3">
          <svg:title/>
          <svg:desc/>
          <draw:enhanced-geometry xmlns:dr3d="urn:oasis:names:tc:opendocument:xmlns:dr3d:1.0" draw:type="non-primitive" svg:viewBox="0 0 11152862 3275562" draw:enhanced-path="M 11152862 3275562 L 0 3275562 0 0 11152862 0 11152862 3275562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52862"/>
            <draw:equation draw:name="f7" draw:formula="?f4 / 327556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10" draw:style-name="a1234" draw:name="TextBox 4" svg:x="-0.36804in" svg:y="3.05197in" svg:width="10.67536in" svg:height="0.6711in">
          <draw:text-box>
            <text:p text:style-name="a1233" text:class-names="" text:cond-style-name=""><text:span text:style-name="a1232" text:class-names="">Advantages of the Project</text:span></text:p>
          </draw:text-box>
          <svg:title/>
          <svg:desc/>
        </draw:frame>
        <draw:frame draw:id="id211" draw:style-name="a1252" draw:name="TextBox 5" svg:x="0.43573in" svg:y="3.97884in" svg:width="15.88721in" svg:height="4.26369in">
          <draw:text-box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35" text:class-names="">Easy to understand and use</text:span></text:p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8" text:class-names="">Beginner-friendly project</text:span></text:p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>Demonstrates OOP concepts clearly</text:span></text:p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4" text:class-names="">Automatic grade generation</text:span></text:p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>Efficient student record management</text:span></text:p>
                  </text:list-item>
                </text:list>
              </text:list-item>
            </text:list>
            <text:p text:style-name="a1251" text:class-names="" text:cond-style-name=""><text:span text:style-name="a1250" text:class-names=""/></text:p>
          </draw:text-box>
          <svg:title/>
          <svg:desc/>
        </draw:frame>
        <draw:custom-shape svg:x="0.00186in" svg:y="8.06623in" svg:width="10.58508in" svg:height="3.18746in" draw:id="id212" draw:style-name="a1254" draw:name="Freeform 6">
          <svg:title/>
          <svg:desc/>
          <draw:enhanced-geometry xmlns:dr3d="urn:oasis:names:tc:opendocument:xmlns:dr3d:1.0" draw:type="non-primitive" svg:viewBox="0 0 11152862 3275562" draw:enhanced-path="M 0 0 L 11152862 0 11152862 3275562 0 3275562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52862"/>
            <draw:equation draw:name="f7" draw:formula="?f4 / 327556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64615in" svg:y="8.06623in" svg:width="10.35481in" svg:height="3.18746in" draw:id="id213" draw:style-name="a1256" draw:name="Freeform 7">
          <svg:title/>
          <svg:desc/>
          <draw:enhanced-geometry xmlns:dr3d="urn:oasis:names:tc:opendocument:xmlns:dr3d:1.0" draw:type="non-primitive" svg:viewBox="0 0 11152862 3275562" draw:enhanced-path="M 11152862 0 L 0 0 0 3275562 11152862 3275562 11152862 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52862"/>
            <draw:equation draw:name="f7" draw:formula="?f4 / 327556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14" draw:style-name="a1271" draw:name="TextBox 8" svg:x="10.98177in" svg:y="3.97884in" svg:width="9.18571in" svg:height="3.4326in">
          <draw:text-box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7" text:class-names="">Stores only 5 students</text:span></text:p>
                  </text:list-item>
                </text:list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>No database integration</text:span></text:p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No update or delete functionality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6" text:class-names="">Console-based interface</text:span></text:p>
                  </text:list-item>
                </text:list>
              </text:list-item>
            </text:list>
            <text:p text:style-name="a1270" text:class-names="" text:cond-style-name=""><text:span text:style-name="a1269" text:class-names=""/></text:p>
          </draw:text-box>
          <svg:title/>
          <svg:desc/>
        </draw:frame>
        <draw:frame draw:id="id215" draw:style-name="a1274" draw:name="TextBox 9" svg:x="7.8312in" svg:y="3.01884in" svg:width="11.82821in" svg:height="0.74778in">
          <draw:text-box>
            <text:p text:style-name="a1273" text:class-names="" text:cond-style-name=""><text:span text:style-name="a1272" text:class-names="">Limitations</text:span></text:p>
          </draw:text-box>
          <svg:title/>
          <svg:desc/>
        </draw:frame>
      </draw:page>
      <draw:page draw:name="Slide13" draw:style-name="a1275" draw:master-page-name="Master1-Layout7-blank-Blank" presentation:presentation-page-layout-name="Master1-PPL7" draw:id="Slide-268">
        <draw:frame draw:id="id216" draw:style-name="a1278" draw:name="TextBox 2" svg:x="2.86141in" svg:y="0.71227in" svg:width="11.08639in" svg:height="0.99208in">
          <draw:text-box>
            <text:p text:style-name="a1277" text:class-names="" text:cond-style-name=""><text:span text:style-name="a1276" text:class-names="">Future Enhancements</text:span></text:p>
          </draw:text-box>
          <svg:title/>
          <svg:desc/>
        </draw:frame>
        <draw:frame draw:id="id217" draw:style-name="a1296" draw:name="TextBox 3" svg:x="2.74631in" svg:y="2.12037in" svg:width="15.29141in" svg:height="4.20844in">
          <draw:text-box>
            <text:list text:style-name="a1281">
              <text:list-item>
                <text:list text:style-name="a1281">
                  <text:list-item>
                    <text:p text:style-name="a1280" text:class-names="" text:cond-style-name=""><text:span text:style-name="a1279" text:class-names="">Add Graphical User Interface (GUI)</text:span></text:p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p text:style-name="a1283" text:class-names="" text:cond-style-name=""><text:span text:style-name="a1282" text:class-names="">Connect with a Database</text:span></text:p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p text:style-name="a1286" text:class-names="" text:cond-style-name=""><text:span text:style-name="a1285" text:class-names="">Add Update and Delete Features</text:span></text:p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8" text:class-names="">Generate Student Result Reports</text:span></text:p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Improve User Experience</text:span></text:p>
                  </text:list-item>
                </text:list>
              </text:list-item>
            </text:list>
            <text:p text:style-name="a1295" text:class-names="" text:cond-style-name=""><text:span text:style-name="a1294" text:class-names=""/></text:p>
          </draw:text-box>
          <svg:title/>
          <svg:desc/>
        </draw:frame>
        <draw:custom-shape svg:width="11.58436in" svg:height="3.1133in" draw:id="id218" draw:style-name="a1298" draw:transform="translate(-5.79218in -1.55665in) rotate(-1.5708) translate(1.44446in 5.625in)" draw:name="Freeform 4">
          <svg:title/>
          <svg:desc/>
          <draw:enhanced-geometry xmlns:dr3d="urn:oasis:names:tc:opendocument:xmlns:dr3d:1.0" draw:type="non-primitive" svg:viewBox="0 0 10592737 2846798" draw:enhanced-path="M 0 2846798 L 10592737 2846798 10592737 0 0 0 0 2846798 Z N" draw:text-areas="?f8 ?f10 ?f9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92737"/>
            <draw:equation draw:name="f7" draw:formula="?f4 / 284679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11.58436in" svg:height="3.1133in" draw:id="id219" draw:style-name="a1300" draw:transform="translate(-5.79218in -1.55665in) rotate(-4.71239) translate(18.55818in 5.625in)" draw:name="Freeform 5">
          <svg:title/>
          <svg:desc/>
          <draw:enhanced-geometry xmlns:dr3d="urn:oasis:names:tc:opendocument:xmlns:dr3d:1.0" draw:type="non-primitive" svg:viewBox="0 0 10592737 2846798" draw:enhanced-path="M 0 2846798 L 10592737 2846798 10592737 0 0 0 0 2846798 Z N" draw:text-areas="?f8 ?f10 ?f9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92737"/>
            <draw:equation draw:name="f7" draw:formula="?f4 / 284679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6" draw:id="id220">
          <svg:title/>
          <svg:desc/>
          <draw:custom-shape svg:x="11.1354in" svg:y="2.81418in" svg:width="10.2243in" svg:height="10.69965in" draw:id="id227" draw:style-name="a1310" draw:name="Freeform 7">
            <svg:title/>
            <svg:desc/>
            <draw:enhanced-geometry xmlns:dr3d="urn:oasis:names:tc:opendocument:xmlns:dr3d:1.0" draw:type="non-primitive" svg:viewBox="0 0 12465469 13105174" draw:enhanced-path="M 0 0 L 12465469 0 12465469 13105174 0 13105174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65469"/>
              <draw:equation draw:name="f7" draw:formula="?f4 / 13105174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g draw:name="Group 8" draw:id="id228">
            <svg:title/>
            <svg:desc/>
            <draw:custom-shape svg:x="10.99666in" svg:y="2.96603in" svg:width="9.66235in" svg:height="9.57518in" draw:id="id229" draw:style-name="a1311" draw:name="Freeform 9">
              <svg:title/>
              <svg:desc/>
              <draw:enhanced-geometry xmlns:dr3d="urn:oasis:names:tc:opendocument:xmlns:dr3d:1.0" draw:type="non-primitive" svg:viewBox="0 0 6378462 6350064" draw:enhanced-path="M 3189231 32 L 3189231 32 C 2051530 -5056 998068 598980 427743 1583419 -142581 2567857 -142581 3782207 427743 4766645 998068 5751084 2051530 6355120 3189231 6350032 4326932 6355120 5380395 5751084 5950719 4766645 6521043 3782207 6521043 2567857 5950719 1583419 5380395 598980 4326932 -5056 3189231 32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378462"/>
                <draw:equation draw:name="f7" draw:formula="?f4 / 635006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  <draw:custom-shape svg:x="11.6363in" svg:y="3.59991in" svg:width="8.38305in" svg:height="8.30742in" draw:id="id230" draw:style-name="a1313" draw:name="Freeform 10">
              <svg:title/>
              <svg:desc/>
              <draw:enhanced-geometry xmlns:dr3d="urn:oasis:names:tc:opendocument:xmlns:dr3d:1.0" draw:type="non-primitive" svg:viewBox="0 0 5533953 5509315" draw:enhanced-path="M 2766977 28 C 1779908 -4386 865924 519676 371110 1373774 -123703 2227873 -123703 3281443 371110 4135542 865924 4989640 1779908 5513702 2766977 5509288 3754046 5513702 4668030 4989640 5162844 4135542 5657657 3281443 5657657 2227873 5162844 1373775 4668030 519676 3754046 -4386 2766977 28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5533953"/>
                <draw:equation draw:name="f7" draw:formula="?f4 / 5509315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draw:g>
        </draw:g>
        <draw:g draw:name="Group 11" draw:id="id221">
          <svg:title/>
          <svg:desc/>
          <draw:custom-shape svg:x="5.18346in" svg:y="8.34194in" svg:width="1.13125in" svg:height="1.12951in" draw:id="id225" draw:style-name="a1305" draw:name="Freeform 12">
            <svg:title/>
            <svg:desc/>
  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154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26" draw:style-name="a1308" draw:name="TextBox 13" svg:x="5.28951in" svg:y="8.56714in" svg:width="0.91914in" svg:height="0.79841in">
            <draw:text-box>
              <text:p text:style-name="a1307" text:class-names="" text:cond-style-name=""><text:span text:style-name="a1306" text:class-names=""/></text:p>
            </draw:text-box>
            <svg:title/>
            <svg:desc/>
          </draw:frame>
        </draw:g>
        <draw:g draw:name="Group 14" draw:id="id222">
          <svg:title/>
          <svg:desc/>
          <draw:custom-shape svg:x="6.31471in" svg:y="7.75538in" svg:width="0.83499in" svg:height="0.83371in" draw:id="id223" draw:style-name="a1301" draw:name="Freeform 15">
            <svg:title/>
            <svg:desc/>
  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154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24" draw:style-name="a1304" draw:name="TextBox 16" svg:x="6.39299in" svg:y="7.9216in" svg:width="0.67843in" svg:height="0.58932in">
            <draw:text-box>
              <text:p text:style-name="a1303" text:class-names="" text:cond-style-name=""><text:span text:style-name="a1302" text:class-names=""/></text:p>
            </draw:text-box>
            <svg:title/>
            <svg:desc/>
          </draw:frame>
        </draw:g>
      </draw:page>
      <draw:page draw:name="Slide14" draw:style-name="a1314" draw:master-page-name="Master1-Layout7-blank-Blank" presentation:presentation-page-layout-name="Master1-PPL7" draw:id="Slide-269">
        <draw:custom-shape svg:x="0.00186in" svg:y="-0.12476in" svg:width="10.68376in" svg:height="3.18746in" draw:id="id231" draw:style-name="a1316" draw:name="Freeform 2">
          <svg:title/>
          <svg:desc/>
          <draw:enhanced-geometry xmlns:dr3d="urn:oasis:names:tc:opendocument:xmlns:dr3d:1.0" draw:type="non-primitive" svg:viewBox="0 0 11152862 3275562" draw:enhanced-path="M 0 3275562 L 11152862 3275562 11152862 0 0 0 0 3275562 Z N" draw:text-areas="?f8 ?f10 ?f9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52862"/>
            <draw:equation draw:name="f7" draw:formula="?f4 / 327556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64615in" svg:y="-0.12476in" svg:width="10.35481in" svg:height="3.18746in" draw:id="id232" draw:style-name="a1318" draw:name="Freeform 3">
          <svg:title/>
          <svg:desc/>
          <draw:enhanced-geometry xmlns:dr3d="urn:oasis:names:tc:opendocument:xmlns:dr3d:1.0" draw:type="non-primitive" svg:viewBox="0 0 11152862 3275562" draw:enhanced-path="M 11152862 3275562 L 0 3275562 0 0 11152862 0 11152862 3275562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52862"/>
            <draw:equation draw:name="f7" draw:formula="?f4 / 327556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33" draw:style-name="a1327" draw:name="TextBox 4" svg:x="1.8406in" svg:y="4.18378in" svg:width="17.72293in" svg:height="5.15261in">
          <draw:text-box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9" text:class-names="">The Student Result Management System successfully demonstrates the use of Java programming and OOP concepts such as Class, Object, and Encapsulation.</text:span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22" text:class-names="">This project helps students understand how object-oriented programming can be used to manage and organize data efficiently in real-world applications.</text:span></text:p>
                  </text:list-item>
                </text:list>
              </text:list-item>
            </text:list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234" draw:style-name="a1330" draw:name="TextBox 5" svg:x="3.56627in" svg:y="2.71668in" svg:width="12.86746in" svg:height="1.15276in">
          <draw:text-box>
            <text:p text:style-name="a1329" text:class-names="" text:cond-style-name=""><text:span text:style-name="a1328" text:class-names="">Conclusion</text:span></text:p>
          </draw:text-box>
          <svg:title/>
          <svg:desc/>
        </draw:frame>
      </draw:page>
      <draw:page draw:name="Slide15" draw:style-name="a1331" draw:master-page-name="Master1-Layout7-blank-Blank" presentation:presentation-page-layout-name="Master1-PPL7" draw:id="Slide-270">
        <draw:frame draw:id="id235" draw:style-name="a1334" draw:name="TextBox 2" svg:x="3.91866in" svg:y="4.47704in" svg:width="12.16268in" svg:height="3.42121in">
          <draw:text-box>
            <text:p text:style-name="a1333" text:class-names="" text:cond-style-name=""><text:span text:style-name="a1332" text:class-names="">Any Questions?</text:span></text:p>
          </draw:text-box>
          <svg:title/>
          <svg:desc/>
        </draw:frame>
        <draw:custom-shape svg:x="0in" svg:y="4.27039in" svg:width="6.10134in" svg:height="6.97961in" draw:id="id236" draw:style-name="a1336" draw:name="Freeform 3">
          <svg:title/>
          <svg:desc/>
          <draw:enhanced-geometry xmlns:dr3d="urn:oasis:names:tc:opendocument:xmlns:dr3d:1.0" draw:type="non-primitive" svg:viewBox="0 0 5579065 6382152" draw:enhanced-path="M 0 0 L 5579065 0 5579065 6382152 0 6382152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579065"/>
            <draw:equation draw:name="f7" draw:formula="?f4 / 638215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6.10134in" svg:height="6.97961in" draw:id="id237" draw:style-name="a1338" draw:transform="translate(-3.05067in -3.4898in) rotate(-3.14159) translate(16.94933in 3.4898in)" draw:name="Freeform 4">
          <svg:title/>
          <svg:desc/>
          <draw:enhanced-geometry xmlns:dr3d="urn:oasis:names:tc:opendocument:xmlns:dr3d:1.0" draw:type="non-primitive" svg:viewBox="0 0 5579065 6382152" draw:enhanced-path="M 0 0 L 5579065 0 5579065 6382152 0 6382152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579065"/>
            <draw:equation draw:name="f7" draw:formula="?f4 / 638215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8.49574in" svg:height="7.83732in" draw:id="id238" draw:style-name="a1340" draw:transform="translate(-4.24787in -3.91866in) rotate(-1.5708) translate(3.91866in 4.24787in)" draw:name="Freeform 5">
          <svg:title/>
          <svg:desc/>
          <draw:enhanced-geometry xmlns:dr3d="urn:oasis:names:tc:opendocument:xmlns:dr3d:1.0" draw:type="non-primitive" svg:viewBox="0 0 7768508 7166448" draw:enhanced-path="M 0 0 L 7768508 0 7768508 7166448 0 7166448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68508"/>
            <draw:equation draw:name="f7" draw:formula="?f4 / 716644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8.49574in" svg:height="7.83732in" draw:id="id239" draw:style-name="a1342" draw:transform="translate(-4.24787in -3.91866in) rotate(-1.5708) translate(16.08134in 7.00213in)" draw:name="Freeform 6">
          <svg:title/>
          <svg:desc/>
          <draw:enhanced-geometry xmlns:dr3d="urn:oasis:names:tc:opendocument:xmlns:dr3d:1.0" draw:type="non-primitive" svg:viewBox="0 0 7768508 7166448" draw:enhanced-path="M 7768508 7166448 L 0 7166448 0 0 7768508 0 7768508 7166448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68508"/>
            <draw:equation draw:name="f7" draw:formula="?f4 / 716644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40" draw:style-name="a1345" draw:name="TextBox 7" svg:x="3.23006in" svg:y="2.50375in" svg:width="12.16268in" svg:height="1.74412in">
          <draw:text-box>
            <text:p text:style-name="a1344" text:class-names="" text:cond-style-name=""><text:span text:style-name="a1343" text:class-names="">Thank You</text:span></text:p>
          </draw:text-box>
          <svg:title/>
          <svg:desc/>
        </draw:frame>
        <draw:g draw:name="Group 8" draw:id="id241">
          <svg:title/>
          <svg:desc/>
          <draw:custom-shape svg:x="3.30215in" svg:y="3.18288in" svg:width="0.83499in" svg:height="0.83371in" draw:id="id251" draw:style-name="a1358" draw:name="Freeform 9">
            <svg:title/>
            <svg:desc/>
  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154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52" draw:style-name="a1361" draw:name="TextBox 10" svg:x="3.38043in" svg:y="3.34911in" svg:width="0.67843in" svg:height="0.58932in">
            <draw:text-box>
              <text:p text:style-name="a1360" text:class-names="" text:cond-style-name=""><text:span text:style-name="a1359" text:class-names=""/></text:p>
            </draw:text-box>
            <svg:title/>
            <svg:desc/>
          </draw:frame>
        </draw:g>
        <draw:g draw:name="Group 11" draw:id="id242">
          <svg:title/>
          <svg:desc/>
          <draw:custom-shape svg:x="15.39274in" svg:y="6.56275in" svg:width="0.83499in" svg:height="0.83371in" draw:id="id249" draw:style-name="a1354" draw:name="Freeform 12">
            <svg:title/>
            <svg:desc/>
  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154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50" draw:style-name="a1357" draw:name="TextBox 13" svg:x="15.47102in" svg:y="6.72898in" svg:width="0.67843in" svg:height="0.58932in">
            <draw:text-box>
              <text:p text:style-name="a1356" text:class-names="" text:cond-style-name=""><text:span text:style-name="a1355" text:class-names=""/></text:p>
            </draw:text-box>
            <svg:title/>
            <svg:desc/>
          </draw:frame>
        </draw:g>
        <draw:g draw:name="Group 14" draw:id="id243">
          <svg:title/>
          <svg:desc/>
          <draw:custom-shape svg:x="16.08134in" svg:y="6.13174in" svg:width="0.43168in" svg:height="0.43101in" draw:id="id247" draw:style-name="a1350" draw:name="Freeform 15">
            <svg:title/>
            <svg:desc/>
            <draw:enhanced-geometry xmlns:dr3d="urn:oasis:names:tc:opendocument:xmlns:dr3d:1.0" draw:type="non-primitive" svg:viewBox="0 0 812800 811549" draw:enhanced-path="M 406400 0 C 181951 0 0 181671 0 405774 0 629878 181951 811549 406400 811549 630849 811549 812800 629878 812800 405774 812800 18167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154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48" draw:style-name="a1353" draw:name="TextBox 16" svg:x="16.12181in" svg:y="6.21767in" svg:width="0.35074in" svg:height="0.30467in">
            <draw:text-box>
              <text:p text:style-name="a1352" text:class-names="" text:cond-style-name=""><text:span text:style-name="a1351" text:class-names=""/></text:p>
            </draw:text-box>
            <svg:title/>
            <svg:desc/>
          </draw:frame>
        </draw:g>
        <draw:g draw:name="Group 17" draw:id="id244">
          <svg:title/>
          <svg:desc/>
          <draw:custom-shape svg:x="2.75222in" svg:y="3.91254in" svg:width="0.47784in" svg:height="0.53689in" draw:id="id245" draw:style-name="a1346" draw:name="Freeform 18">
            <svg:title/>
            <svg:desc/>
            <draw:enhanced-geometry xmlns:dr3d="urn:oasis:names:tc:opendocument:xmlns:dr3d:1.0" draw:type="non-primitive" svg:viewBox="0 0 812800 913248" draw:enhanced-path="M 406400 0 C 181951 0 0 204437 0 456624 0 708810 181951 913248 406400 913248 630849 913248 812800 708810 812800 456624 812800 204437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91324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46" draw:style-name="a1349" draw:name="TextBox 19" svg:x="2.79702in" svg:y="4.01327in" svg:width="0.38825in" svg:height="0.38583in">
            <draw:text-box>
              <text:p text:style-name="a1348" text:class-names="" text:cond-style-name=""><text:span text:style-name="a1347" text:class-names=""/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draw:fill-image draw:name="a1315" xlink:href="media/image1.png" xlink:show="embed" xlink:actuate="onLoad"/>
    <draw:fill-image draw:name="a632" xlink:href="media/image2.jpeg" xlink:show="embed" xlink:actuate="onLoad"/>
    <draw:fill-image draw:name="a1317" xlink:href="media/image3.png" xlink:show="embed" xlink:actuate="onLoad"/>
    <draw:fill-image draw:name="a1230" xlink:href="media/image4.png" xlink:show="embed" xlink:actuate="onLoad"/>
    <draw:fill-image draw:name="a512" xlink:href="media/image5.png" xlink:show="embed" xlink:actuate="onLoad"/>
    <draw:fill-image draw:name="a407" xlink:href="media/image6.png" xlink:show="embed" xlink:actuate="onLoad"/>
    <draw:fill-image draw:name="a1341" xlink:href="media/image7.png" xlink:show="embed" xlink:actuate="onLoad"/>
    <draw:fill-image draw:name="a409" xlink:href="media/image6.png" xlink:show="embed" xlink:actuate="onLoad"/>
    <draw:fill-image draw:name="a590" xlink:href="media/image8.png" xlink:show="embed" xlink:actuate="onLoad"/>
    <draw:fill-image draw:name="a360" xlink:href="media/image9.png" xlink:show="embed" xlink:actuate="onLoad"/>
    <draw:fill-image draw:name="a1309" xlink:href="media/image10.png" xlink:show="embed" xlink:actuate="onLoad"/>
    <draw:fill-image draw:name="a362" xlink:href="media/image9.png" xlink:show="embed" xlink:actuate="onLoad"/>
    <draw:fill-image draw:name="a364" xlink:href="media/image7.png" xlink:show="embed" xlink:actuate="onLoad"/>
    <draw:fill-image draw:name="a366" xlink:href="media/image7.png" xlink:show="embed" xlink:actuate="onLoad"/>
    <draw:fill-image draw:name="a368" xlink:href="media/image11.png" xlink:show="embed" xlink:actuate="onLoad"/>
    <draw:fill-image draw:name="a1228" xlink:href="media/image4.png" xlink:show="embed" xlink:actuate="onLoad"/>
    <draw:fill-image draw:name="a1335" xlink:href="media/image9.png" xlink:show="embed" xlink:actuate="onLoad"/>
    <draw:fill-image draw:name="a1337" xlink:href="media/image9.png" xlink:show="embed" xlink:actuate="onLoad"/>
    <draw:fill-image draw:name="a1339" xlink:href="media/image7.png" xlink:show="embed" xlink:actuate="onLoad"/>
    <draw:fill-image draw:name="a693" xlink:href="media/image12.png" xlink:show="embed" xlink:actuate="onLoad"/>
    <draw:fill-image draw:name="a588" xlink:href="media/image8.png" xlink:show="embed" xlink:actuate="onLoad"/>
    <draw:fill-image draw:name="a1253" xlink:href="media/image4.png" xlink:show="embed" xlink:actuate="onLoad"/>
    <draw:fill-image draw:name="a695" xlink:href="media/image12.png" xlink:show="embed" xlink:actuate="onLoad"/>
    <draw:fill-image draw:name="a1255" xlink:href="media/image4.png" xlink:show="embed" xlink:actuate="onLoad"/>
    <draw:fill-image draw:name="a604" xlink:href="media/image13.jpeg" xlink:show="embed" xlink:actuate="onLoad"/>
    <draw:fill-image draw:name="a1297" xlink:href="media/image14.png" xlink:show="embed" xlink:actuate="onLoad"/>
    <draw:fill-image draw:name="a1299" xlink:href="media/image14.png" xlink:show="embed" xlink:actuate="onLoad"/>
    <draw:fill-image draw:name="a1312" xlink:href="media/image15.jpeg" xlink:show="embed" xlink:actuate="onLoad"/>
  </office:styles>
  <office:automatic-styles>
    <style:page-layout style:name="pageLayout1">
      <style:page-layout-properties fo:page-width="20in" fo:page-height="11.2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7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6/10/2026</text:date></text:span><text:span text:style-name="a22" text:class-names=""/></text:p>
        </draw:text-box>
        <svg:title/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0.75in" svg:y="2.32986in" svg:width="8.5in" svg:height="1.60764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5in" svg:y="4.25in" svg:width="7in" svg:height="1.91667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5in" svg:y="6.95139in" svg:width="2.3333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6/10/2026</text:date></text:span><text:span text:style-name="a41" text:class-names=""/></text:p>
        </draw:text-box>
        <svg:title/>
        <svg:desc/>
      </draw:frame>
      <draw:frame draw:id="id8" presentation:style-name="a46" draw:name="Footer Placeholder 4" svg:x="3.41667in" svg:y="6.95139in" svg:width="3.1666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5in" svg:y="0.30035in" svg:width="9in" svg:height="1.2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5in" svg:y="1.75in" svg:width="9in" svg:height="4.94965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6/10/2026</text:date></text:span><text:span text:style-name="a73" text:class-names=""/></text:p>
        </draw:text-box>
        <svg:title/>
        <svg:desc/>
      </draw:frame>
      <draw:frame draw:id="id13" presentation:style-name="a78" draw:name="Footer Placeholder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78993in" svg:y="4.81944in" svg:width="8.5in" svg:height="1.48958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78993in" svg:y="3.17882in" svg:width="8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6/10/2026</text:date></text:span><text:span text:style-name="a93" text:class-names=""/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7.16667in" svg:y="6.95139in" svg:width="2.3333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5.08333in" svg:y="1.75in" svg:width="4.41667in" svg:height="4.94965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5in" svg:y="6.95139in" svg:width="2.3333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6/10/2026</text:date></text:span><text:span text:style-name="a141" text:class-names=""/></text:p>
        </draw:text-box>
        <svg:title/>
        <svg:desc/>
      </draw:frame>
      <draw:frame draw:id="id24" presentation:style-name="a146" draw:name="Footer Placeholder 5" svg:x="3.41667in" svg:y="6.95139in" svg:width="3.16667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5in" svg:y="0.30035in" svg:width="9in" svg:height="1.2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5in" svg:y="1.67882in" svg:width="4.4184in" svg:height="0.69965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5in" svg:y="2.37847in" svg:width="4.4184in" svg:height="4.32118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5.07986in" svg:y="1.67882in" svg:width="4.42014in" svg:height="0.6996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5.07986in" svg:y="2.37847in" svg:width="4.42014in" svg:height="4.32118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5in" svg:y="6.95139in" svg:width="2.3333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6/10/2026</text:date></text:span><text:span text:style-name="a197" text:class-names=""/></text:p>
        </draw:text-box>
        <svg:title/>
        <svg:desc/>
      </draw:frame>
      <draw:frame draw:id="id32" presentation:style-name="a202" draw:name="Footer Placeholder 7" svg:x="3.41667in" svg:y="6.95139in" svg:width="3.16667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7.16667in" svg:y="6.95139in" svg:width="2.3333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5in" svg:y="0.30035in" svg:width="9in" svg:height="1.2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5in" svg:y="6.95139in" svg:width="2.3333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6/10/2026</text:date></text:span><text:span text:style-name="a213" text:class-names=""/></text:p>
        </draw:text-box>
        <svg:title/>
        <svg:desc/>
      </draw:frame>
      <draw:frame draw:id="id36" presentation:style-name="a218" draw:name="Footer Placeholder 3" svg:x="3.41667in" svg:y="6.95139in" svg:width="3.16667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5in" svg:y="6.95139in" svg:width="2.3333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6/10/2026</text:date></text:span><text:span text:style-name="a226" text:class-names=""/></text:p>
        </draw:text-box>
        <svg:title/>
        <svg:desc/>
      </draw:frame>
      <draw:frame draw:id="id39" presentation:style-name="a231" draw:name="Footer Placeholder 2" svg:x="3.41667in" svg:y="6.95139in" svg:width="3.16667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7.16667in" svg:y="6.95139in" svg:width="2.3333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5in" svg:y="0.29861in" svg:width="3.28993in" svg:height="1.27083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5in" svg:y="6.95139in" svg:width="2.3333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6/10/2026</text:date></text:span><text:span text:style-name="a262" text:class-names=""/></text:p>
        </draw:text-box>
        <svg:title/>
        <svg:desc/>
      </draw:frame>
      <draw:frame draw:id="id45" presentation:style-name="a267" draw:name="Footer Placeholder 5" svg:x="3.41667in" svg:y="6.95139in" svg:width="3.16667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7.16667in" svg:y="6.95139in" svg:width="2.3333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1.96007in" svg:y="5.25in" svg:width="6in" svg:height="0.61979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1.96007in" svg:y="0.67014in" svg:width="6in" svg:height="4.5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1.96007in" svg:y="5.86979in" svg:width="6in" svg:height="0.8802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5in" svg:y="6.95139in" svg:width="2.3333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6/10/2026</text:date></text:span><text:span text:style-name="a285" text:class-names=""/></text:p>
        </draw:text-box>
        <svg:title/>
        <svg:desc/>
      </draw:frame>
      <draw:frame draw:id="id51" presentation:style-name="a290" draw:name="Footer Placeholder 5" svg:x="3.41667in" svg:y="6.95139in" svg:width="3.16667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7.16667in" svg:y="6.95139in" svg:width="2.3333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5in" svg:y="0.30035in" svg:width="9in" svg:height="1.2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5in" svg:y="1.75in" svg:width="9in" svg:height="4.94965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5in" svg:y="6.95139in" svg:width="2.3333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6/10/2026</text:date></text:span><text:span text:style-name="a317" text:class-names=""/></text:p>
        </draw:text-box>
        <svg:title/>
        <svg:desc/>
      </draw:frame>
      <draw:frame draw:id="id56" presentation:style-name="a322" draw:name="Footer Placeholder 4" svg:x="3.41667in" svg:y="6.95139in" svg:width="3.16667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7.16667in" svg:y="6.95139in" svg:width="2.3333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7.25in" svg:y="0.30035in" svg:width="2.25in" svg:height="6.39931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5in" svg:y="0.30035in" svg:width="6.58333in" svg:height="6.39931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5in" svg:y="6.95139in" svg:width="2.3333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6/10/2026</text:date></text:span><text:span text:style-name="a349" text:class-names=""/></text:p>
        </draw:text-box>
        <svg:title/>
        <svg:desc/>
      </draw:frame>
      <draw:frame draw:id="id61" presentation:style-name="a354" draw:name="Footer Placeholder 4" svg:x="3.41667in" svg:y="6.95139in" svg:width="3.16667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7.16667in" svg:y="6.95139in" svg:width="2.3333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Green and White Modern Thesis Defense Presentation</dc:title>
    <meta:creation-date>2006-08-16T00:00:00Z</meta:creation-date>
    <dc:date>2026-06-10T14:18:32Z</dc:date>
    <meta:editing-cycles>364</meta:editing-cycles>
    <meta:editing-duration>PT0S</meta:editing-duration>
    <meta:document-statistic meta:paragraph-count="0" meta:word-count="0"/>
  </office:meta>
</office:document-meta>
</file>